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195000001A52545E3D5.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TablePreview2.svm" manifest:media-type=""/>
  <manifest:file-entry manifest:full-path="Pictures/TablePreview1.svm" manifest:media-type=""/>
  <manifest:file-entry manifest:full-path="Pictures/TablePreview4.svm" manifest:media-type=""/>
  <manifest:file-entry manifest:full-path="Pictures/10000001000001A0000000588FC6596C.png" manifest:media-type="image/png"/>
  <manifest:file-entry manifest:full-path="Pictures/1000000000000780000004387537A119.png" manifest:media-type="image/png"/>
  <manifest:file-entry manifest:full-path="Pictures/1000000100000274000000723E6A5260.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none" draw:fill="none" fo:min-height="4.267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5" style:family="graphic" style:parent-style-name="standard">
      <style:graphic-properties draw:stroke="none" draw:fill="none" fo:min-height="1.293cm" loext:decorative="false"/>
      <style:paragraph-properties style:writing-mode="lr-tb"/>
    </style:style>
    <style:style style:name="gr16" style:family="graphic">
      <style:graphic-properties style:writing-mode="lr-tb" loext:decorative="false"/>
    </style:style>
    <style:style style:name="gr17" style:family="graphic" style:parent-style-name="standard">
      <style:graphic-properties draw:stroke="solid" svg:stroke-color="#ffffff" draw:fill="none" draw:textarea-horizontal-align="justify" draw:textarea-vertical-align="middle" draw:auto-grow-height="false" fo:min-height="9.814cm" fo:min-width="9.499cm" loext:decorative="fals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20"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8.838cm" style:use-optimal-column-width="false"/>
    </style:style>
    <style:style style:name="co2" style:family="table-column">
      <style:table-column-properties style:column-width="15.6cm" style:use-optimal-column-width="false"/>
    </style:style>
    <style:style style:name="co3" style:family="table-column">
      <style:table-column-properties style:column-width="3.351cm" style:use-optimal-column-width="false"/>
    </style:style>
    <style:style style:name="co4" style:family="table-column">
      <style:table-column-properties style:column-width="23.485cm" style:use-optimal-column-width="false"/>
    </style:style>
    <style:style style:name="co5" style:family="table-column">
      <style:table-column-properties style:column-width="7.087cm" style:use-optimal-column-width="false"/>
    </style:style>
    <style:style style:name="co6" style:family="table-column">
      <style:table-column-properties style:column-width="17.018cm" style:use-optimal-column-width="false"/>
    </style:style>
    <style:style style:name="co7" style:family="table-column">
      <style:table-column-properties style:column-width="4cm" style:use-optimal-column-width="false"/>
    </style:style>
    <style:style style:name="co8" style:family="table-column">
      <style:table-column-properties style:column-width="4.182cm" style:use-optimal-column-width="false"/>
    </style:style>
    <style:style style:name="co9" style:family="table-column">
      <style:table-column-properties style:column-width="18.21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1.937cm" style:use-optimal-row-height="false"/>
    </style:style>
    <style:style style:name="ro4" style:family="table-row">
      <style:table-row-properties style:row-height="6.123cm" style:use-optimal-row-height="false"/>
    </style:style>
    <style:style style:name="ro5" style:family="table-row">
      <style:table-row-properties style:row-height="1.623cm" style:use-optimal-row-height="false"/>
    </style:style>
    <style:style style:name="ro6" style:family="table-row">
      <style:table-row-properties style:row-height="0.912cm" style:use-optimal-row-height="false"/>
    </style:style>
    <style:style style:name="ro7" style:family="table-row">
      <style:table-row-properties style:row-height="0.962cm" style:use-optimal-row-height="false"/>
    </style:style>
    <style:style style:name="ro8" style:family="table-row">
      <style:table-row-properties style:row-height="3.045cm" style:use-optimal-row-height="false"/>
    </style:style>
    <style:style style:name="ro9" style:family="table-row">
      <style:table-row-properties style:row-height="2.334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
    </style:style>
    <style:style style:name="ce6" style:family="table-cell">
      <style:paragraph-properties fo:border="0.28pt solid #ffffff" style:text-autospace="none"/>
      <style:text-properties fo:color="#ffffff" loext:opacity="100%" style:font-name="Liberation Sans" fo:font-size="13pt" style:font-name-asian="AppleSystemUIFont" style:font-size-asian="13pt" style:font-name-complex="AppleSystemUIFont" style:font-size-complex="13pt"/>
    </style:style>
    <style:style style:name="ce7" style:family="table-cell">
      <style:paragraph-properties fo:border="0.28pt solid #ffffff"/>
      <style:text-properties fo:color="#ffffff" loext:opacity="100%" style:font-name="Liberation Sans" fo:font-size="18pt" style:font-size-asian="18pt" style:font-size-complex="18pt"/>
    </style:style>
    <style:style style:name="ce8" style:family="table-cell">
      <loext:graphic-properties draw:textarea-vertical-align="top"/>
      <style:paragraph-properties fo:border="0.28pt solid #ffffff" style:text-autospace="none"/>
      <style:text-properties fo:color="#ffffff" loext:opacity="100%" style:font-name="Liberation Sans" fo:font-size="18pt" style:font-size-asian="18pt" style:font-size-complex="18pt"/>
    </style:style>
    <style:style style:name="ce9" style:family="table-cell">
      <style:paragraph-properties fo:border="0.28pt solid #ffffff" style:text-autospace="none"/>
      <style:text-properties fo:color="#ffffff" loext:opacity="100%" style:font-name="Liberation Sans"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loext:graphic-properties draw:fill="none"/>
    </style:style>
    <style:style style:name="P14" style:family="paragraph">
      <style:paragraph-properties fo:text-align="center"/>
      <style:text-properties fo:color="#ffffff" loext:opacity="100%" fo:font-size="18pt" style:font-size-asian="18pt" style:font-size-complex="18pt"/>
    </style:style>
    <style:style style:name="P15" style:family="paragraph">
      <style:paragraph-properties style:text-autospace="none"/>
      <style:text-properties fo:color="#ffffff" loext:opacity="100%" fo:font-size="18pt" style:font-size-asian="18pt" style:font-size-complex="18pt"/>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style:paragraph-properties fo:text-align="center"/>
      <style:text-properties fo:color="#ffffff" loext:opacity="100%" style:font-name="Liberation Sans"/>
    </style:style>
    <style:style style:name="P21" style:family="paragraph">
      <style:paragraph-properties style:text-autospace="none"/>
      <style:text-properties fo:color="#ffffff" loext:opacity="100%" style:font-name="Liberation Sans" fo:font-size="13pt" style:font-name-asian="AppleSystemUIFont" style:font-size-asian="13pt" style:font-name-complex="AppleSystemUIFont" style:font-size-complex="13pt"/>
    </style:style>
    <style:style style:name="P22" style:family="paragraph">
      <style:paragraph-properties style:text-autospace="none"/>
      <style:text-properties fo:color="#ffffff" loext:opacity="100%" style:font-name="Liberation Sans" fo:font-size="18pt" style:font-size-asian="18pt" style:font-size-complex="18pt"/>
    </style:style>
    <style:style style:name="P23" style:family="paragraph">
      <style:text-properties fo:color="#ffffff" loext:opacity="100%"/>
    </style:style>
    <style:style style:name="P24" style:family="paragraph">
      <loext:graphic-properties draw:fill="solid" draw:fill-color="#34383a" draw:opacity="90%"/>
      <style:paragraph-properties fo:text-align="center"/>
    </style:style>
    <style:style style:name="P25"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ffffff" loext:opacity="100%"/>
    </style:style>
    <style:style style:name="T15" style:family="text">
      <style:text-properties fo:color="#ffffff" loext:opacity="100%" fo:font-size="18pt"/>
    </style:style>
    <style:style style:name="T16" style:family="text">
      <style:text-properties fo:color="#ffffff" loext:opacity="100%" fo:font-size="18pt" style:font-size-asian="18pt" style:font-size-complex="18pt"/>
    </style:style>
    <style:style style:name="T17"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style:font-name="AppleSystemUIFont" fo:font-size="18pt" style:font-name-asian="AppleSystemUIFont" style:font-size-asian="18pt" style:font-name-complex="AppleSystemUIFont" style:font-size-complex="18pt"/>
    </style:style>
    <style:style style:name="T19" style:family="text">
      <style:text-properties fo:color="#ffffff" loext:opacity="100%" style:text-line-through-style="none" style:text-line-through-type="none" fo:font-size="18pt" style:font-size-asian="18pt" style:font-size-complex="18pt"/>
    </style:style>
    <style:style style:name="T20"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1"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22" style:family="text">
      <style:text-properties style:font-name="CaskaydiaCove NFM" fo:font-size="12pt" style:font-size-asian="12pt" style:font-size-complex="12pt"/>
    </style:style>
    <style:style style:name="T23"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24"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25"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6"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7"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0"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style:style style:name="T31" style:family="text">
      <style:text-properties fo:color="#ffffff" loext:opacity="100%" style:font-name="Liberation Sans"/>
    </style:style>
    <style:style style:name="T32"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color="#ffffff" loext:opacity="100%" style:font-name="AppleSystemUIFont" fo:font-size="18pt" style:letter-kerning="true" style:font-name-asian="AppleSystemUIFont" style:font-size-asian="18pt" style:font-name-complex="AppleSystemUIFont" style:font-size-complex="18pt"/>
    </style:style>
    <style:style style:name="T34" style:family="text">
      <style:text-properties fo:color="#ffffff" loext:opacity="100%" style:font-name="Liberation Sans" fo:font-size="18pt" style:letter-kerning="true" style:font-name-asian="AppleSystemUIFont" style:font-size-asian="18pt" style:font-name-complex="AppleSystemUIFon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7537A11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6 <text:span text:style-name="T13">constants</text:span><text:span text:style-name="T7"> c</text:span>ontrol how the model behaves and manipulates data.</text:p>
                <text:list>
                  <text:list-item>
                    <text:p text:style-name="P10">We don’t yet support modification of the 3 array constants. Of the other 23 scalar constants we do experiment with, 8 have no observable effect on the output. </text:p>
                  </text:list-item>
                </text:list>
              </text:list-item>
              <text:list-item>
                <text:p text:style-name="P9">The 25 <text:span text:style-name="T4">inputs</text:span> provide starting data for the model.</text:p>
              </text:list-item>
              <text:list-item>
                <text:p text:style-name="P9">The 9 <text:span text:style-name="T4">outputs</text:span> constitute data that the model has generated.</text:p>
              </text:list-item>
              <text:list-item>
                <text:p text:style-name="P9">8 variables are both an input and an output.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able of Constants</text:p>
          </draw:text-box>
        </draw:frame>
        <draw:frame draw:style-name="gr7" draw:layer="layout" svg:width="24.437cm" svg:height="4.958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4">Array Constants</text:span></text:p>
              </table:table-cell>
              <table:table-cell table:style-name="ce2">
                <text:p text:style-name="P12"><text:span text:style-name="T14">crop, iscft, percrop</text:span></text:p>
              </table:table-cell>
            </table:table-row>
            <table:table-row table:style-name="ro2">
              <table:table-cell table:style-name="ce1">
                <text:p text:style-name="P11"><text:span text:style-name="T14">Scalar Constants with Observable Outputs</text:span></text:p>
              </table:table-cell>
              <table:table-cell table:style-name="ce2">
                <text:p text:style-name="P12"><text:span text:style-name="T14">Betavis, cnfac, cpliq, denh2o, grav, hfus, lake_no_ed, lakepuddling, nlevgrnd, nlevlak, nlevsno, tkwat, vkc</text:span></text:p>
              </table:table-cell>
            </table:table-row>
            <table:table-row table:style-name="ro3">
              <table:table-cell table:style-name="ce1">
                <text:p text:style-name="P11"><text:span text:style-name="T14">Scalar Constants without Observable Outputs</text:span></text:p>
              </table:table-cell>
              <table:table-cell table:style-name="ce2">
                <text:p text:style-name="P12"><text:span text:style-name="T14">cpice, denice, depthcrit, mixfact, pudz, tkice</text:span></text:p>
              </table:table-cell>
            </table:table-row>
          </table:table>
          <draw:image xlink:href="Pictures/TablePreview1.svm" xlink:type="simple" xlink:show="embed" xlink:actuate="onLoad"/>
        </draw:frame>
        <draw:frame draw:style-name="gr8" draw:text-style-name="P13" draw:layer="layout" svg:width="14.63cm" svg:height="4.517cm" svg:x="7.144cm" svg:y="10.504cm">
          <draw:text-box>
            <text:p><text:span text:style-name="T15">Tfrz, tdmax, n2min, and za_lake from LakeTemperature.md not included yet, don’t know if their outputs are observable or not</text:span></text:p>
            <text:p><text:span text:style-name="T15"/></text:p>
            <text:p><text:span text:style-name="T15">This table uses explicitly the constants mentioned in LakeTemperature.md plus the array constants</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835cm" svg:height="11.07cm" svg:x="0.654cm" svg:y="2.896cm">
          <table:table table:template-name="default" table:use-first-row-styles="true" table:use-banding-rows-styles="true">
            <table:table-column table:style-name="co3"/>
            <table:table-column table:style-name="co4"/>
            <table:table-row table:style-name="ro4">
              <table:table-cell table:style-name="ce3">
                <text:p text:style-name="P14"><text:span text:style-name="T16">Inputs</text:span></text:p>
              </table:table-cell>
              <table:table-cell table:style-name="ce4">
                <text:p text:style-name="P15"><text:span text:style-name="T17">col_es%t_grnd</text:span><text:span text:style-name="T16">, </text:span><text:span text:style-name="T17">col_pp%dz</text:span><text:span text:style-name="T16">, </text:span><text:span text:style-name="T17">col_pp%dz_lake</text:span><text:span text:style-name="T16">, </text:span><text:span text:style-name="T17">col_pp%z</text:span><text:span text:style-name="T16">, </text:span><text:span text:style-name="T17">col_pp%z_lake</text:span><text:span text:style-name="T16">, </text:span><text:span text:style-name="T17">col_pp%zi</text:span><text:span text:style-name="T16">, </text:span><text:span text:style-name="T17">col_pp&amp;lakedepth</text:span><text:span text:style-name="T16">, </text:span><text:span text:style-name="T17">col_pp&amp;snl</text:span><text:span text:style-name="T16">, </text:span><text:span text:style-name="T17">col_ws%h2osno</text:span><text:span text:style-name="T16">, </text:span><text:span text:style-name="T17">col_ws%h2osoi_ice</text:span><text:span text:style-name="T16">, </text:span><text:span text:style-name="T17">col_ws%h2osoi_liq, lakestate_vars%etal_col</text:span><text:span text:style-name="T16">, </text:span><text:span text:style-name="T17">lakestate_vars%ks_col</text:span><text:span text:style-name="T16">, </text:span><text:span text:style-name="T17">lakestate_vars%lake_raw_col</text:span><text:span text:style-name="T16">, </text:span><text:span text:style-name="T17">lakestate_vars%ws_col</text:span><text:span text:style-name="T16">, </text:span><text:span text:style-name="T17">soilstate_vars%csol_col</text:span><text:span text:style-name="T16">, soilstate_vars%tkmg_col, soilstate_vars%tksatu_col, soilstate_vars%watsat_col, solarabs_vars%fsds_nir_d_patch, solarabs_vars%fsds_nir_i_patch, solarabs_vars%fsr_nir_d_patch, solarabs_vars%fsr_nir_i_patch, solarabs_vars%sabg_lyr_patch, </text:span><text:span text:style-name="T18">solarabs_vars%sabg_patch</text:span></text:p>
              </table:table-cell>
            </table:table-row>
            <table:table-row table:style-name="ro5">
              <table:table-cell table:style-name="ce3">
                <text:p text:style-name="P14"><text:span text:style-name="T16">Both Inputs and Outputs</text:span></text:p>
              </table:table-cell>
              <table:table-cell table:style-name="ce4">
                <text:p text:style-name="P15"><text:span text:style-name="T16">col_es%t_lake, col_es%t_soisno, lakestate_vars%lake_icefrac_col, lakestate_vars%lake_icethick_col, veg_ef%eflx_gnet</text:span></text:p>
                <text:p text:style-name="P15"><text:span text:style-name="T16">veg_ef%eflx_sh_grnd, veg_ef%eflx_sh_tot, </text:span><text:span text:style-name="T18">veg_ef%eflx_soil_grnd</text:span></text:p>
              </table:table-cell>
            </table:table-row>
            <table:table-row table:style-name="ro6">
              <table:table-cell table:style-name="ce3">
                <text:p text:style-name="P14"><text:span text:style-name="T16">Outputs</text:span></text:p>
              </table:table-cell>
              <table:table-cell table:style-name="ce4">
                <text:p text:style-name="P15"><text:span text:style-name="T16">ch4_vars%grnd_ch4_cond_col, col_ef%errsoi, col_es%hc_soi, col_es%hc_soisno, col_wf%qflx_snofrz, col_ws%frac_iceold, lakestate_vars%betaprime_col, </text:span><text:span text:style-name="T19">lakestate_vars%lakeresist_col, </text:span><text:span text:style-name="T20">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able of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7" draw:layer="layout" svg:width="6.25cm" svg:height="12.158cm" svg:x="19.216cm" svg:y="3.257cm">
          <draw:text-box>
            <text:p><text:span text:style-name="T21">netcdf x_times_y {</text:span></text:p>
            <text:p><text:span text:style-name="T21">dimensions:</text:span></text:p>
            <text:p><text:span text:style-name="T21"><text:s text:c="8"/>x = 5 ;</text:span></text:p>
            <text:p><text:span text:style-name="T21"><text:s text:c="8"/>y = 5 ;</text:span></text:p>
            <text:p><text:span text:style-name="T21">variables:</text:span></text:p>
            <text:p><text:span text:style-name="T21"><text:s text:c="8"/>float x(x) ;</text:span></text:p>
            <text:p><text:span text:style-name="T21"><text:s text:c="8"/>float y(y) ;</text:span></text:p>
            <text:p><text:span text:style-name="T21"><text:s text:c="8"/>float z(x, y) ;</text:span></text:p>
            <text:p><text:span text:style-name="T21">data:</text:span></text:p>
            <text:p><text:span text:style-name="T21"/></text:p>
            <text:p><text:span text:style-name="T21"><text:s/>x = -2, -1, 0, 1, 2 ;</text:span></text:p>
            <text:p><text:span text:style-name="T21"/></text:p>
            <text:p><text:span text:style-name="T21"><text:s/>y = -4, -2, 0, 2, 4 ;</text:span></text:p>
            <text:p><text:span text:style-name="T21"/></text:p>
            <text:p><text:span text:style-name="T21"><text:s/>z =</text:span></text:p>
            <text:p><text:span text:style-name="T21"><text:s text:c="2"/>8, 4, -0, -4, -8,</text:span></text:p>
            <text:p><text:span text:style-name="T21"><text:s text:c="2"/>4, 2, -0, -2, -4,</text:span></text:p>
            <text:p><text:span text:style-name="T21"><text:s text:c="2"/>-0, -0, 0, 0, 0,</text:span></text:p>
            <text:p><text:span text:style-name="T21"><text:s text:c="2"/>-4, -2, 0, 2, 4,</text:span></text:p>
            <text:p><text:span text:style-name="T21"><text:s text:c="2"/>-8, -4, 0, 4, 8 ;</text:span></text:p>
            <text:p><text:span text:style-name="T21">}</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0" draw:text-style-name="P17" draw:layer="layout" svg:width="12.394cm" svg:height="8.189cm" svg:x="1.401cm" svg:y="5.582cm">
          <draw:text-box>
            <text:p><text:span text:style-name="T21">betavis</text:span></text:p>
            <text:p><text:span text:style-name="T21">0.0</text:span></text:p>
            <text:p><text:span text:style-name="T21">za_lake</text:span></text:p>
            <text:p><text:span text:style-name="T21">0.6</text:span></text:p>
            <text:p><text:span text:style-name="T21">n2min</text:span></text:p>
            <text:p><text:span text:style-name="T21">7.4999999999999993E-005</text:span></text:p>
            <text:p><text:span text:style-name="T21">tdmax</text:span></text:p>
            <text:p><text:span text:style-name="T21">277.0</text:span></text:p>
            <text:p><text:span text:style-name="T21">pudz</text:span></text:p>
            <text:p><text:span text:style-name="T21">0.0</text:span></text:p>
            <text:p><text:span text:style-name="T21">mixfact</text:span></text:p>
            <text:p><text:span text:style-name="T21">10.0</text:span></text:p>
            <text:p><text:span text:style-name="T21">depthcrit</text:span></text:p>
            <text:p><text:span text:style-name="T21">25.0</text:span></text:p>
          </draw:text-box>
        </draw:frame>
        <draw:frame draw:style-name="gr11" draw:text-style-name="P18" draw:layer="layout" svg:width="12.393cm" svg:height="0.818cm" svg:x="1.401cm" svg:y="4.84cm">
          <draw:text-box>
            <text:p text:style-name="P7"><text:span text:style-name="T22">Constants (formerly lakeparams.txt)</text:span></text:p>
          </draw:text-box>
        </draw:frame>
        <draw:frame draw:style-name="gr12" draw:text-style-name="P17" draw:layer="layout" svg:width="12.394cm" svg:height="7.117cm" svg:x="14.206cm" svg:y="5.583cm">
          <draw:text-box>
            <text:p><text:span text:style-name="T23">{</text:span></text:p>
            <text:p><text:span text:style-name="T24"><text:s text:c="2"/></text:span><text:span text:style-name="T25">"betavis"</text:span><text:span text:style-name="T23">:</text:span><text:span text:style-name="T24"> </text:span><text:span text:style-name="T26">0.0</text:span><text:span text:style-name="T23">,</text:span></text:p>
            <text:p><text:span text:style-name="T24"><text:s text:c="2"/></text:span><text:span text:style-name="T25">"za_lake"</text:span><text:span text:style-name="T23">:</text:span><text:span text:style-name="T24"> </text:span><text:span text:style-name="T26">0.6</text:span><text:span text:style-name="T23">,</text:span></text:p>
            <text:p><text:span text:style-name="T24"><text:s text:c="2"/></text:span><text:span text:style-name="T25">"n2min"</text:span><text:span text:style-name="T23">:</text:span><text:span text:style-name="T24"> </text:span><text:span text:style-name="T26">7.4999999999999993E-005</text:span><text:span text:style-name="T23">,</text:span></text:p>
            <text:p><text:span text:style-name="T24"><text:s text:c="2"/></text:span><text:span text:style-name="T25">"tdmax"</text:span><text:span text:style-name="T23">:</text:span><text:span text:style-name="T24"> </text:span><text:span text:style-name="T26">277.0</text:span><text:span text:style-name="T23">,</text:span></text:p>
            <text:p><text:span text:style-name="T24"><text:s text:c="2"/></text:span><text:span text:style-name="T25">"pudz"</text:span><text:span text:style-name="T23">:</text:span><text:span text:style-name="T24"> </text:span><text:span text:style-name="T26">0.0</text:span><text:span text:style-name="T23">,</text:span></text:p>
            <text:p><text:span text:style-name="T24"><text:s text:c="2"/></text:span><text:span text:style-name="T25">"mixfact"</text:span><text:span text:style-name="T23">:</text:span><text:span text:style-name="T24"> </text:span><text:span text:style-name="T26">10.0</text:span><text:span text:style-name="T23">,</text:span></text:p>
            <text:p><text:span text:style-name="T24"><text:s text:c="2"/></text:span><text:span text:style-name="T25">"depthcrit"</text:span><text:span text:style-name="T23">:</text:span><text:span text:style-name="T24"> </text:span><text:span text:style-name="T26">25.0</text:span></text:p>
            <text:p><text:span text:style-name="T23">}</text:span></text:p>
          </draw:text-box>
        </draw:frame>
        <draw:frame draw:style-name="gr11" draw:text-style-name="P18" draw:layer="layout" svg:width="12.393cm" svg:height="0.818cm" svg:x="14.206cm" svg:y="4.841cm">
          <draw:text-box>
            <text:p text:style-name="P7"><text:span text:style-name="T22">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7" draw:layer="layout" svg:width="25.193cm" svg:height="3.146cm" svg:x="1.406cm" svg:y="9.673cm">
          <draw:text-box>
            <text:p><text:span text:style-name="T23">{</text:span></text:p>
            <text:p><text:span text:style-name="T24"><text:s text:c="2"/></text:span><text:span text:style-name="T25">"veg_ef%eflx_soil_grnd"</text:span><text:span text:style-name="T23">:</text:span><text:span text:style-name="T24"> </text:span><text:span text:style-name="T23">[</text:span><text:span text:style-name="T26">0.0</text:span><text:span text:style-name="T23">,</text:span><text:span text:style-name="T24"> </text:span><text:span text:style-name="T26">...</text:span><text:span text:style-name="T23">],</text:span></text:p>
            <text:p><text:span text:style-name="T24"><text:s text:c="2"/></text:span><text:span text:style-name="T25">"veg_ef%eflx_gnet"</text:span><text:span text:style-name="T23">:</text:span><text:span text:style-name="T24"> </text:span><text:span text:style-name="T23">[[</text:span><text:span text:style-name="T26">0.0</text:span><text:span text:style-name="T23">,</text:span><text:span text:style-name="T24"> </text:span><text:span text:style-name="T26">...</text:span><text:span text:style-name="T23">],</text:span><text:span text:style-name="T24"> </text:span><text:span text:style-name="T26">...</text:span><text:span text:style-name="T23">],</text:span></text:p>
            <text:p><text:span text:style-name="T24"><text:s text:c="2"/></text:span><text:span text:style-name="T26">...</text:span></text:p>
            <text:p><text:span text:style-name="T23">}</text:span></text:p>
          </draw:text-box>
        </draw:frame>
        <draw:frame draw:style-name="gr11" draw:text-style-name="P18" draw:layer="layout" svg:width="20.304cm" svg:height="0.818cm" svg:x="3.848cm" svg:y="8.931cm">
          <draw:text-box>
            <text:p text:style-name="P7"><text:span text:style-name="T22">Outputs Received by Analysis Plugins (JSON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7">Represent a grouping of </text:span>ordered samples</text:p>
                <text:list>
                  <text:list-item>
                    <text:p>When the program is run on each sample in a sample group, the model data is returned in the same order as the samples were in. </text:p>
                  </text:list-item>
                </text:list>
              </text:list-item>
              <text:list-item>
                <text:p>Analysis plugins can analyze the result of multiple consecutive runs of <text:span text:style-name="T1">elmtest.exe</text:span>.</text:p>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4" draw:text-style-name="P17" draw:layer="layout" svg:width="12.394cm" svg:height="8.279cm" svg:x="1.411cm" svg:y="4.839cm">
          <draw:text-box>
            <text:p><text:span text:style-name="T23">[</text:span></text:p>
            <text:p><text:span text:style-name="T23"><text:s text:c="2"/>{</text:span></text:p>
            <text:p><text:span text:style-name="T24"><text:s text:c="4"/></text:span><text:span text:style-name="T25">"betavis"</text:span><text:span text:style-name="T23">:</text:span><text:span text:style-name="T24"> </text:span><text:span text:style-name="T26">0.0</text:span><text:span text:style-name="T23">,</text:span></text:p>
            <text:p><text:span text:style-name="T23"><text:s text:c="4"/>...</text:span></text:p>
            <text:p><text:span text:style-name="T23"><text:s text:c="2"/>},</text:span></text:p>
            <text:p text:style-name="P19"><text:span text:style-name="T23"><text:s text:c="2"/>{</text:span></text:p>
            <text:p text:style-name="P19"><text:span text:style-name="T24"><text:s text:c="4"/></text:span><text:span text:style-name="T25">"betavis"</text:span><text:span text:style-name="T23">:</text:span><text:span text:style-name="T24"> </text:span><text:span text:style-name="T26">0.25</text:span><text:span text:style-name="T23">,</text:span></text:p>
            <text:p text:style-name="P19"><text:span text:style-name="T23"><text:s text:c="4"/>...</text:span></text:p>
            <text:p text:style-name="P19"><text:span text:style-name="T23"><text:s text:c="2"/>},</text:span></text:p>
            <text:p text:style-name="P19"><text:span text:style-name="T23"><text:s text:c="2"/>{</text:span></text:p>
            <text:p text:style-name="P19"><text:span text:style-name="T24"><text:s text:c="4"/></text:span><text:span text:style-name="T25">"betavis"</text:span><text:span text:style-name="T23">:</text:span><text:span text:style-name="T24"> </text:span><text:span text:style-name="T26">0.5</text:span><text:span text:style-name="T23">,</text:span></text:p>
            <text:p text:style-name="P19"><text:span text:style-name="T23"><text:s text:c="4"/>...</text:span></text:p>
            <text:p text:style-name="P19"><text:span text:style-name="T23"><text:s text:c="2"/>}</text:span></text:p>
            <text:p><text:span text:style-name="T23">]</text:span></text:p>
          </draw:text-box>
        </draw:frame>
        <draw:frame draw:style-name="gr11" draw:text-style-name="P18" draw:layer="layout" svg:width="12.393cm" svg:height="0.818cm" svg:x="1.411cm" svg:y="4.097cm">
          <draw:text-box>
            <text:p text:style-name="P7"><text:span text:style-name="T22">Sample Group Data (JSON for illustration)</text:span></text:p>
          </draw:text-box>
        </draw:frame>
        <draw:frame draw:style-name="gr14" draw:text-style-name="P17" draw:layer="layout" svg:width="12.739cm" svg:height="8.279cm" svg:x="14.205cm" svg:y="4.839cm">
          <draw:text-box>
            <text:p><text:span text:style-name="T23">[</text:span></text:p>
            <text:p><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0</text:span><text:span text:style-name="T23">,</text:span><text:span text:style-name="T24"> </text:span><text:span text:style-name="T30">...</text:span><text:span text:style-name="T23">],</text:span></text:p>
            <text:p text:style-name="P19"><text:span text:style-name="T24"><text:s text:c="4"/></text:span><text:span text:style-name="T30">...</text:span></text:p>
            <text:p><text:span text:style-name="T24"><text:s text:c="2"/></text:span><text:span text:style-name="T23">},</text:span></text:p>
            <text:p text:style-name="P19"><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25</text:span><text:span text:style-name="T23">,</text:span><text:span text:style-name="T24"> </text:span><text:span text:style-name="T30">...</text:span><text:span text:style-name="T23">],</text:span></text:p>
            <text:p text:style-name="P19"><text:span text:style-name="T24"><text:s text:c="4"/></text:span><text:span text:style-name="T30">...</text:span></text:p>
            <text:p text:style-name="P19"><text:span text:style-name="T24"><text:s text:c="2"/></text:span><text:span text:style-name="T23">},</text:span></text:p>
            <text:p text:style-name="P19"><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5</text:span><text:span text:style-name="T23">,</text:span><text:span text:style-name="T24"> </text:span><text:span text:style-name="T30">...</text:span><text:span text:style-name="T23">],</text:span></text:p>
            <text:p text:style-name="P19"><text:span text:style-name="T24"><text:s text:c="4"/></text:span><text:span text:style-name="T30">...</text:span></text:p>
            <text:p text:style-name="P19"><text:span text:style-name="T24"><text:s text:c="2"/></text:span><text:span text:style-name="T23">}</text:span></text:p>
            <text:p><text:span text:style-name="T23">]</text:span></text:p>
          </draw:text-box>
        </draw:frame>
        <draw:frame draw:style-name="gr11" draw:text-style-name="P18" draw:layer="layout" svg:width="12.393cm" svg:height="0.818cm" svg:x="14.205cm" svg:y="4.097cm">
          <draw:text-box>
            <text:p text:style-name="P7"><text:span text:style-name="T22">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Overview and Visuals</text:p>
          </draw:text-box>
        </draw:frame>
        <draw:frame presentation:style-name="pr5" draw:layer="layout" svg:width="25.005cm" svg:height="2.788cm" svg:x="1.401cm" svg:y="3.685cm" presentation:class="outline" presentation:user-transformed="true">
          <draw:text-box>
            <text:list text:style-name="L2">
              <text:list-item>
                <text:p>Sampling plugins define a subclass of <text:span text:style-name="T1">Sampler</text:span>, returning one or more <text:span text:style-name="T1">SampleGroups</text:span>.</text:p>
              </text:list-item>
            </text:list>
          </draw:text-box>
        </draw:frame>
        <draw:g draw:style-name="gr3">
          <draw:frame draw:style-name="gr2" draw:text-style-name="P5" draw:layer="layout" svg:width="13.513cm" svg:height="2.321cm" svg:x="0.96cm" svg:y="7.616cm">
            <draw:image xlink:href="Pictures/10000001000003800000009AF1E33EAA.png" xlink:type="simple" xlink:show="embed" xlink:actuate="onLoad" draw:mime-type="image/png">
              <text:p/>
            </draw:image>
          </draw:frame>
          <draw:frame draw:style-name="gr15" draw:text-style-name="P13" draw:layer="layout" svg:width="8.561cm" svg:height="1.543cm" svg:x="0.96cm" svg:y="6.473cm">
            <draw:text-box>
              <text:p>Interface</text:p>
            </draw:text-box>
          </draw:frame>
        </draw:g>
        <draw:frame draw:style-name="gr15" draw:text-style-name="P13" draw:layer="layout" svg:width="5.325cm" svg:height="1.543cm" svg:x="20.639cm" svg:y="6.473cm">
          <draw:text-box>
            <text:p>UML Diagram</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Sampling Plugins</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5.798cm" svg:x="1.785cm" svg:y="3.418cm">
          <table:table table:template-name="default" table:use-first-row-styles="true" table:use-banding-rows-styles="true">
            <table:table-column table:style-name="co5"/>
            <table:table-column table:style-name="co6"/>
            <table:table-row table:style-name="ro7">
              <table:table-cell table:style-name="ce5">
                <text:p text:style-name="P20"><text:span text:style-name="T31">CSV Index Sampling</text:span></text:p>
              </table:table-cell>
              <table:table-cell table:style-name="ce6">
                <text:p text:style-name="P21"><text:span text:style-name="T32">Creates samples using CSV files generated by NIST’s ACTS (Automated Combinatorial Testing for Software) by linearly interpolating between the values for each constant found in the ranges file</text:span></text:p>
              </table:table-cell>
            </table:table-row>
            <table:table-row table:style-name="ro7">
              <table:table-cell table:style-name="ce5">
                <text:p text:style-name="P20"><text:span text:style-name="T31">Order Sampling</text:span></text:p>
              </table:table-cell>
              <table:table-cell table:style-name="ce7">
                <text:p text:style-name="P15"><text:span text:style-name="T33">Generates Order(s), a subclass of SampleGroup. Each Order reads instructions from a JSON file to generate samples using linear interpolation</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draw:text-box>
            <text:p text:style-name="P7">Analysis Plugin Visuals</text:p>
          </draw:text-box>
        </draw:frame>
        <draw:frame draw:style-name="gr2" draw:text-style-name="P5" draw:layer="layout" svg:width="8.74cm" svg:height="5.484cm" svg:x="0.496cm" svg:y="3.909cm">
          <draw:image xlink:href="Pictures/100000010000021A000001568880D7F2.png" xlink:type="simple" xlink:show="embed" xlink:actuate="onLoad" draw:mime-type="image/png">
            <text:p/>
          </draw:image>
        </draw:frame>
        <draw:frame draw:style-name="gr2" draw:text-style-name="P5" draw:layer="layout" svg:width="8.738cm" svg:height="5.385cm" svg:x="0.496cm" svg:y="9.838cm">
          <draw:image xlink:href="Pictures/100000010000022A0000015ACDD290C6.png" xlink:type="simple" xlink:show="embed" xlink:actuate="onLoad" draw:mime-type="image/png">
            <text:p/>
          </draw:image>
        </draw:frame>
        <draw:frame draw:style-name="gr15" draw:text-style-name="P13" draw:layer="layout" svg:width="8.561cm" svg:height="1.543cm" svg:x="0.496cm" svg:y="2.825cm">
          <draw:text-box>
            <text:p>Interfaces</text:p>
          </draw:text-box>
        </draw:frame>
        <draw:frame draw:style-name="gr15" draw:text-style-name="P13" draw:layer="layout" svg:width="5.325cm" svg:height="1.543cm" svg:x="20.022cm" svg:y="3.257cm">
          <draw:text-box>
            <text:p>UML Diagram</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Analysis Plugins</text:p>
          </draw:text-box>
        </draw:frame>
        <draw:frame draw:style-name="gr7" draw:layer="layout" svg:width="26.399cm" svg:height="9.335cm" svg:x="0.727cm" svg:y="3.695cm">
          <table:table table:template-name="default" table:use-first-row-styles="true" table:use-banding-rows-styles="true">
            <table:table-column table:style-name="co7"/>
            <table:table-column table:style-name="co8"/>
            <table:table-column table:style-name="co9"/>
            <table:table-row table:style-name="ro8" table:default-cell-style-name="ce5">
              <table:table-cell table:number-rows-spanned="2">
                <text:p text:style-name="P20"><text:span text:style-name="T31">Per Sample Analyzers</text:span></text:p>
              </table:table-cell>
              <table:table-cell>
                <text:p text:style-name="P20"><text:span text:style-name="T31">Differences</text:span></text:p>
              </table:table-cell>
              <table:table-cell table:style-name="ce8">
                <text:p text:style-name="P22"><text:span text:style-name="T34">Finds differences between values in the reference data and the current sample’s data, recording the indices of the difference, the two differing values, and the difference between them</text:span></text:p>
              </table:table-cell>
            </table:table-row>
            <table:table-row table:style-name="ro9" table:default-cell-style-name="ce5">
              <table:covered-table-cell/>
              <table:table-cell>
                <text:p text:style-name="P20"><text:span text:style-name="T31">Fault Finding</text:span></text:p>
              </table:table-cell>
              <table:table-cell table:style-name="ce8">
                <text:p text:style-name="P22"><text:span text:style-name="T34">Uses functions defined by the plugin to make assertions about values in the sample data, similar to a unit testing framework but with assertions pertaining to model values rather than specific function behavior</text:span></text:p>
              </table:table-cell>
            </table:table-row>
            <table:table-row table:style-name="ro5" table:default-cell-style-name="ce5">
              <table:table-cell table:number-rows-spanned="2">
                <text:p text:style-name="P20"><text:span text:style-name="T31">Sample Group Analyzer</text:span></text:p>
              </table:table-cell>
              <table:table-cell>
                <text:p text:style-name="P20"><text:span text:style-name="T31">Change Detection</text:span></text:p>
              </table:table-cell>
              <table:table-cell table:style-name="ce8">
                <text:p text:style-name="P22"><text:span text:style-name="T34">Identifies which inputs and outputs differ from the reference</text:span></text:p>
              </table:table-cell>
            </table:table-row>
            <table:table-row table:style-name="ro5" table:default-cell-style-name="ce5">
              <table:covered-table-cell/>
              <table:table-cell>
                <text:p text:style-name="P20"><text:span text:style-name="T31">NetCDF4 Output</text:span></text:p>
              </table:table-cell>
              <table:table-cell table:style-name="ce9">
                <text:p text:style-name="P22"><text:span text:style-name="T34">Stores each sample group as an individual NetCDF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text-style-name="P23"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Use Case Diagram</text:p>
          </draw:text-box>
        </draw:frame>
        <draw:g draw:style-name="gr16">
          <draw:g draw:style-name="gr16">
            <draw:custom-shape draw:style-name="gr17" draw:text-style-name="P5" draw:layer="layout" svg:width="9.999cm" svg:height="10.064cm" svg:x="8.83cm" svg:y="4.326cm">
              <text:p/>
              <draw:enhanced-geometry svg:viewBox="0 0 21600 21600" draw:type="rectangle" draw:enhanced-path="M 0 0 L 21600 0 21600 21600 0 21600 0 0 Z N"/>
            </draw:custom-shape>
          </draw:g>
          <draw:frame draw:style-name="gr18" draw:text-style-name="P7" draw:layer="layout" svg:width="9.274cm" svg:height="9.263cm" svg:x="9.215cm" svg:y="4.712cm">
            <draw:image xlink:href="Pictures/1000000100000195000001A52545E3D5.png" xlink:type="simple" xlink:show="embed" xlink:actuate="onLoad" draw:mime-type="image/png">
              <text:p/>
            </draw:image>
          </draw:frame>
        </draw:g>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19" draw:text-style-name="P24" draw:layer="layout" svg:width="18.129cm" svg:height="7.095cm" svg:x="4.936cm" svg:y="4.328cm">
          <text:p/>
          <draw:enhanced-geometry svg:viewBox="0 0 21600 21600" draw:type="rectangle" draw:enhanced-path="M 0 0 L 21600 0 21600 21600 0 21600 0 0 Z N"/>
        </draw:custom-shape>
        <draw:custom-shape draw:style-name="gr20" draw:text-style-name="P25"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24T10:45:51.170284000</dc:date>
    <meta:editing-duration>PT10H14M9S</meta:editing-duration>
    <meta:editing-cycles>52</meta:editing-cycles>
    <meta:print-date>2026-02-24T10:45:45.151626000</meta:print-date>
    <meta:printed-by>PDF files</meta:printed-by>
    <meta:document-statistic meta:object-count="146"/>
  </office:meta>
</office:document-meta>
</file>