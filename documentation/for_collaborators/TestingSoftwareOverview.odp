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FA0000041C67358B57.png" manifest:media-type="image/png"/>
  <manifest:file-entry manifest:full-path="Pictures/10000001000004D8000004205C952C64.png" manifest:media-type="image/png"/>
  <manifest:file-entry manifest:full-path="Pictures/10000001000003D6000005B4C5EAA634.png" manifest:media-type="image/png"/>
  <manifest:file-entry manifest:full-path="Pictures/1000000000000780000004387C4E1066.png" manifest:media-type="image/png"/>
  <manifest:file-entry manifest:full-path="Pictures/10000001000001B80000012627B175B6.png" manifest:media-type="image/png"/>
  <manifest:file-entry manifest:full-path="Pictures/100000010000022A0000015ACDD290C6.png" manifest:media-type="image/png"/>
  <manifest:file-entry manifest:full-path="Pictures/TablePreview3.svm" manifest:media-type=""/>
  <manifest:file-entry manifest:full-path="Pictures/10000001000003800000009AF1E33EAA.png" manifest:media-type="image/png"/>
  <manifest:file-entry manifest:full-path="Pictures/100000010000016B000000D3685305CA.png" manifest:media-type="image/png"/>
  <manifest:file-entry manifest:full-path="Pictures/100000000000007B000000191E441580.png" manifest:media-type="image/png"/>
  <manifest:file-entry manifest:full-path="Pictures/TablePreview2.svm" manifest:media-type=""/>
  <manifest:file-entry manifest:full-path="Pictures/100000010000018C000001E2FF2FC24F.png" manifest:media-type="image/png"/>
  <manifest:file-entry manifest:full-path="Pictures/TablePreview1.svm" manifest:media-type=""/>
  <manifest:file-entry manifest:full-path="Pictures/10000001000003420000015F665F5A35.png" manifest:media-type="image/png"/>
  <manifest:file-entry manifest:full-path="Pictures/1000000100000274000000723E6A5260.png" manifest:media-type="image/png"/>
  <manifest:file-entry manifest:full-path="Pictures/1000000000000079000000158B9956C2.png" manifest:media-type="image/png"/>
  <manifest:file-entry manifest:full-path="Pictures/10000000000007800000043841A02BE8.png" manifest:media-type="image/png"/>
  <manifest:file-entry manifest:full-path="Pictures/10000000000000770000001413F33111.png" manifest:media-type="image/png"/>
  <manifest:file-entry manifest:full-path="Pictures/1000000000000780000004389F37C5F6.png" manifest:media-type="image/png"/>
  <manifest:file-entry manifest:full-path="Pictures/TablePreview4.svm" manifest:media-type=""/>
  <manifest:file-entry manifest:full-path="Pictures/10000001000001A0000000588FC6596C.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loext:decorative="false"/>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0.249cm" loext:decorative="false"/>
      <style:paragraph-properties style:writing-mode="lr-tb"/>
    </style:style>
    <style:style style:name="gr10"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26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4.303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391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693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auto-grow-height="true" fo:min-height="3.405cm" loext:decorative="false"/>
      <style:paragraph-properties style:writing-mode="lr-tb"/>
    </style:style>
    <style:style style:name="pr7" style:family="presentation" style:parent-style-name="Default-outline1">
      <style:graphic-properties draw:textarea-horizontal-align="left" fo:min-height="8.884cm" loext:decorative="false"/>
      <style:paragraph-properties style:writing-mode="lr-tb"/>
    </style:style>
    <style:style style:name="co1" style:family="table-column">
      <style:table-column-properties style:column-width="7.516cm" style:use-optimal-column-width="false"/>
    </style:style>
    <style:style style:name="co2" style:family="table-column">
      <style:table-column-properties style:column-width="15.341cm" style:use-optimal-column-width="false"/>
    </style:style>
    <style:style style:name="co3" style:family="table-column">
      <style:table-column-properties style:column-width="3.516cm" style:use-optimal-column-width="false"/>
    </style:style>
    <style:style style:name="co4" style:family="table-column">
      <style:table-column-properties style:column-width="23.464cm" style:use-optimal-column-width="false"/>
    </style:style>
    <style:style style:name="co5" style:family="table-column">
      <style:table-column-properties style:column-width="4.727cm" style:use-optimal-column-width="false"/>
    </style:style>
    <style:style style:name="co6" style:family="table-column">
      <style:table-column-properties style:column-width="19.378cm" style:use-optimal-column-width="false"/>
    </style:style>
    <style:style style:name="co7" style:family="table-column">
      <style:table-column-properties style:column-width="3.565cm" style:use-optimal-column-width="false"/>
    </style:style>
    <style:style style:name="co8" style:family="table-column">
      <style:table-column-properties style:column-width="3.927cm" style:use-optimal-column-width="false"/>
    </style:style>
    <style:style style:name="co9" style:family="table-column">
      <style:table-column-properties style:column-width="18.90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0.6cm" style:use-optimal-row-height="false"/>
    </style:style>
    <style:style style:name="ro4" style:family="table-row">
      <style:table-row-properties style:row-height="6.029cm" style:use-optimal-row-height="false"/>
    </style:style>
    <style:style style:name="ro5" style:family="table-row">
      <style:table-row-properties style:row-height="2.474cm" style:use-optimal-row-height="false"/>
    </style:style>
    <style:style style:name="ro6" style:family="table-row">
      <style:table-row-properties style:row-height="2.334cm" style:use-optimal-row-height="false"/>
    </style:style>
    <style:style style:name="ro7" style:family="table-row">
      <style:table-row-properties style:row-height="1.693cm" style:use-optimal-row-height="false"/>
    </style:style>
    <style:style style:name="ro8" style:family="table-row">
      <style:table-row-properties style:row-height="1.623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loext:graphic-properties draw:textarea-vertical-align="middle"/>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1"/>
    </style:style>
    <style:style style:name="ce6" style:family="table-cell">
      <loext:graphic-properties draw:textarea-vertical-align="middle"/>
      <style:paragraph-properties fo:border="0.28pt solid #ffffff" style:text-autospace="none"/>
      <style:text-properties fo:color="#ffffff" loext:opacity="100%" style:font-name="Liberation Sans1" fo:font-size="18pt" style:font-name-asian="AppleSystemUIFont" style:font-size-asian="18pt" style:font-name-complex="AppleSystemUIFont" style:font-size-complex="18pt"/>
    </style:style>
    <style:style style:name="ce7" style:family="table-cell">
      <loext:graphic-properties draw:textarea-vertical-align="middle"/>
      <style:paragraph-properties fo:border="0.28pt solid #ffffff" style:text-autospace="none"/>
      <style:text-properties fo:color="#ffffff" loext:opacity="100%" style:font-name="Liberation Sans1"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paragraph-properties fo:text-align="center"/>
      <style:text-properties fo:color="#ffffff" loext:opacity="100%" fo:font-size="18pt" style:font-size-asian="18pt" style:font-size-complex="18pt"/>
    </style:style>
    <style:style style:name="P14" style:family="paragraph">
      <style:paragraph-properties style:text-autospace="none"/>
      <style:text-properties fo:color="#ffffff" loext:opacity="100%" fo:font-size="18pt" style:font-size-asian="18pt" style:font-size-complex="18pt"/>
    </style:style>
    <style:style style:name="P15" style:family="paragraph">
      <style:text-properties fo:font-style="italic" style:font-style-asian="italic" style:font-style-complex="italic"/>
    </style:style>
    <style:style style:name="P16" style:family="paragraph">
      <loext:graphic-properties draw:fill="solid" draw:fill-color="#202020"/>
      <style:text-properties style:font-name="Liberation Mono" fo:font-size="12pt" style:font-size-asian="12pt" style:font-size-complex="12pt"/>
    </style:style>
    <style:style style:name="P17" style:family="paragraph">
      <loext:graphic-properties draw:fill="none" draw:fill-color="#ffffff"/>
      <style:paragraph-properties fo:text-align="center"/>
      <style:text-properties style:font-name="CaskaydiaCove NFM" fo:font-size="12pt" style:font-size-asian="12pt" style:font-size-complex="12pt"/>
    </style:style>
    <style:style style:name="P18" style:family="paragraph">
      <style:paragraph-properties fo:margin-left="0cm" fo:margin-right="0cm" fo:margin-top="0cm" fo:margin-bottom="0cm" fo:line-height="100%" fo:text-indent="0cm"/>
    </style:style>
    <style:style style:name="P19" style:family="paragraph">
      <style:paragraph-properties fo:text-align="center"/>
      <style:text-properties fo:color="#ffffff" loext:opacity="100%" style:font-name="Liberation Sans1"/>
    </style:style>
    <style:style style:name="P20" style:family="paragraph">
      <style:paragraph-properties style:text-autospace="none"/>
      <style:text-properties fo:color="#ffffff" loext:opacity="100%" style:font-name="Liberation Sans1" fo:font-size="18pt" style:font-name-asian="AppleSystemUIFont" style:font-size-asian="18pt" style:font-name-complex="AppleSystemUIFont" style:font-size-complex="18pt"/>
    </style:style>
    <style:style style:name="P21" style:family="paragraph">
      <style:paragraph-properties style:text-autospace="none"/>
      <style:text-properties fo:color="#ffffff" loext:opacity="100%" style:font-name="Liberation Sans1" fo:font-size="18pt" style:font-size-asian="18pt" style:font-size-complex="18pt"/>
    </style:style>
    <style:style style:name="P22" style:family="paragraph">
      <style:paragraph-properties fo:margin-top="0.5cm" fo:margin-bottom="0cm" fo:text-align="left"/>
    </style:style>
    <style:style style:name="P23" style:family="paragraph">
      <style:text-properties fo:color="#ffffff" loext:opacity="100%"/>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AppleSystemUIFont" fo:font-size="24pt" fo:font-style="normal" fo:text-shadow="none" style:text-underline-style="none" fo:font-weight="normal" style:letter-kerning="true" fo:background-color="transparent" style:font-name-asian="AppleSystemUIFont" style:font-size-asian="24pt" style:font-style-asian="normal" style:font-weight-asian="normal" style:font-name-complex="AppleSystemUIFont" style:font-size-complex="24pt" style:font-style-complex="normal" style:font-weight-complex="normal" style:text-emphasize="none" style:font-relief="none" style:text-overline-style="none" style:text-overline-color="font-color"/>
    </style:style>
    <style:style style:name="T15" style:family="text">
      <style:text-properties fo:color="#ffffff" loext:opacity="100%"/>
    </style:style>
    <style:style style:name="T16"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color="#ffffff" loext:opacity="100%" fo:font-size="18pt" style:font-size-asian="18pt" style:font-size-complex="18pt"/>
    </style:style>
    <style:style style:name="T19" style:family="text">
      <style:text-properties fo:color="#ffffff" loext:opacity="100%" style:font-name="AppleSystemUIFont" fo:font-size="18pt" style:font-name-asian="AppleSystemUIFont" style:font-size-asian="18pt" style:font-name-complex="AppleSystemUIFont" style:font-size-complex="18pt"/>
    </style:style>
    <style:style style:name="T20" style:family="text">
      <style:text-properties fo:color="#ffffff" loext:opacity="100%" style:text-line-through-style="none" style:text-line-through-type="none" fo:font-size="18pt" style:font-size-asian="18pt" style:font-size-complex="18pt"/>
    </style:style>
    <style:style style:name="T21" style:family="text">
      <style:text-properties fo:color="#ffffff" loext:opacity="100%" style:text-line-through-style="none" style:text-line-through-type="none" style:font-name="AppleSystemUIFont" fo:font-size="18pt" style:font-name-asian="AppleSystemUIFont" style:font-size-asian="18pt" style:font-name-complex="AppleSystemUIFont" style:font-size-complex="18pt"/>
    </style:style>
    <style:style style:name="T22" style:family="text">
      <style:text-properties style:use-window-font-color="true" loext:opacity="0%" style:font-name="Liberation Mono" fo:font-size="12pt" fo:language="zxx" fo:country="none" fo:font-style="normal" style:text-underline-style="none" fo:font-weight="normal" fo:background-color="transparent" style:font-size-asian="12pt" style:font-size-complex="12pt"/>
    </style:style>
    <style:style style:name="T23" style:family="text">
      <style:text-properties style:font-name="CaskaydiaCove NFM" fo:font-size="12pt" style:font-size-asian="12pt" style:font-size-complex="12pt"/>
    </style:style>
    <style:style style:name="T24" style:family="text">
      <style:text-properties fo:color="#d0d0d0" loext:opacity="100%" style:font-name="Liberation Mono" fo:font-size="12pt" fo:language="zxx" fo:country="none" fo:font-style="normal" style:text-underline-style="none" fo:font-weight="normal" fo:background-color="transparent" style:font-size-asian="12pt" style:font-size-complex="12pt"/>
    </style:style>
    <style:style style:name="T25" style:family="text">
      <style:text-properties fo:color="#666666" loext:opacity="100%" style:font-name="Liberation Mono" fo:font-size="12pt" fo:language="zxx" fo:country="none" fo:font-style="normal" style:text-underline-style="none" fo:font-weight="normal" fo:background-color="transparent" style:font-size-asian="12pt" style:font-size-complex="12pt"/>
    </style:style>
    <style:style style:name="T26" style:family="text">
      <style:text-properties fo:color="#6ebf26" loext:opacity="100%" style:font-name="Liberation Mono" fo:font-size="12pt" fo:language="zxx" fo:country="none" fo:font-style="normal" style:text-underline-style="none" fo:font-weight="bold" fo:background-color="transparent" style:font-size-asian="12pt" style:font-size-complex="12pt"/>
    </style:style>
    <style:style style:name="T27" style:family="text">
      <style:text-properties fo:color="#51b2fd" loext:opacity="100%" style:font-name="Liberation Mono" fo:font-size="12pt" fo:language="zxx" fo:country="none" fo:font-style="normal" style:text-underline-style="none" fo:font-weight="normal" fo:background-color="transparent" style:font-size-asian="12pt" style:font-size-complex="12pt"/>
    </style:style>
    <style:style style:name="T28" style:family="text">
      <style:text-properties style:font-name="CaskaydiaCove NFM" fo:font-size="12pt" fo:font-style="italic" style:font-size-asian="12pt" style:font-style-asian="italic" style:font-size-complex="12pt" style:font-style-complex="italic"/>
    </style:style>
    <style:style style:name="T29"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Liberation Mono"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6ebf26" loext:opacity="100%" style:text-outline="false" style:text-line-through-style="none" style:text-line-through-type="none" style:font-name="Liberation Mono"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 style:family="text">
      <style:text-properties fo:color="#ffffff" loext:opacity="100%" style:font-name="Liberation Mono" fo:font-size="12pt" fo:language="zxx" fo:country="none" fo:font-style="normal" style:text-underline-style="none" fo:font-weight="normal" fo:background-color="transparent" style:font-size-asian="12pt" style:font-size-complex="12pt"/>
    </style:style>
    <style:style style:name="T33" style:family="text">
      <style:text-properties fo:color="#ffffff" loext:opacity="100%" style:font-name="Liberation Sans1"/>
    </style:style>
    <style:style style:name="T34"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loext:opacity="100%" style:text-outline="false" style:text-line-through-style="none" style:text-line-through-type="none" style:font-name="Liberation Sans1" fo:font-size="18pt" fo:font-style="italic" fo:text-shadow="none" style:text-underline-style="none" fo:font-weight="normal" style:letter-kerning="true" fo:background-color="transparent" style:font-name-asian="AppleSystemUIFont" style:font-size-asian="18pt" style:font-style-asian="italic" style:font-weight-asian="normal" style:font-name-complex="AppleSystemUIFont" style:font-size-complex="18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text-position="super 58%"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7" style:family="text">
      <style:text-properties fo:color="#ffffff" loext:opacity="100%" style:font-name="Liberation Sans1" fo:font-size="18pt" style:letter-kerning="true" style:font-name-asian="AppleSystemUIFont" style:font-size-asian="18pt" style:font-name-complex="AppleSystemUIFont" style:font-size-complex="18pt"/>
    </style:style>
    <style:style style:name="T38" style:family="text">
      <style:text-properties fo:color="#ffffff" loext:opacity="100%" style:font-name="Liberation Sans1" fo:font-size="18pt" fo:font-style="italic" style:letter-kerning="true" style:font-name-asian="AppleSystemUIFont" style:font-size-asian="18pt" style:font-style-asian="italic" style:font-name-complex="AppleSystemUIFont" style:font-size-complex="18pt" style:font-style-complex="italic"/>
    </style:style>
    <style:style style:name="T39" style:family="text">
      <style:text-properties fo:font-variant="normal" fo:text-transform="none" fo:color="#ffffff" loext:opacity="10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Liberation Mono"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model outputs. Apply assertions pertaining to the values of model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model constants in <text:span text:style-name="T1">spel-constants0001.nc</text:span> and the process of analyzing the resulting values in <text:span text:style-name="T1">fut-outputs0001.nc</text:span></text:p>
              </text:list-item>
              <text:list-item>
                <text:p>Both the process of choosing values for each model constant and the process of analyzing the resulting model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7" draw:layer="layout" svg:width="27.999cm" svg:height="15.748cm" svg:x="0.001cm" svg:y="0.002cm">
          <draw:image xlink:href="Pictures/10000000000007800000043841A02BE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Model 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28 <text:span text:style-name="T4">model</text:span> <text:span text:style-name="T13">constants</text:span><text:span text:style-name="T7"> c</text:span>ontrol how the model behaves and manipulates data.</text:p>
                <text:list>
                  <text:list-item>
                    <text:p text:style-name="P10">We don’t yet support modification of the 3 array constants. Of the 25 scalar constants we experiment with, 8 have no observable effect on the outputs. </text:p>
                  </text:list-item>
                </text:list>
              </text:list-item>
              <text:list-item>
                <text:p text:style-name="P9">25 <text:span text:style-name="T4">model</text:span> <text:span text:style-name="T4">inputs</text:span> provide starting data for the model.</text:p>
              </text:list-item>
              <text:list-item>
                <text:p text:style-name="P9">9 <text:span text:style-name="T4">model</text:span> <text:span text:style-name="T4">outputs</text:span> record data that the model has generated.</text:p>
              </text:list-item>
              <text:list-item>
                <text:p text:style-name="P9"><text:span text:style-name="T14">Additional 8 variables serve as both model inputs and output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est Inputs: Model Constants (28)</text:p>
          </draw:text-box>
        </draw:frame>
        <draw:frame draw:style-name="gr8" draw:layer="layout" svg:width="22.856cm" svg:height="5.043cm" svg:x="2.216cm" svg:y="3.95cm">
          <table:table table:template-name="default" table:use-first-row-styles="true" table:use-banding-rows-styles="true">
            <table:table-column table:style-name="co1"/>
            <table:table-column table:style-name="co2"/>
            <table:table-row table:style-name="ro1">
              <table:table-cell table:style-name="ce1">
                <text:p text:style-name="P11"><text:span text:style-name="T15">Array Constants (3)</text:span></text:p>
              </table:table-cell>
              <table:table-cell table:style-name="ce2">
                <text:p text:style-name="P12"><text:span text:style-name="T15">crop, iscft, percrop</text:span></text:p>
              </table:table-cell>
            </table:table-row>
            <table:table-row table:style-name="ro2">
              <table:table-cell table:style-name="ce1">
                <text:p text:style-name="P11"><text:span text:style-name="T15">Scalar Constants with Observable Outputs (17)</text:span></text:p>
              </table:table-cell>
              <table:table-cell table:style-name="ce2">
                <text:p text:style-name="P12"><text:span text:style-name="T15">betavis, cnfac, cpliq, denh2o, dtime_mod, grav, hfus, lake_no_ed, lakepuddling, nlevgrnd, nlevlak, nlevsno, nlevsoi, thk_bedrock, tkwat, use_lch4, vkc</text:span></text:p>
              </table:table-cell>
            </table:table-row>
            <table:table-row table:style-name="ro3">
              <table:table-cell table:style-name="ce1">
                <text:p text:style-name="P11"><text:span text:style-name="T15">Scalar Constants without Observable Outputs (8)</text:span></text:p>
              </table:table-cell>
              <table:table-cell table:style-name="ce2">
                <text:p text:style-name="P12"><text:span text:style-name="T16">cpice, denice, depthcrit, </text:span><text:span text:style-name="T17">iulog, </text:span><text:span text:style-name="T15">mixfact, pudz, tkair, tkice</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8" draw:layer="layout" svg:width="26.979cm" svg:height="10.976cm" svg:x="0.532cm" svg:y="3.311cm">
          <table:table table:template-name="default" table:use-first-row-styles="true" table:use-banding-rows-styles="true">
            <table:table-column table:style-name="co3"/>
            <table:table-column table:style-name="co4"/>
            <table:table-row table:style-name="ro4">
              <table:table-cell table:style-name="ce3">
                <text:p text:style-name="P13"><text:span text:style-name="T18">Model Inputs</text:span></text:p>
                <text:p text:style-name="P13"><text:span text:style-name="T18">Only (25)</text:span></text:p>
              </table:table-cell>
              <table:table-cell table:style-name="ce4">
                <text:p text:style-name="P14"><text:span text:style-name="T17">col_es%t_grnd</text:span><text:span text:style-name="T18">, </text:span><text:span text:style-name="T17">col_pp%dz</text:span><text:span text:style-name="T18">, </text:span><text:span text:style-name="T17">col_pp%dz_lake</text:span><text:span text:style-name="T18">, </text:span><text:span text:style-name="T17">col_pp%z</text:span><text:span text:style-name="T18">, </text:span><text:span text:style-name="T17">col_pp%z_lake</text:span><text:span text:style-name="T18">, </text:span><text:span text:style-name="T17">col_pp%zi</text:span><text:span text:style-name="T18">, </text:span><text:span text:style-name="T17">col_pp&amp;lakedepth</text:span><text:span text:style-name="T18">, </text:span><text:span text:style-name="T17">col_pp&amp;snl</text:span><text:span text:style-name="T18">, </text:span><text:span text:style-name="T17">col_ws%h2osno</text:span><text:span text:style-name="T18">, </text:span><text:span text:style-name="T17">col_ws%h2osoi_ice</text:span><text:span text:style-name="T18">, </text:span><text:span text:style-name="T17">col_ws%h2osoi_liq, lakestate_vars%etal_col</text:span><text:span text:style-name="T18">, </text:span><text:span text:style-name="T17">lakestate_vars%ks_col</text:span><text:span text:style-name="T18">, </text:span><text:span text:style-name="T17">lakestate_vars%lake_raw_col</text:span><text:span text:style-name="T18">, </text:span><text:span text:style-name="T17">lakestate_vars%ws_col</text:span><text:span text:style-name="T18">, </text:span><text:span text:style-name="T17">soilstate_vars%csol_col</text:span><text:span text:style-name="T18">, soilstate_vars%tkmg_col, soilstate_vars%tksatu_col, soilstate_vars%watsat_col, solarabs_vars%fsds_nir_d_patch, solarabs_vars%fsds_nir_i_patch, solarabs_vars%fsr_nir_d_patch, solarabs_vars%fsr_nir_i_patch, solarabs_vars%sabg_lyr_patch, </text:span><text:span text:style-name="T19">solarabs_vars%sabg_patch</text:span></text:p>
              </table:table-cell>
            </table:table-row>
            <table:table-row table:style-name="ro5">
              <table:table-cell table:style-name="ce3">
                <text:p text:style-name="P13"><text:span text:style-name="T18"><text:s/>Model Inputs/ Outputs (8)</text:span></text:p>
              </table:table-cell>
              <table:table-cell table:style-name="ce4">
                <text:p text:style-name="P14"><text:span text:style-name="T18">col_es%t_lake, col_es%t_soisno, lakestate_vars%lake_icefrac_col, lakestate_vars%lake_icethick_col, veg_ef%eflx_gnet,</text:span></text:p>
                <text:p text:style-name="P14"><text:span text:style-name="T18">veg_ef%eflx_sh_grnd, veg_ef%eflx_sh_tot, </text:span><text:span text:style-name="T19">veg_ef%eflx_soil_grnd</text:span></text:p>
              </table:table-cell>
            </table:table-row>
            <table:table-row table:style-name="ro5">
              <table:table-cell table:style-name="ce3">
                <text:p text:style-name="P13"><text:span text:style-name="T18">Model Outputs Only (9)</text:span></text:p>
              </table:table-cell>
              <table:table-cell table:style-name="ce4">
                <text:p text:style-name="P14"><text:span text:style-name="T18">ch4_vars%grnd_ch4_cond_col, col_ef%errsoi, col_es%hc_soi, col_es%hc_soisno, col_wf%qflx_snofrz, col_ws%frac_iceold, lakestate_vars%betaprime_col, </text:span><text:span text:style-name="T20">lakestate_vars%lakeresist_col, </text:span><text:span text:style-name="T21">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est Outputs: Model Inputs &amp; Outputs (42)</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9" draw:text-style-name="P16" draw:layer="layout" svg:width="6.683cm" svg:height="10.499cm" svg:x="20.293cm" svg:y="2.574cm">
          <draw:text-box>
            <text:p><text:span text:style-name="T22">netcdf x_times_y {</text:span></text:p>
            <text:p><text:span text:style-name="T22">dimensions:</text:span></text:p>
            <text:p><text:span text:style-name="T22"><text:s text:c="8"/>x = 5 ;</text:span></text:p>
            <text:p><text:span text:style-name="T22"><text:s text:c="8"/>y = 5 ;</text:span></text:p>
            <text:p><text:span text:style-name="T22">variables:</text:span></text:p>
            <text:p><text:span text:style-name="T22"><text:s text:c="8"/>float x(x) ;</text:span></text:p>
            <text:p><text:span text:style-name="T22"><text:s text:c="8"/>float y(y) ;</text:span></text:p>
            <text:p><text:span text:style-name="T22"><text:s text:c="8"/>float z(x, y) ;</text:span></text:p>
            <text:p><text:span text:style-name="T22">data:</text:span></text:p>
            <text:p><text:span text:style-name="T22"/></text:p>
            <text:p><text:span text:style-name="T22"><text:s/>x = -2, -1, 0, 1, 2 ;</text:span></text:p>
            <text:p><text:span text:style-name="T22"/></text:p>
            <text:p><text:span text:style-name="T22"><text:s/>y = -4, -2, 0, 2, 4 ;</text:span></text:p>
            <text:p><text:span text:style-name="T22"/></text:p>
            <text:p><text:span text:style-name="T22"><text:s/>z =</text:span></text:p>
            <text:p><text:span text:style-name="T22"><text:s text:c="2"/>8, 4, -0, -4, -8,</text:span></text:p>
            <text:p><text:span text:style-name="T22"><text:s text:c="2"/>4, 2, -0, -2, -4,</text:span></text:p>
            <text:p><text:span text:style-name="T22"><text:s text:c="2"/>-0, -0, 0, 0, 0,</text:span></text:p>
            <text:p><text:span text:style-name="T22"><text:s text:c="2"/>-4, -2, 0, 2, 4,</text:span></text:p>
            <text:p><text:span text:style-name="T22"><text:s text:c="2"/>-8, -4, 0, 4, 8 ;</text:span></text:p>
            <text:p><text:span text:style-name="T22">}</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model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0" draw:text-style-name="P16" draw:layer="layout" svg:width="6.185cm" svg:height="7.515cm" svg:x="4.328cm" svg:y="5.658cm">
          <draw:text-box>
            <text:p><text:span text:style-name="T22">betavis</text:span></text:p>
            <text:p><text:span text:style-name="T22">0.0</text:span></text:p>
            <text:p><text:span text:style-name="T22">za_lake</text:span></text:p>
            <text:p><text:span text:style-name="T22">0.6</text:span></text:p>
            <text:p><text:span text:style-name="T22">n2min</text:span></text:p>
            <text:p><text:span text:style-name="T22">7.4999999999999993E-005</text:span></text:p>
            <text:p><text:span text:style-name="T22">tdmax</text:span></text:p>
            <text:p><text:span text:style-name="T22">277.0</text:span></text:p>
            <text:p><text:span text:style-name="T22">pudz</text:span></text:p>
            <text:p><text:span text:style-name="T22">0.0</text:span></text:p>
            <text:p><text:span text:style-name="T22">mixfact</text:span></text:p>
            <text:p><text:span text:style-name="T22">10.0</text:span></text:p>
            <text:p><text:span text:style-name="T22">depthcrit</text:span></text:p>
            <text:p><text:span text:style-name="T22">25.0</text:span></text:p>
          </draw:text-box>
        </draw:frame>
        <draw:frame draw:style-name="gr11" draw:text-style-name="P17" draw:layer="layout" svg:width="12.393cm" svg:height="0.818cm" svg:x="1.401cm" svg:y="4.84cm">
          <draw:text-box>
            <text:p text:style-name="P7"><text:span text:style-name="T23">Model Constants (formerly lakeparams.txt)</text:span></text:p>
          </draw:text-box>
        </draw:frame>
        <draw:frame draw:style-name="gr12" draw:text-style-name="P16" draw:layer="layout" svg:width="9.526cm" svg:height="4.553cm" svg:x="15.718cm" svg:y="5.659cm">
          <draw:text-box>
            <text:p><text:span text:style-name="T24">{</text:span></text:p>
            <text:p><text:span text:style-name="T25"><text:s text:c="2"/></text:span><text:span text:style-name="T26">"betavis"</text:span><text:span text:style-name="T24">:</text:span><text:span text:style-name="T25"> </text:span><text:span text:style-name="T27">0.0</text:span><text:span text:style-name="T24">,</text:span></text:p>
            <text:p><text:span text:style-name="T25"><text:s text:c="2"/></text:span><text:span text:style-name="T26">"za_lake"</text:span><text:span text:style-name="T24">:</text:span><text:span text:style-name="T25"> </text:span><text:span text:style-name="T27">0.6</text:span><text:span text:style-name="T24">,</text:span></text:p>
            <text:p><text:span text:style-name="T25"><text:s text:c="2"/></text:span><text:span text:style-name="T26">"n2min"</text:span><text:span text:style-name="T24">:</text:span><text:span text:style-name="T25"> </text:span><text:span text:style-name="T27">7.4999999999999993E-005</text:span><text:span text:style-name="T24">,</text:span></text:p>
            <text:p><text:span text:style-name="T25"><text:s text:c="2"/></text:span><text:span text:style-name="T26">"tdmax"</text:span><text:span text:style-name="T24">:</text:span><text:span text:style-name="T25"> </text:span><text:span text:style-name="T27">277.0</text:span><text:span text:style-name="T24">,</text:span></text:p>
            <text:p><text:span text:style-name="T25"><text:s text:c="2"/></text:span><text:span text:style-name="T26">"pudz"</text:span><text:span text:style-name="T24">:</text:span><text:span text:style-name="T25"> </text:span><text:span text:style-name="T27">0.0</text:span><text:span text:style-name="T24">,</text:span></text:p>
            <text:p><text:span text:style-name="T25"><text:s text:c="2"/></text:span><text:span text:style-name="T26">"mixfact"</text:span><text:span text:style-name="T24">:</text:span><text:span text:style-name="T25"> </text:span><text:span text:style-name="T27">10.0</text:span><text:span text:style-name="T24">,</text:span></text:p>
            <text:p><text:span text:style-name="T25"><text:s text:c="2"/></text:span><text:span text:style-name="T26">"depthcrit"</text:span><text:span text:style-name="T24">:</text:span><text:span text:style-name="T25"> </text:span><text:span text:style-name="T27">25.0</text:span></text:p>
            <text:p><text:span text:style-name="T24">}</text:span></text:p>
          </draw:text-box>
        </draw:frame>
        <draw:frame draw:style-name="gr11" draw:text-style-name="P17" draw:layer="layout" svg:width="12.393cm" svg:height="0.818cm" svg:x="14.206cm" svg:y="4.841cm">
          <draw:text-box>
            <text:p text:style-name="P7"><text:span text:style-name="T23">Example Sample (</text:span><text:span text:style-name="T28">JSON</text:span><text:span text:style-name="T23">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8cm" svg:height="3.405cm" svg:x="0cm" svg:y="0.24cm" presentation:class="title" presentation:user-transformed="tru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model outputs from the <text:span text:style-name="T1">spel-outputs0001.nc</text:span> file in the form of multidimensional <text:span text:style-name="T1">numpy</text:span> arrays, which range from one to three dimensions. </text:p>
              </text:list-item>
            </text:list>
          </draw:text-box>
        </draw:frame>
        <draw:frame draw:style-name="gr13" draw:text-style-name="P16" draw:layer="layout" svg:width="10.692cm" svg:height="2.641cm" svg:x="8.65cm" svg:y="9.749cm">
          <draw:text-box>
            <text:p><text:span text:style-name="T24">{</text:span></text:p>
            <text:p><text:span text:style-name="T25"><text:s text:c="2"/></text:span><text:span text:style-name="T26">"veg_ef%eflx_soil_grnd"</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p>
            <text:p><text:span text:style-name="T25"><text:s text:c="2"/></text:span><text:span text:style-name="T26">"veg_ef%eflx_gnet"</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span text:style-name="T25"> </text:span><text:span text:style-name="T27">...</text:span><text:span text:style-name="T24">],</text:span></text:p>
            <text:p><text:span text:style-name="T25"><text:s text:c="2"/></text:span><text:span text:style-name="T27">...</text:span></text:p>
            <text:p><text:span text:style-name="T24">}</text:span></text:p>
          </draw:text-box>
        </draw:frame>
        <draw:frame draw:style-name="gr11" draw:text-style-name="P17" draw:layer="layout" svg:width="20.304cm" svg:height="0.818cm" svg:x="3.848cm" svg:y="8.931cm">
          <draw:text-box>
            <text:p text:style-name="P7"><text:span text:style-name="T23">Outputs Received by Analysis Plugins (</text:span><text:span text:style-name="T28">JSON</text:span><text:span text:style-name="T23">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9">Represent a grouping of </text:span>ordered samples</text:p>
                <text:list>
                  <text:list-item>
                    <text:p>When the program is run on each sample in a sample group, the model data is returned in the same order as the samples were in. </text:p>
                  </text:list-item>
                </text:list>
              </text:list-item>
              <text:list-item>
                <text:p>Having multiple sample groups is simply a convenient way of organizing similar samples.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g draw:style-name="gr3">
          <draw:frame draw:style-name="gr14" draw:text-style-name="P16" draw:layer="layout" svg:width="5.662cm" svg:height="6.943cm" svg:x="3.481cm" svg:y="4.873cm">
            <draw:text-box>
              <text:p><text:span text:style-name="T24">[</text:span></text:p>
              <text:p><text:span text:style-name="T24"><text:s text:c="2"/>{</text:span></text:p>
              <text:p><text:span text:style-name="T25"><text:s text:c="4"/></text:span><text:span text:style-name="T26">"betavis"</text:span><text:span text:style-name="T24">:</text:span><text:span text:style-name="T25"> </text:span><text:span text:style-name="T27">0.0</text:span><text:span text:style-name="T24">,</text:span></text:p>
              <text:p><text:span text:style-name="T24"><text:s text:c="4"/>...</text:span></text:p>
              <text:p><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25</text:span><text:span text:style-name="T24">,</text:span></text:p>
              <text:p text:style-name="P18"><text:span text:style-name="T24"><text:s text:c="4"/>...</text:span></text:p>
              <text:p text:style-name="P18"><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5</text:span><text:span text:style-name="T24">,</text:span></text:p>
              <text:p text:style-name="P18"><text:span text:style-name="T24"><text:s text:c="4"/>...</text:span></text:p>
              <text:p text:style-name="P18"><text:span text:style-name="T24"><text:s text:c="2"/>}</text:span></text:p>
              <text:p><text:span text:style-name="T24">]</text:span></text:p>
            </draw:text-box>
          </draw:frame>
          <draw:frame draw:style-name="gr11" draw:text-style-name="P17" draw:layer="layout" svg:width="12.393cm" svg:height="0.818cm" svg:x="0.359cm" svg:y="4.131cm">
            <draw:text-box>
              <text:p text:style-name="P7"><text:span text:style-name="T23">Sample Group Data (</text:span><text:span text:style-name="T28">JSON</text:span><text:span text:style-name="T23"> for illustration)</text:span></text:p>
            </draw:text-box>
          </draw:frame>
        </draw:g>
        <draw:g draw:style-name="gr3">
          <draw:frame draw:style-name="gr14" draw:text-style-name="P16" draw:layer="layout" svg:width="12.739cm" svg:height="6.943cm" svg:x="12.368cm" svg:y="4.839cm">
            <draw:text-box>
              <text:p><text:span text:style-name="T24">[</text:span></text:p>
              <text:p><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0</text:span><text:span text:style-name="T24">,</text:span><text:span text:style-name="T25"> </text:span><text:span text:style-name="T32">...</text:span><text:span text:style-name="T24">],</text:span></text:p>
              <text:p text:style-name="P18"><text:span text:style-name="T25"><text:s text:c="4"/></text:span><text:span text:style-name="T32">...</text:span></text:p>
              <text:p><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2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text:span text:style-name="T24">]</text:span></text:p>
            </draw:text-box>
          </draw:frame>
          <draw:frame draw:style-name="gr11" draw:text-style-name="P17" draw:layer="layout" svg:width="12.393cm" svg:height="0.818cm" svg:x="12.198cm" svg:y="4.097cm">
            <draw:text-box>
              <text:p text:style-name="P7"><text:span text:style-name="T23">Ordered Output Data (</text:span><text:span text:style-name="T28">JSON</text:span><text:span text:style-name="T23"> for illustration)</text:span></text:p>
            </draw:text-box>
          </draw:frame>
        </draw:g>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model constants, and analysis plugins view the model outputs.</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2" draw:text-style-name="P5" draw:layer="layout" svg:width="12.546cm" svg:height="7.292cm" svg:x="14.942cm" svg:y="6.72cm">
          <draw:image xlink:href="Pictures/100000010000016B000000D3685305CA.png" xlink:type="simple" xlink:show="embed" xlink:actuate="onLoad" draw:mime-type="image/png">
            <text:p/>
          </draw:image>
        </draw:frame>
        <draw:frame presentation:style-name="pr4" draw:layer="layout" svg:width="25.199cm" svg:height="2.629cm" svg:x="1.4cm" svg:y="0.628cm" presentation:class="title">
          <draw:text-box>
            <text:p>Sampling Plugin Overview</text:p>
          </draw:text-box>
        </draw:frame>
        <draw:frame presentation:style-name="pr5" draw:layer="layout" svg:width="25.112cm" svg:height="11.929cm" svg:x="1.571cm" svg:y="3.486cm" presentation:class="outline" presentation:user-transformed="true">
          <draw:text-box>
            <text:list text:style-name="L2">
              <text:list-item>
                <text:p>Sampling plugins define a subclass of <text:span text:style-name="T1">Sampler</text:span> and return one or more <text:span text:style-name="T1">SampleGroups</text:span>.</text:p>
              </text:list-item>
            </text:list>
          </draw:text-box>
        </draw:frame>
        <draw:frame draw:style-name="gr2" draw:text-style-name="P5" draw:layer="layout" svg:width="17.307cm" svg:height="2.974cm" svg:x="0.515cm" svg:y="6.72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Sampling Plugins (2)</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8" draw:layer="layout" svg:width="24.104cm" svg:height="4.667cm" svg:x="1.785cm" svg:y="5.515cm">
          <table:table table:template-name="default" table:use-first-row-styles="true" table:use-banding-rows-styles="true">
            <table:table-column table:style-name="co5"/>
            <table:table-column table:style-name="co6"/>
            <table:table-row table:style-name="ro6">
              <table:table-cell table:style-name="ce5">
                <text:p text:style-name="P19"><text:span text:style-name="T33">CSV Index Sampling</text:span></text:p>
              </table:table-cell>
              <table:table-cell table:style-name="ce6">
                <text:p text:style-name="P20"><text:span text:style-name="T34">Creates samples using </text:span><text:span text:style-name="T35">CSV</text:span><text:span text:style-name="T34"> files generated by </text:span><text:span text:style-name="T35">NIST</text:span><text:span text:style-name="T34">’s </text:span><text:span text:style-name="T35">ACTS</text:span><text:span text:style-name="T36">1</text:span><text:span text:style-name="T34"> tool by linearly interpolating between the values for each constant found in the ranges file</text:span></text:p>
              </table:table-cell>
            </table:table-row>
            <table:table-row table:style-name="ro6">
              <table:table-cell table:style-name="ce5">
                <text:p text:style-name="P19"><text:span text:style-name="T33">Order Sampling</text:span></text:p>
              </table:table-cell>
              <table:table-cell table:style-name="ce7">
                <text:p text:style-name="P21"><text:span text:style-name="T37">Generates Order(s). Each Order reads instructions from a </text:span><text:span text:style-name="T38">JSON</text:span><text:span text:style-name="T37"> file to generate samples using linear interpolation. Each Order will return one sample group.</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model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model outputs from each.</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2" draw:text-style-name="P5" draw:layer="layout" svg:width="20.022cm" svg:height="8.425cm" svg:x="5.389cm" svg:y="3.383cm">
          <draw:image xlink:href="Pictures/10000001000003420000015F665F5A35.png" xlink:type="simple" xlink:show="embed" xlink:actuate="onLoad" draw:mime-type="image/png">
            <text:p/>
          </draw:image>
        </draw:frame>
        <draw:frame presentation:style-name="pr4" draw:text-style-name="P7" draw:layer="layout" svg:width="25.199cm" svg:height="2.629cm" svg:x="1.4cm" svg:y="0.628cm" presentation:class="title">
          <draw:text-box>
            <text:p text:style-name="P7">Analysis Plugin Overview (Cont.)</text:p>
          </draw:text-box>
        </draw:frame>
        <draw:frame draw:style-name="gr2" draw:text-style-name="P5" draw:layer="layout" svg:width="8.74cm" svg:height="5.484cm" svg:x="0.789cm" svg:y="9.543cm">
          <draw:image xlink:href="Pictures/100000010000021A000001568880D7F2.png" xlink:type="simple" xlink:show="embed" xlink:actuate="onLoad" draw:mime-type="image/png">
            <text:p/>
          </draw:image>
        </draw:frame>
        <draw:frame draw:style-name="gr2" draw:text-style-name="P5" draw:layer="layout" svg:width="8.738cm" svg:height="5.385cm" svg:x="18.46cm" svg:y="9.641cm">
          <draw:image xlink:href="Pictures/100000010000022A0000015ACDD290C6.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Analysis Plugins (4)</text:p>
          </draw:text-box>
        </draw:frame>
        <draw:frame draw:style-name="gr8" draw:layer="layout" svg:width="26.399cm" svg:height="7.913cm" svg:x="0.727cm" svg:y="3.695cm">
          <table:table table:template-name="default" table:use-first-row-styles="true" table:use-banding-rows-styles="true">
            <table:table-column table:style-name="co7"/>
            <table:table-column table:style-name="co8"/>
            <table:table-column table:style-name="co9"/>
            <table:table-row table:style-name="ro7" table:default-cell-style-name="ce5">
              <table:table-cell table:number-rows-spanned="2">
                <text:p text:style-name="P19"><text:span text:style-name="T33">Per Sample Analyzers</text:span></text:p>
              </table:table-cell>
              <table:table-cell>
                <text:p text:style-name="P19"><text:span text:style-name="T33">Differences</text:span></text:p>
              </table:table-cell>
              <table:table-cell table:style-name="ce7">
                <text:p text:style-name="P21"><text:span text:style-name="T37">Finds differences between values in the reference data and the current sample’s data, recording the indices of the difference, the two differing values, and the difference between them</text:span></text:p>
              </table:table-cell>
            </table:table-row>
            <table:table-row table:style-name="ro6" table:default-cell-style-name="ce5">
              <table:covered-table-cell/>
              <table:table-cell>
                <text:p text:style-name="P19"><text:span text:style-name="T33">Fault Finding</text:span></text:p>
              </table:table-cell>
              <table:table-cell table:style-name="ce7">
                <text:p text:style-name="P21"><text:span text:style-name="T37">Uses functions defined by the plugin to make assertions about values in the sample data, similar to a unit testing framework but specialized to test model output values</text:span></text:p>
              </table:table-cell>
            </table:table-row>
            <table:table-row table:style-name="ro8" table:default-cell-style-name="ce5">
              <table:table-cell table:number-rows-spanned="2">
                <text:p text:style-name="P19"><text:span text:style-name="T33">Sample Group Analyzers</text:span></text:p>
              </table:table-cell>
              <table:table-cell>
                <text:p text:style-name="P19"><text:span text:style-name="T33">Change Detection</text:span></text:p>
              </table:table-cell>
              <table:table-cell table:style-name="ce7">
                <text:p text:style-name="P21"><text:span text:style-name="T37">Identifies which model inputs and outputs differ from the reference</text:span></text:p>
              </table:table-cell>
            </table:table-row>
            <table:table-row table:style-name="ro8" table:default-cell-style-name="ce5">
              <table:covered-table-cell/>
              <table:table-cell>
                <text:p text:style-name="P19"><text:span text:style-name="T33">NetCDF4 Output</text:span></text:p>
              </table:table-cell>
              <table:table-cell table:style-name="ce7">
                <text:p text:style-name="P21"><text:span text:style-name="T37">Stores each sample group as an individual </text:span><text:span text:style-name="T38">NetCDF</text:span><text:span text:style-name="T37"> file, to be used for graphing changes based on our samples</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Plugin Loader</text:p>
          </draw:text-box>
        </draw:frame>
        <draw:frame presentation:style-name="pr5" draw:layer="layout" svg:width="25.199cm" svg:height="1.364cm" svg:x="1.4cm" svg:y="3.685cm" presentation:class="outline" presentation:user-transformed="true">
          <draw:text-box>
            <text:list text:style-name="L2">
              <text:list-item>
                <text:p>Is an abstract class that loads whitelisted plugins</text:p>
              </text:list-item>
            </text:list>
          </draw:text-box>
        </draw:frame>
        <draw:g draw:style-name="gr3">
          <draw:frame draw:style-name="gr2" draw:text-style-name="P5" draw:layer="layout" svg:width="10.851cm" svg:height="7.25cm" svg:x="15.612cm" svg:y="7.122cm">
            <draw:image xlink:href="Pictures/10000001000001B80000012627B175B6.png" xlink:type="simple" xlink:show="embed" xlink:actuate="onLoad" draw:mime-type="image/png">
              <text:p/>
            </draw:image>
          </draw:frame>
          <draw:frame draw:style-name="gr11" draw:text-style-name="P17" draw:layer="layout" svg:width="7.732cm" svg:height="0.818cm" svg:x="17.142cm" svg:y="6.269cm">
            <draw:text-box>
              <text:p text:style-name="P7"><text:span text:style-name="T23">Example Whitelist</text:span></text:p>
            </draw:text-box>
          </draw:frame>
        </draw:g>
        <draw:frame draw:style-name="gr2" draw:text-style-name="P5" draw:layer="layout" svg:width="14.192cm" svg:height="7.983cm" svg:x="0.781cm" svg:y="6.388cm">
          <draw:image xlink:href="Pictures/1000000000000780000004387C4E1066.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r Loader</text:p>
          </draw:text-box>
        </draw:frame>
        <draw:frame presentation:style-name="pr5" draw:layer="layout" svg:width="17.893cm" svg:height="9.134cm" svg:x="1.4cm" svg:y="3.685cm" presentation:class="outline" presentation:user-transformed="true">
          <draw:text-box>
            <text:list text:style-name="L2">
              <text:list-item>
                <text:p text:style-name="P18">Defines a subclass of Plugin Loader</text:p>
              </text:list-item>
              <text:list-item>
                <text:p text:style-name="P18">Sampler Loader loads the whitelisted Sampling Plugins.</text:p>
              </text:list-item>
              <text:list-item>
                <text:p text:style-name="P18">It then returns the generated Sample Groups mapped to their names in a dictionary.</text:p>
              </text:list-item>
            </text:list>
          </draw:text-box>
        </draw:frame>
        <draw:frame draw:style-name="gr2" draw:text-style-name="P5" draw:layer="layout" svg:width="7.514cm" svg:height="11.171cm" svg:x="18.653cm" svg:y="3.685cm">
          <draw:image xlink:href="Pictures/10000001000003D6000005B4C5EAA634.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zer Loader</text:p>
          </draw:text-box>
        </draw:frame>
        <draw:frame presentation:style-name="pr5" draw:layer="layout" svg:width="25.199cm" svg:height="4.12cm" svg:x="1.4cm" svg:y="3.685cm" presentation:class="outline" presentation:user-transformed="true">
          <draw:text-box>
            <text:list text:style-name="L2">
              <text:list-item>
                <text:p text:style-name="P18">Defines a subclass of Plugin Loader</text:p>
              </text:list-item>
              <text:list-item>
                <text:p text:style-name="P18">Analyzer Loader instantiates the Analysis Plugins and gives the Analysis Plugins the model data they need.</text:p>
              </text:list-item>
            </text:list>
          </draw:text-box>
        </draw:frame>
        <draw:frame draw:style-name="gr2" draw:text-style-name="P5" draw:layer="layout" svg:width="8.856cm" svg:height="7.543cm" svg:x="3.071cm" svg:y="7.55cm">
          <draw:image xlink:href="Pictures/10000001000004D8000004205C952C64.png" xlink:type="simple" xlink:show="embed" xlink:actuate="onLoad" draw:mime-type="image/png">
            <text:p/>
          </draw:image>
        </draw:frame>
        <draw:frame draw:style-name="gr2" draw:text-style-name="P5" draw:layer="layout" svg:width="8.853cm" svg:height="7.311cm" svg:x="16.196cm" svg:y="7.759cm">
          <draw:image xlink:href="Pictures/10000001000004FA0000041C67358B57.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7" draw:text-style-name="P23" draw:layer="layout" svg:width="25.005cm" svg:height="6.165cm" svg:x="1.4cm" svg:y="4.535cm" presentation:class="outline" presentation:user-transformed="true">
          <draw:text-box>
            <text:list text:style-name="L2">
              <text:list-item>
                <text:p text:style-name="P22"><text:span text:style-name="T39">The </text:span><text:span text:style-name="T40">LakeTemperature</text:span><text:span text:style-name="T39"> Testing Software and its plugins are controlled by configuration files. </text:span></text:p>
              </text:list-item>
              <text:list-item>
                <text:p text:style-name="P22"><text:span text:style-name="T39">These files are loaded by different parts of the program and allow it to be adapted to different models and testing requirements. </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7" draw:text-style-name="P7" draw:layer="layout" svg:width="27.999cm" svg:height="15.748cm" svg:x="0cm" svg:y="0.002cm">
          <draw:image xlink:href="Pictures/1000000000000780000004389F37C5F6.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presentation:notes draw:style-name="dp2">
          <office:forms form:automatic-focus="false" form:apply-design-mode="false"/>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Use Case Diagram</text:p>
          </draw:text-box>
        </draw:frame>
        <draw:frame draw:style-name="gr2" draw:text-style-name="P5" draw:layer="layout" svg:width="10.001cm" svg:height="12.173cm" svg:x="8.984cm" svg:y="2.913cm">
          <draw:image xlink:href="Pictures/100000010000018C000001E2FF2FC24F.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3-24T12:50:11.633925000</dc:date>
    <meta:editing-duration>PT14H35M</meta:editing-duration>
    <meta:editing-cycles>76</meta:editing-cycles>
    <meta:print-date>2026-03-24T12:47:20.042500000</meta:print-date>
    <meta:printed-by>PDF files</meta:printed-by>
    <meta:document-statistic meta:object-count="161"/>
  </office:meta>
</office:document-meta>
</file>