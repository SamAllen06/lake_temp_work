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029cm" style:use-optimal-row-height="false"/>
    </style:style>
    <style:style style:name="ro5" style:family="table-row">
      <style:table-row-properties style:row-height="2.474cm" style:use-optimal-row-height="false"/>
    </style:style>
    <style:style style:name="ro6" style:family="table-row">
      <style:table-row-properties style:row-height="2.334cm" style:use-optimal-row-height="false"/>
    </style:style>
    <style:style style:name="ro7" style:family="table-row">
      <style:table-row-properties style:row-height="1.693cm" style:use-optimal-row-height="false"/>
    </style:style>
    <style:style style:name="ro8"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model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cm" presentation:class="title" presentation:user-transformed="true">
          <draw:text-box>
            <text:p>Test Inputs: Model Constants (28)</text:p>
          </draw:text-box>
        </draw:frame>
        <draw:frame draw:style-name="gr7"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text:span text:style-name="T15">crop, iscft, percrop</text:span></text:p>
              </table:table-cell>
            </table:table-row>
            <table:table-row table:style-name="ro2">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7" draw:layer="layout" svg:width="26.979cm" svg:height="10.976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5">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9"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0" draw:text-style-name="P17" draw:layer="layout" svg:width="12.393cm" svg:height="0.818cm" svg:x="1.401cm" svg:y="4.84cm">
          <draw:text-box>
            <text:p text:style-name="P7"><text:span text:style-name="T23">Model Constants (formerly lakeparams.txt)</text:span></text:p>
          </draw:text-box>
        </draw:frame>
        <draw:frame draw:style-name="gr11"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0"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0"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g draw:style-name="gr3">
          <draw:frame draw:style-name="gr13"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0"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3"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0"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4.667cm" svg:x="1.785cm" svg:y="5.515cm">
          <table:table table:template-name="default" table:use-first-row-styles="true" table:use-banding-rows-styles="true">
            <table:table-column table:style-name="co5"/>
            <table:table-column table:style-name="co6"/>
            <table:table-row table:style-name="ro6">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6">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Our Analysis Plugins (4)</text:p>
          </draw:text-box>
        </draw:frame>
        <draw:frame draw:style-name="gr7"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7"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6"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8"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8"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0"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2" draw:text-style-name="P5"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4-01T17:20:32.306381000</dc:date>
    <meta:editing-duration>PT14H35M7S</meta:editing-duration>
    <meta:editing-cycles>77</meta:editing-cycles>
    <meta:print-date>2026-03-24T12:47:20.042500000</meta:print-date>
    <meta:printed-by>PDF files</meta:printed-by>
    <meta:document-statistic meta:object-count="161"/>
  </office:meta>
</office:document-meta>
</file>