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21949E9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askaydiaCove NFM" svg:font-family="'CaskaydiaCove NFM'"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10.312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ch2_options="{'Style': 'native', 'Language': 'Text only',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0.492cm" loext:decorative="false"/>
      <style:paragraph-properties style:writing-mode="lr-tb"/>
    </style:style>
    <style:style style:name="gr6"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6.867cm" loext:decorative="false"/>
      <style:paragraph-properties style:writing-mode="lr-tb"/>
    </style:style>
    <style:style style:name="gr7"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2.602cm" loext:decorative="false"/>
      <style:paragraph-properties style:writing-mode="lr-tb"/>
    </style:style>
    <style:style style:name="gr8"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342cm" loext:decorative="false"/>
      <style:paragraph-properties style:writing-mode="lr-tb"/>
    </style:style>
    <style:style style:name="gr9" style:family="graphic" style:parent-style-name="standard">
      <style:graphic-properties ch2_options="{'Style': 'native', 'Language': 'JSON', 'UseCharStyles': False, 'LineNumberRatio': 100, 'LineNumberStart': 1, 'MasterCharStyle': '', 'ShowLineNumbers': 0, 'ColourizeBackground': 1, 'LineNumberSeparator': '  ', 'LineNumberPaddingSymbol': '', 'StoreOptionsWithSnippet': 1}" draw:stroke="none" svg:stroke-color="#000000" draw:fill="solid" draw:fill-color="#202020" draw:auto-grow-height="true" draw:auto-grow-width="false" fo:min-height="7.366cm" loext:decorative="false"/>
      <style:paragraph-properties style:writing-mode="lr-tb"/>
    </style:style>
    <style:style style:name="gr10" style:family="graphic" style:parent-style-name="standard">
      <style:graphic-properties svg:stroke-color="#34383a" draw:fill="solid" draw:fill-color="#34383a" draw:opacity="90%" draw:textarea-horizontal-align="justify" draw:textarea-vertical-align="middle" draw:auto-grow-height="false" fo:min-height="6.845cm" fo:min-width="17.629cm" loext:decorative="false"/>
    </style:style>
    <style:style style:name="gr11" style:family="graphic" style:parent-style-name="standard">
      <style:graphic-properties svg:stroke-color="#f46b2b" draw:fill="solid" draw:fill-color="#f46b2b" draw:opacity="90%" draw:textarea-horizontal-align="justify" draw:textarea-vertical-align="middle" draw:auto-grow-height="false" fo:min-height="1.894cm" fo:min-width="5.497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0.564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loext:graphic-properties draw:fill-color="#ffffff"/>
      <style:text-properties style:font-name="URW Bookman" fo:font-size="16pt" style:font-size-asian="16pt" style:font-size-complex="16pt"/>
    </style:style>
    <style:style style:name="P2" style:family="paragraph">
      <loext:graphic-properties draw:fill-color="#ffffff"/>
    </style:style>
    <style:style style:name="P3" style:family="paragraph">
      <style:paragraph-properties fo:margin-top="0.42cm" fo:margin-bottom="0.35cm" fo:text-align="start"/>
    </style:style>
    <style:style style:name="P4" style:family="paragraph">
      <style:text-properties fo:font-size="12pt" style:font-size-asian="12pt" style:font-size-complex="12pt"/>
    </style:style>
    <style:style style:name="P5" style:family="paragraph">
      <style:text-properties fo:font-style="italic" style:font-style-asian="italic" style:font-style-complex="italic"/>
    </style:style>
    <style:style style:name="P6" style:family="paragraph">
      <loext:graphic-properties draw:fill="solid" draw:fill-color="#202020"/>
      <style:text-properties style:font-name="CaskaydiaCove NFM" fo:font-size="12pt" style:font-size-asian="12pt" style:font-size-complex="12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none" draw:fill-color="#ffffff"/>
      <style:paragraph-properties fo:text-align="center"/>
      <style:text-properties style:font-name="CaskaydiaCove NFM" fo:font-size="12pt" style:font-size-asian="12pt" style:font-size-complex="12pt"/>
    </style:style>
    <style:style style:name="P10" style:family="paragraph">
      <style:paragraph-properties fo:margin-left="0cm" fo:margin-right="0cm" fo:margin-top="0cm" fo:margin-bottom="0cm" fo:line-height="100%" fo:text-indent="0cm"/>
    </style:style>
    <style:style style:name="P11" style:family="paragraph">
      <loext:graphic-properties draw:fill="solid" draw:fill-color="#34383a" draw:opacity="90%"/>
      <style:paragraph-properties fo:text-align="center"/>
    </style:style>
    <style:style style:name="P12" style:family="paragraph">
      <loext:graphic-properties draw:fill="solid" draw:fill-color="#f46b2b" draw:opacity="90%"/>
      <style:paragraph-properties fo:text-align="center"/>
    </style:style>
    <style:style style:name="T1" style:family="text">
      <style:text-properties style:font-name="Liberation Mono"/>
    </style:style>
    <style:style style:name="T2" style:family="text">
      <style:text-properties style:font-name="URW Bookman" fo:font-size="16pt" style:font-size-asian="16pt" style:font-size-complex="16pt"/>
    </style:style>
    <style:style style:name="T3" style:family="text">
      <style:text-properties style:use-window-font-color="true" loext:opacity="0%" fo:font-style="italic" fo:background-color="transparent" style:font-style-asian="italic" style:font-style-complex="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font-name="Liberation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ize="12pt" style:font-size-asian="12pt" style:font-size-complex="12pt"/>
    </style:style>
    <style:style style:name="T9" style:family="text">
      <style:text-properties fo:font-size="10pt" style:font-size-asian="10pt" style:font-size-complex="10pt"/>
    </style:style>
    <style:style style:name="T10" style:family="text">
      <style:text-properties style:use-window-font-color="true" loext:opacity="0%" style:font-name="CaskaydiaCove NFM" fo:font-size="12pt" fo:language="zxx" fo:country="none" fo:font-style="normal" style:text-underline-style="none" fo:font-weight="normal" fo:background-color="transparent" style:font-size-asian="12pt" style:font-size-complex="12pt"/>
    </style:style>
    <style:style style:name="T11" style:family="text">
      <style:text-properties style:font-name="CaskaydiaCove NFM" fo:font-size="12pt" style:font-size-asian="12pt" style:font-size-complex="12pt"/>
    </style:style>
    <style:style style:name="T12" style:family="text">
      <style:text-properties fo:color="#d0d0d0" loext:opacity="100%" style:font-name="CaskaydiaCove NFM" fo:font-size="12pt" fo:language="zxx" fo:country="none" fo:font-style="normal" style:text-underline-style="none" fo:font-weight="normal" fo:background-color="transparent" style:font-size-asian="12pt" style:font-size-complex="12pt"/>
    </style:style>
    <style:style style:name="T13" style:family="text">
      <style:text-properties fo:color="#666666" loext:opacity="100%" style:font-name="CaskaydiaCove NFM" fo:font-size="12pt" fo:language="zxx" fo:country="none" fo:font-style="normal" style:text-underline-style="none" fo:font-weight="normal" fo:background-color="transparent" style:font-size-asian="12pt" style:font-size-complex="12pt"/>
    </style:style>
    <style:style style:name="T14" style:family="text">
      <style:text-properties fo:color="#6ebf26" loext:opacity="100%" style:font-name="CaskaydiaCove NFM" fo:font-size="12pt" fo:language="zxx" fo:country="none" fo:font-style="normal" style:text-underline-style="none" fo:font-weight="bold" fo:background-color="transparent" style:font-size-asian="12pt" style:font-size-complex="12pt"/>
    </style:style>
    <style:style style:name="T15" style:family="text">
      <style:text-properties fo:color="#51b2fd" loext:opacity="100%" style:font-name="CaskaydiaCove NFM" fo:font-size="12pt" fo:language="zxx" fo:country="none" fo:font-style="normal" style:text-underline-style="none" fo:font-weight="normal" fo:background-color="transparent" style:font-size-asian="12pt" style:font-size-complex="12pt"/>
    </style:style>
    <style:style style:name="T16" style:family="text">
      <style:text-properties fo:font-variant="normal" fo:text-transform="none" fo:color="#666666" loext:opacity="100%" style:text-outline="false" style:text-line-through-style="none" style:text-line-through-type="none" style:font-name="CaskaydiaCove NFM" fo:font-size="12pt" fo:language="zxx" fo:country="none" fo:font-style="normal" fo:text-shadow="none" style:text-underline-style="none" fo:font-weight="normal"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6ebf26" loext:opacity="100%" style:text-outline="false" style:text-line-through-style="none" style:text-line-through-type="none" style:font-name="CaskaydiaCove NFM" fo:font-size="12pt" fo:language="zxx" fo:country="none" fo:font-style="normal" fo:text-shadow="none" style:text-underline-style="none" fo:font-weight="bold" style:letter-kerning="true" fo:background-color="transparent" style:font-name-asian="Nimbus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8" style:family="text">
      <style:text-properties fo:color="#ffffff" loext:opacity="100%" style:font-name="CaskaydiaCove NFM" fo:font-size="12pt" fo:language="zxx" fo:country="none" fo:font-style="normal" style:text-underline-style="none" fo:font-weight="normal"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5.671cm" presentation:class="title" presentation:user-transformed="true">
          <draw:text-box>
            <text:p><text:span text:style-name="T1">LakeTemperature</text:span> Testing Software</text:p>
          </draw:text-box>
        </draw:frame>
        <draw:frame presentation:style-name="pr2" draw:text-style-name="P1" draw:layer="layout" svg:width="25.199cm" svg:height="0.564cm" svg:x="1.4cm" svg:y="7.967cm" presentation:class="subtitle" presentation:user-transformed="true">
          <draw:text-box>
            <text:p><text:span text:style-name="T2">Slides by Aidan Bensch</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Background</text:p>
          </draw:text-box>
        </draw:frame>
        <draw:frame presentation:style-name="pr5" draw:layer="layout" svg:width="25.199cm" svg:height="9.134cm" svg:x="1.4cm" svg:y="3.685cm" presentation:class="outline" presentation:user-transformed="true">
          <draw:text-box>
            <text:list text:style-name="L2">
              <text:list-item>
                <text:p>We are testing a module of <text:span text:style-name="T3"><text:a xlink:href="https://e3sm.org/" xlink:type="simple">E3SM</text:a></text:span><text:span text:style-name="T4">,</text:span><text:span text:style-name="T5">1</text:span> an environmental model. This module, <text:span text:style-name="T6">LakeTemperature</text:span><text:span text:style-name="T7">,</text:span> is part of the greater <text:span text:style-name="T4">ELM</text:span> <text:span text:style-name="T7">(</text:span><text:span text:style-name="T4">E3SM </text:span><text:span text:style-name="T7">Land Model)</text:span> which was originally a fork of the <text:span text:style-name="T4">CLM </text:span><text:span text:style-name="T7">(Community Land Model)</text:span><text:span text:style-name="T4">.</text:span></text:p>
              </text:list-item>
              <text:list-item>
                <text:p>We are able to test specifically this module using <text:span text:style-name="T3"><text:a xlink:href="https://github.com/peterdschwartz/SPEL_OpenACC" xlink:type="simple">SPEL</text:a></text:span><text:span text:style-name="T4">,</text:span><text:span text:style-name="T5">2</text:span> a software that adds a <text:span text:style-name="T4">NetCDF</text:span><text:span text:style-name="T5">3</text:span> interface for the constants, inputs, and outputs of a module of <text:span text:style-name="T4">E3SM</text:span> and compiles that specific part of the model. The executable produced by this is named <text:span text:style-name="T1">elmtest.exe</text:span>.</text:p>
              </text:list-item>
            </text:list>
          </draw:text-box>
        </draw:frame>
        <draw:frame presentation:style-name="pr5" draw:text-style-name="P4" draw:layer="layout" svg:width="25.199cm" svg:height="2.28cm" svg:x="1.4cm" svg:y="12.819cm" presentation:class="outline" presentation:user-transformed="true">
          <draw:text-box>
            <text:list text:style-name="L2">
              <text:list-header>
                <text:p text:style-name="P3"><text:span text:style-name="T8">1. “E3SM - Energy Exascale Earth System Model,” E3SM - Energy Exascale Earth System Model, Nov. 18, 2025. </text:span><text:span text:style-name="T8">https://e3sm.org/ (accessed Feb. 03, 2026).</text:span></text:p>
                <text:p text:style-name="P3"><text:span text:style-name="T8">2. peterdschwartz, “GitHub - peterdschwartz/SPEL_OpenACC: Python tool designed for E3SM Land Model to create </text:span><text:span text:style-name="T8">unit-tests and code-insertion of GPU compiler directives.,” GitHub, 2025. </text:span><text:span text:style-name="T8">https://github.com/peterdschwartz/SPEL_OpenACC (accessed Feb. 03, 2026).</text:span></text:p>
                <text:p text:style-name="P3"><text:span text:style-name="T9">3. “Unidata | NetCDF,” Ucar.edu, 2023. https://www.unidata.ucar.edu/software/netcdf</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Project Goals</text:p>
          </draw:text-box>
        </draw:frame>
        <draw:frame presentation:style-name="pr5" draw:layer="layout" svg:width="25.199cm" svg:height="9.134cm" svg:x="1.4cm" svg:y="3.685cm" presentation:class="outline">
          <draw:text-box>
            <text:list text:style-name="L2">
              <text:list-item>
                <text:p>Develop a software that can systematically change the constants used in the <text:span text:style-name="T1">LakeTemperature</text:span> model and allow us to visualize and observe patterns in how this affects its output</text:p>
              </text:list-item>
              <text:list-item>
                <text:p>Apply testing techniques to try and find values for constants that will cause physically impossible or otherwise erroneous outputs. Apply assertions pertaining to the values of constants, inputs, and outputs based around physical laws and other constraints provided by domain scientis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Our Testing Solution</text:p>
          </draw:text-box>
        </draw:frame>
        <draw:frame presentation:style-name="pr5" draw:layer="layout" svg:width="25.199cm" svg:height="9.134cm" svg:x="1.4cm" svg:y="3.685cm" presentation:class="outline" presentation:user-transformed="true">
          <draw:text-box>
            <text:list text:style-name="L2">
              <text:list-item>
                <text:p>Automates the process of modifying constants in <text:span text:style-name="T1">spel-constants0001.nc</text:span> and the process of analyzing the resulting values in <text:span text:style-name="T1">fut-outputs0001.nc</text:span></text:p>
              </text:list-item>
              <text:list-item>
                <text:p>Both the process of choosing values for each constant and the process of analyzing the resulting outputs is extendable through sampling plugins and analysis plugins respectivel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Constants, Inputs, and Outputs</text:p>
          </draw:text-box>
        </draw:frame>
        <draw:frame presentation:style-name="pr5" draw:layer="layout" svg:width="25.199cm" svg:height="9.134cm" svg:x="1.4cm" svg:y="3.685cm" presentation:class="outline">
          <draw:text-box>
            <text:list text:style-name="L2">
              <text:list-item>
                <text:p>Constants control how the model behaves and manipulates data.</text:p>
              </text:list-item>
              <text:list-item>
                <text:p>Inputs provide starting data for the model.</text:p>
              </text:list-item>
              <text:list-item>
                <text:p>Outputs include data that the model has generated.</text:p>
              </text:list-item>
              <text:list-item>
                <text:p>A variable can be both an input and an output in some instances.</text:p>
              </text:list-item>
              <text:list-item>
                <text:p>We are working with 25 constants, 26 inputs, 9 outputs, and 8 input/outputs.</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5" draw:layer="layout" svg:width="25.199cm" svg:height="2.629cm" svg:x="1.4cm" svg:y="0.628cm" presentation:class="title">
          <draw:text-box>
            <text:p text:style-name="P5"><text:span text:style-name="T4">NetCDF</text:span></text:p>
          </draw:text-box>
        </draw:frame>
        <draw:frame presentation:style-name="pr5" draw:layer="layout" svg:width="16.919cm" svg:height="9.134cm" svg:x="1.4cm" svg:y="3.685cm" presentation:class="outline" presentation:user-transformed="true">
          <draw:text-box>
            <text:list text:style-name="L2">
              <text:list-item>
                <text:p>Network Common Data Form (<text:span text:style-name="T4">NetCDF</text:span>) is a format for self-describing datasets. Each file is composed of “dimensions” and “variables.” Variables are multi-dimensional arrays, with the meaning of each dimension described in the file.</text:p>
              </text:list-item>
            </text:list>
          </draw:text-box>
        </draw:frame>
        <draw:frame draw:style-name="gr2" draw:text-style-name="P6" draw:layer="layout" svg:width="6.25cm" svg:height="10.562cm" svg:x="19.216cm" svg:y="3.798cm">
          <draw:text-box>
            <text:p><text:span text:style-name="T10">netcdf x_times_y {</text:span></text:p>
            <text:p><text:span text:style-name="T10">dimensions:</text:span></text:p>
            <text:p><text:span text:style-name="T10"><text:s text:c="8"/>x = 5 ;</text:span></text:p>
            <text:p><text:span text:style-name="T10"><text:s text:c="8"/>y = 5 ;</text:span></text:p>
            <text:p><text:span text:style-name="T10">variables:</text:span></text:p>
            <text:p><text:span text:style-name="T10"><text:s text:c="8"/>float x(x) ;</text:span></text:p>
            <text:p><text:span text:style-name="T10"><text:s text:c="8"/>float y(y) ;</text:span></text:p>
            <text:p><text:span text:style-name="T10"><text:s text:c="8"/>float z(x, y) ;</text:span></text:p>
            <text:p><text:span text:style-name="T10">data:</text:span></text:p>
            <text:p><text:span text:style-name="T10"/></text:p>
            <text:p><text:span text:style-name="T10"><text:s/>x = -2, -1, 0, 1, 2 ;</text:span></text:p>
            <text:p><text:span text:style-name="T10"/></text:p>
            <text:p><text:span text:style-name="T10"><text:s/>y = -4, -2, 0, 2, 4 ;</text:span></text:p>
            <text:p><text:span text:style-name="T10"/></text:p>
            <text:p><text:span text:style-name="T10"><text:s/>z =</text:span></text:p>
            <text:p><text:span text:style-name="T10"><text:s text:c="2"/>8, 4, -0, -4, -8,</text:span></text:p>
            <text:p><text:span text:style-name="T10"><text:s text:c="2"/>4, 2, -0, -2, -4,</text:span></text:p>
            <text:p><text:span text:style-name="T10"><text:s text:c="2"/>-0, -0, 0, 0, 0,</text:span></text:p>
            <text:p><text:span text:style-name="T10"><text:s text:c="2"/>-4, -2, 0, 2, 4,</text:span></text:p>
            <text:p><text:span text:style-name="T10"><text:s text:c="2"/>-8, -4, 0, 4, 8 ;</text:span></text:p>
            <text:p><text:span text:style-name="T10">}</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3" draw:text-style-name="P7" draw:layer="layout" svg:width="27.999cm" svg:height="15.748cm" svg:x="0.001cm" svg:y="0cm">
          <draw:image xlink:href="Pictures/10000000000007800000043821949E98.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What is a Sample?</text:p>
          </draw:text-box>
        </draw:frame>
        <draw:frame presentation:style-name="pr5" draw:layer="layout" svg:width="25.199cm" svg:height="9.134cm" svg:x="1.4cm" svg:y="3.685cm" presentation:class="outline">
          <draw:text-box>
            <text:list text:style-name="L2">
              <text:list-item>
                <text:p>A sample is a set of values for the constants contained in <text:span text:style-name="T1">spel-constants0001.nc</text:span>.</text:p>
              </text:list-item>
              <text:list-item>
                <text:p><text:span text:style-name="T1">elmtest.exe</text:span> is run once for each sample.</text:p>
              </text:list-item>
            </text:list>
          </draw:text-box>
        </draw:frame>
        <draw:frame draw:style-name="gr4" draw:text-style-name="P6" draw:layer="layout" svg:width="12.394cm" svg:height="7.125cm" svg:x="1.4cm" svg:y="8.272cm">
          <draw:text-box>
            <text:p><text:span text:style-name="T10">betavis</text:span></text:p>
            <text:p><text:span text:style-name="T10">0.0</text:span></text:p>
            <text:p><text:span text:style-name="T10">za_lake</text:span></text:p>
            <text:p><text:span text:style-name="T10">0.6</text:span></text:p>
            <text:p><text:span text:style-name="T10">n2min</text:span></text:p>
            <text:p><text:span text:style-name="T10">7.4999999999999993E-005</text:span></text:p>
            <text:p><text:span text:style-name="T10">tdmax</text:span></text:p>
            <text:p><text:span text:style-name="T10">277.0</text:span></text:p>
            <text:p><text:span text:style-name="T10">pudz</text:span></text:p>
            <text:p><text:span text:style-name="T10">0.0</text:span></text:p>
            <text:p><text:span text:style-name="T10">mixfact</text:span></text:p>
            <text:p><text:span text:style-name="T10">10.0</text:span></text:p>
            <text:p><text:span text:style-name="T10">depthcrit</text:span></text:p>
            <text:p><text:span text:style-name="T10">25.0</text:span></text:p>
          </draw:text-box>
        </draw:frame>
        <draw:frame draw:style-name="gr5" draw:text-style-name="P9" draw:layer="layout" svg:width="12.393cm" svg:height="0.742cm" svg:x="1.4cm" svg:y="7.53cm">
          <draw:text-box>
            <text:p text:style-name="P8"><text:span text:style-name="T11">Constants (formerly lakeparams.txt)</text:span></text:p>
          </draw:text-box>
        </draw:frame>
        <draw:frame draw:style-name="gr6" draw:text-style-name="P6" draw:layer="layout" svg:width="12.394cm" svg:height="7.117cm" svg:x="14.205cm" svg:y="8.273cm">
          <draw:text-box>
            <text:p><text:span text:style-name="T12">{</text:span></text:p>
            <text:p><text:span text:style-name="T13"><text:s text:c="2"/></text:span><text:span text:style-name="T14">"betavis"</text:span><text:span text:style-name="T12">:</text:span><text:span text:style-name="T13"> </text:span><text:span text:style-name="T15">0.0</text:span><text:span text:style-name="T12">,</text:span></text:p>
            <text:p><text:span text:style-name="T13"><text:s text:c="2"/></text:span><text:span text:style-name="T14">"za_lake"</text:span><text:span text:style-name="T12">:</text:span><text:span text:style-name="T13"> </text:span><text:span text:style-name="T15">0.6</text:span><text:span text:style-name="T12">,</text:span></text:p>
            <text:p><text:span text:style-name="T13"><text:s text:c="2"/></text:span><text:span text:style-name="T14">"n2min"</text:span><text:span text:style-name="T12">:</text:span><text:span text:style-name="T13"> </text:span><text:span text:style-name="T15">7.4999999999999993E-005</text:span><text:span text:style-name="T12">,</text:span></text:p>
            <text:p><text:span text:style-name="T13"><text:s text:c="2"/></text:span><text:span text:style-name="T14">"tdmax"</text:span><text:span text:style-name="T12">:</text:span><text:span text:style-name="T13"> </text:span><text:span text:style-name="T15">277.0</text:span><text:span text:style-name="T12">,</text:span></text:p>
            <text:p><text:span text:style-name="T13"><text:s text:c="2"/></text:span><text:span text:style-name="T14">"pudz"</text:span><text:span text:style-name="T12">:</text:span><text:span text:style-name="T13"> </text:span><text:span text:style-name="T15">0.0</text:span><text:span text:style-name="T12">,</text:span></text:p>
            <text:p><text:span text:style-name="T13"><text:s text:c="2"/></text:span><text:span text:style-name="T14">"mixfact"</text:span><text:span text:style-name="T12">:</text:span><text:span text:style-name="T13"> </text:span><text:span text:style-name="T15">10.0</text:span><text:span text:style-name="T12">,</text:span></text:p>
            <text:p><text:span text:style-name="T13"><text:s text:c="2"/></text:span><text:span text:style-name="T14">"depthcrit"</text:span><text:span text:style-name="T12">:</text:span><text:span text:style-name="T13"> </text:span><text:span text:style-name="T15">25.0</text:span></text:p>
            <text:p><text:span text:style-name="T12">}</text:span></text:p>
          </draw:text-box>
        </draw:frame>
        <draw:frame draw:style-name="gr5" draw:text-style-name="P9" draw:layer="layout" svg:width="12.393cm" svg:height="0.742cm" svg:x="14.205cm" svg:y="7.531cm">
          <draw:text-box>
            <text:p text:style-name="P8"><text:span text:style-name="T11">Example Sample (JSON used for illustration)</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2.629cm" svg:x="1.4cm" svg:y="0.628cm" presentation:class="title">
          <draw:text-box>
            <text:p>What Outputs are Received per Sample?</text:p>
          </draw:text-box>
        </draw:frame>
        <draw:frame presentation:style-name="pr5" draw:layer="layout" svg:width="25.199cm" svg:height="9.134cm" svg:x="1.4cm" svg:y="3.685cm" presentation:class="outline" presentation:user-transformed="true">
          <draw:text-box>
            <text:list text:style-name="L2">
              <text:list-item>
                <text:p>Analysis plugins will receive the outputs from the <text:span text:style-name="T1">spel-outputs0001.nc</text:span> file in the form of multidimensional <text:span text:style-name="T1">numpy</text:span> arrays.</text:p>
              </text:list-item>
            </text:list>
          </draw:text-box>
        </draw:frame>
        <draw:frame draw:style-name="gr7" draw:text-style-name="P6" draw:layer="layout" svg:width="25.193cm" svg:height="2.852cm" svg:x="1.4cm" svg:y="8.993cm">
          <draw:text-box>
            <text:p><text:span text:style-name="T12">{</text:span></text:p>
            <text:p><text:span text:style-name="T13"><text:s text:c="2"/></text:span><text:span text:style-name="T14">"veg_ef%eflx_soil_grnd"</text:span><text:span text:style-name="T12">:</text:span><text:span text:style-name="T13"> </text:span><text:span text:style-name="T12">[</text:span><text:span text:style-name="T15">0.0</text:span><text:span text:style-name="T12">,</text:span><text:span text:style-name="T13"> </text:span><text:span text:style-name="T15">...</text:span><text:span text:style-name="T12">],</text:span></text:p>
            <text:p><text:span text:style-name="T13"><text:s text:c="2"/></text:span><text:span text:style-name="T14">"veg_ef%eflx_gnet"</text:span><text:span text:style-name="T12">:</text:span><text:span text:style-name="T13"> </text:span><text:span text:style-name="T12">[[</text:span><text:span text:style-name="T15">0.0</text:span><text:span text:style-name="T12">,</text:span><text:span text:style-name="T13"> </text:span><text:span text:style-name="T15">...</text:span><text:span text:style-name="T12">],</text:span><text:span text:style-name="T13"> </text:span><text:span text:style-name="T15">...</text:span><text:span text:style-name="T12">],</text:span></text:p>
            <text:p><text:span text:style-name="T13"><text:s text:c="2"/></text:span><text:span text:style-name="T15">...</text:span></text:p>
            <text:p><text:span text:style-name="T12">}</text:span></text:p>
          </draw:text-box>
        </draw:frame>
        <draw:frame draw:style-name="gr5" draw:text-style-name="P9" draw:layer="layout" svg:width="20.304cm" svg:height="0.742cm" svg:x="3.842cm" svg:y="8.251cm">
          <draw:text-box>
            <text:p text:style-name="P8"><text:span text:style-name="T11">Outputs Received by Analysis Plugins (JSON for illustration)</text:spa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p>Sample Groups</text:p>
          </draw:text-box>
        </draw:frame>
        <draw:frame presentation:style-name="pr5" draw:layer="layout" svg:width="25.199cm" svg:height="9.134cm" svg:x="1.411cm" svg:y="3.257cm" presentation:class="outline" presentation:user-transformed="true">
          <draw:text-box>
            <text:list text:style-name="L2">
              <text:list-item>
                <text:p>Represents an ordered grouping of samples</text:p>
              </text:list-item>
              <text:list-item>
                <text:p>Analysis plugins can analyze the result of multiple consecutive runs of <text:span text:style-name="T1">elmtest.exe</text:span> in context this way.</text:p>
              </text:list-item>
            </text:list>
          </draw:text-box>
        </draw:frame>
        <draw:frame draw:style-name="gr8" draw:text-style-name="P6" draw:layer="layout" svg:width="12.394cm" svg:height="7.592cm" svg:x="1.411cm" svg:y="7.974cm">
          <draw:text-box>
            <text:p><text:span text:style-name="T12">[</text:span></text:p>
            <text:p><text:span text:style-name="T12"><text:s text:c="2"/>{</text:span></text:p>
            <text:p><text:span text:style-name="T13"><text:s text:c="4"/></text:span><text:span text:style-name="T14">"betavis"</text:span><text:span text:style-name="T12">:</text:span><text:span text:style-name="T13"> </text:span><text:span text:style-name="T15">0.0</text:span><text:span text:style-name="T12">,</text:span></text:p>
            <text:p><text:span text:style-name="T12"><text:s text:c="4"/>...</text:span></text:p>
            <text:p><text:span text:style-name="T12"><text:s text:c="2"/>},</text:span></text:p>
            <text:p text:style-name="P10"><text:span text:style-name="T12"><text:s text:c="2"/>{</text:span></text:p>
            <text:p text:style-name="P10"><text:span text:style-name="T13"><text:s text:c="4"/></text:span><text:span text:style-name="T14">"betavis"</text:span><text:span text:style-name="T12">:</text:span><text:span text:style-name="T13"> </text:span><text:span text:style-name="T15">0.25</text:span><text:span text:style-name="T12">,</text:span></text:p>
            <text:p text:style-name="P10"><text:span text:style-name="T12"><text:s text:c="4"/>...</text:span></text:p>
            <text:p text:style-name="P10"><text:span text:style-name="T12"><text:s text:c="2"/>},</text:span></text:p>
            <text:p text:style-name="P10"><text:span text:style-name="T12"><text:s text:c="2"/>{</text:span></text:p>
            <text:p text:style-name="P10"><text:span text:style-name="T13"><text:s text:c="4"/></text:span><text:span text:style-name="T14">"betavis"</text:span><text:span text:style-name="T12">:</text:span><text:span text:style-name="T13"> </text:span><text:span text:style-name="T15">0.5</text:span><text:span text:style-name="T12">,</text:span></text:p>
            <text:p text:style-name="P10"><text:span text:style-name="T12"><text:s text:c="4"/>...</text:span></text:p>
            <text:p text:style-name="P10"><text:span text:style-name="T12"><text:s text:c="2"/>}</text:span></text:p>
            <text:p><text:span text:style-name="T12">]</text:span></text:p>
          </draw:text-box>
        </draw:frame>
        <draw:frame draw:style-name="gr5" draw:text-style-name="P9" draw:layer="layout" svg:width="12.393cm" svg:height="0.742cm" svg:x="1.411cm" svg:y="7.232cm">
          <draw:text-box>
            <text:p text:style-name="P8"><text:span text:style-name="T11">Sample Group Data (JSON for illustration)</text:span></text:p>
          </draw:text-box>
        </draw:frame>
        <draw:frame draw:style-name="gr9" draw:text-style-name="P6" draw:layer="layout" svg:width="12.739cm" svg:height="7.616cm" svg:x="14.205cm" svg:y="7.974cm">
          <draw:text-box>
            <text:p><text:span text:style-name="T12">[</text:span></text:p>
            <text:p><text:span text:style-name="T13"><text:s text:c="2"/></text:span><text:span text:style-name="T12">{</text:span></text:p>
            <text:p text:style-name="P10"><text:span text:style-name="T16"><text:s text:c="4"/></text:span><text:span text:style-name="T17">"lakestate_vars%betaprime_col</text:span><text:span text:style-name="T14">"</text:span><text:span text:style-name="T12">:</text:span><text:span text:style-name="T13"> </text:span><text:span text:style-name="T12">[</text:span><text:span text:style-name="T15">0.0</text:span><text:span text:style-name="T12">,</text:span><text:span text:style-name="T13"> </text:span><text:span text:style-name="T18">...</text:span><text:span text:style-name="T12">],</text:span></text:p>
            <text:p text:style-name="P10"><text:span text:style-name="T13"><text:s text:c="4"/></text:span><text:span text:style-name="T18">...</text:span></text:p>
            <text:p><text:span text:style-name="T13"><text:s text:c="2"/></text:span><text:span text:style-name="T12">},</text:span></text:p>
            <text:p text:style-name="P10"><text:span text:style-name="T13"><text:s text:c="2"/></text:span><text:span text:style-name="T12">{</text:span></text:p>
            <text:p text:style-name="P10"><text:span text:style-name="T16"><text:s text:c="4"/></text:span><text:span text:style-name="T17">"lakestate_vars%betaprime_col</text:span><text:span text:style-name="T14">"</text:span><text:span text:style-name="T12">:</text:span><text:span text:style-name="T13"> </text:span><text:span text:style-name="T12">[</text:span><text:span text:style-name="T15">0.25</text:span><text:span text:style-name="T12">,</text:span><text:span text:style-name="T13"> </text:span><text:span text:style-name="T18">...</text:span><text:span text:style-name="T12">],</text:span></text:p>
            <text:p text:style-name="P10"><text:span text:style-name="T13"><text:s text:c="4"/></text:span><text:span text:style-name="T18">...</text:span></text:p>
            <text:p text:style-name="P10"><text:span text:style-name="T13"><text:s text:c="2"/></text:span><text:span text:style-name="T12">},</text:span></text:p>
            <text:p text:style-name="P10"><text:span text:style-name="T13"><text:s text:c="2"/></text:span><text:span text:style-name="T12">{</text:span></text:p>
            <text:p text:style-name="P10"><text:span text:style-name="T16"><text:s text:c="4"/></text:span><text:span text:style-name="T17">"lakestate_vars%betaprime_col</text:span><text:span text:style-name="T14">"</text:span><text:span text:style-name="T12">:</text:span><text:span text:style-name="T13"> </text:span><text:span text:style-name="T12">[</text:span><text:span text:style-name="T15">0.5</text:span><text:span text:style-name="T12">,</text:span><text:span text:style-name="T13"> </text:span><text:span text:style-name="T18">...</text:span><text:span text:style-name="T12">],</text:span></text:p>
            <text:p text:style-name="P10"><text:span text:style-name="T13"><text:s text:c="4"/></text:span><text:span text:style-name="T18">...</text:span></text:p>
            <text:p text:style-name="P10"><text:span text:style-name="T13"><text:s text:c="2"/></text:span><text:span text:style-name="T12">}</text:span></text:p>
            <text:p><text:span text:style-name="T12">]</text:span></text:p>
          </draw:text-box>
        </draw:frame>
        <draw:frame draw:style-name="gr5" draw:text-style-name="P9" draw:layer="layout" svg:width="12.393cm" svg:height="0.742cm" svg:x="14.205cm" svg:y="7.232cm">
          <draw:text-box>
            <text:p text:style-name="P8"><text:span text:style-name="T11">Ordered Output Data (JSON for illustration)</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p>Plugins</text:p>
          </draw:text-box>
        </draw:frame>
        <draw:frame presentation:style-name="pr5" draw:layer="layout" svg:width="25.005cm" svg:height="9.134cm" svg:x="1.4cm" svg:y="2.977cm" presentation:class="outline" presentation:user-transformed="true">
          <draw:text-box>
            <text:list text:style-name="L2">
              <text:list-item>
                <text:p>Our testing framework supports two types of plugins, sampling and analysis. Sampling plugins define values for constants, and analysis plugins view the outputs of the model.</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2.629cm" svg:x="1.4cm" svg:y="0.628cm" presentation:class="title">
          <draw:text-box>
            <text:p>Sampling Plugin Interface</text:p>
          </draw:text-box>
        </draw:frame>
        <draw:frame presentation:style-name="pr5" draw:layer="layout" svg:width="25.005cm" svg:height="9.134cm" svg:x="1.4cm" svg:y="3.685cm" presentation:class="outline" presentation:user-transformed="true">
          <draw:text-box>
            <text:list text:style-name="L2">
              <text:list-item>
                <text:p>Sampling plugins define a subclass of <text:span text:style-name="T1">Sampler</text:span>, returning one or more <text:span text:style-name="T1">SampleGroups</text:span>, which are sequences of individual samples.</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629cm" svg:x="1.4cm" svg:y="0.628cm" presentation:class="title">
          <draw:text-box>
            <text:p>Analysis Plugin Interface</text:p>
          </draw:text-box>
        </draw:frame>
        <draw:frame presentation:style-name="pr5" draw:layer="layout" svg:width="25.005cm" svg:height="10.179cm" svg:x="1.4cm" svg:y="3.685cm" presentation:class="outline" presentation:user-transformed="true">
          <draw:text-box>
            <text:list text:style-name="L2">
              <text:list-item>
                <text:p>Analysis plugins can either be “per sample” or “sample group” analysis plugins.</text:p>
              </text:list-item>
              <text:list-item>
                <text:p>“Per sample” plugins define a subclass of <text:span text:style-name="T1">PerSampleAnalyzer</text:span>, which is called each time <text:span text:style-name="T1">elmtest.exe</text:span> is run, and receives the outputs produced by that specific sample.</text:p>
              </text:list-item>
              <text:list-item>
                <text:p>“Sample group” plugins define a subclass of <text:span text:style-name="T1">SampleGroupAnalyzer</text:span>, which is called after all samples in a group are run through <text:span text:style-name="T1">elmtest.exe</text:span>, and it receives all outputs from each.</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Configuration</text:p>
          </draw:text-box>
        </draw:frame>
        <draw:frame presentation:style-name="pr5" draw:layer="layout" svg:width="25.005cm" svg:height="10.1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custom-shape draw:style-name="gr10" draw:text-style-name="P11" draw:layer="layout" svg:width="18.129cm" svg:height="7.095cm" svg:x="4.936cm" svg:y="4.328cm">
          <text:p/>
          <draw:enhanced-geometry svg:viewBox="0 0 21600 21600" draw:type="rectangle" draw:enhanced-path="M 0 0 L 21600 0 21600 21600 0 21600 0 0 Z N"/>
        </draw:custom-shape>
        <draw:custom-shape draw:style-name="gr11" draw:text-style-name="P12" draw:layer="layout" svg:width="5.997cm" svg:height="2.144cm" svg:x="11.002cm" svg:y="6.80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askaydiaCove NFM" svg:font-family="'CaskaydiaCove NFM'"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URW Bookman" svg:font-family="'URW Book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f1112"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RW Bookman" fo:font-family="'URW Bookman'" style:font-pitch="variable" fo:font-size="2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RW Bookman" fo:font-family="'URW Bookman'"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URW Bookman" fo:font-family="'URW Bookman'" style:font-pitch="variable" fo:font-size="12pt" style:font-size-asian="12pt" style:font-size-complex="12pt"/>
    </style:style>
    <style:style style:name="Default-outline4" style:family="presentation" style:parent-style-name="Default-outline3">
      <style:paragraph-properties fo:margin-top="0.2cm" fo:margin-bottom="0cm"/>
      <style:text-properties style:font-name="URW Bookman" fo:font-family="'URW Bookman'"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RW Bookman" fo:font-family="'URW Bookman'"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RW Bookman" fo:font-family="'URW Bookman'"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RW Bookman" fo:font-family="'URW Bookman'"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RW Bookman" fo:font-family="'URW Bookman'" style:font-pitch="variable" fo:font-size="36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f1112"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18:27:27.879182752</meta:creation-date>
    <meta:generator>LibreOffice/25.8.4.2$Linux_X86_64 LibreOffice_project/580$Build-2</meta:generator>
    <dc:date>2026-02-03T13:37:42.095892533</dc:date>
    <meta:editing-duration>PT1H3M7S</meta:editing-duration>
    <meta:editing-cycles>19</meta:editing-cycles>
    <meta:print-date>2026-02-03T12:10:48.026305886</meta:print-date>
    <meta:printed-by>PDF files</meta:printed-by>
    <meta:document-statistic meta:object-count="92"/>
  </office:meta>
</office:document-meta>
</file>