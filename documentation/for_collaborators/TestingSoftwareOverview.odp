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21949E9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skaydiaCove NFM" svg:font-family="'CaskaydiaCove NFM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ource Code Pro Semibold" svg:font-family="'Source Code Pro Semibold'" style:font-adornments="Regular" style:font-pitch="fixed"/>
    <style:font-face style:name="URW Bookman" svg:font-family="'URW Book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ch2_options="{'Style': 'native', 'Language': 'Text only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02020" draw:auto-grow-height="true" draw:auto-grow-width="false" fo:min-height="6.8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492cm" loext:decorative="false"/>
      <style:paragraph-properties style:writing-mode="lr-tb"/>
    </style:style>
    <style:style style:name="gr5" style:family="graphic" style:parent-style-name="standard">
      <style:graphic-properties ch2_options="{'Style': 'native', 'Language': 'JS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02020" draw:auto-grow-height="true" draw:auto-grow-width="false" fo:min-height="6.867cm" loext:decorative="false"/>
      <style:paragraph-properties style:writing-mode="lr-tb"/>
    </style:style>
    <style:style style:name="gr6" style:family="graphic" style:parent-style-name="standard">
      <style:graphic-properties ch2_options="{'Style': 'native', 'Language': 'JS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02020" draw:auto-grow-height="true" draw:auto-grow-width="false" fo:min-height="2.602cm" loext:decorative="false"/>
      <style:paragraph-properties style:writing-mode="lr-tb"/>
    </style:style>
    <style:style style:name="gr7" style:family="graphic" style:parent-style-name="standard">
      <style:graphic-properties ch2_options="{'Style': 'native', 'Language': 'JS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02020" draw:auto-grow-height="true" draw:auto-grow-width="false" fo:min-height="7.342cm" loext:decorative="false"/>
      <style:paragraph-properties style:writing-mode="lr-tb"/>
    </style:style>
    <style:style style:name="gr8" style:family="graphic" style:parent-style-name="standard">
      <style:graphic-properties ch2_options="{'Style': 'native', 'Language': 'JS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02020" draw:auto-grow-height="true" draw:auto-grow-width="false" fo:min-height="7.366cm" loext:decorative="false"/>
      <style:paragraph-properties style:writing-mode="lr-tb"/>
    </style:style>
    <style:style style:name="gr9" style:family="graphic" style:parent-style-name="standard">
      <style:graphic-properties svg:stroke-color="#34383a" draw:fill="solid" draw:fill-color="#34383a" draw:opacity="90%" draw:textarea-horizontal-align="justify" draw:textarea-vertical-align="middle" draw:auto-grow-height="false" fo:min-height="6.845cm" fo:min-width="17.629cm" loext:decorative="false"/>
    </style:style>
    <style:style style:name="gr10" style:family="graphic" style:parent-style-name="standard">
      <style:graphic-properties svg:stroke-color="#f46b2b" draw:fill="solid" draw:fill-color="#f46b2b" draw:opacity="90%" draw:textarea-horizontal-align="justify" draw:textarea-vertical-align="middle" draw:auto-grow-height="false" fo:min-height="1.894cm" fo:min-width="5.497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0.56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  <style:text-properties style:font-name="URW Bookman" fo:font-size="16pt" style:font-size-asian="16pt" style:font-size-complex="1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202020"/>
      <style:text-properties style:font-name="CaskaydiaCove NFM"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style:font-name="CaskaydiaCove NFM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solid" draw:fill-color="#34383a" draw:opacity="90%"/>
      <style:paragraph-properties fo:text-align="center"/>
    </style:style>
    <style:style style:name="P8" style:family="paragraph">
      <loext:graphic-properties draw:fill="solid" draw:fill-color="#f46b2b" draw:opacity="90%"/>
      <style:paragraph-properties fo:text-align="center"/>
    </style:style>
    <style:style style:name="T1" style:family="text">
      <style:text-properties style:font-name="URW Bookman" fo:font-size="16pt" style:font-size-asian="16pt" style:font-size-complex="16pt"/>
    </style:style>
    <style:style style:name="T2" style:family="text">
      <style:text-properties fo:background-color="transparent"/>
    </style:style>
    <style:style style:name="T3" style:family="text">
      <style:text-properties style:font-name="Liberation Mono"/>
    </style:style>
    <style:style style:name="T4" style:family="text">
      <style:text-properties style:use-window-font-color="true" loext:opacity="0%" style:font-name="CaskaydiaCove NFM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5" style:family="text">
      <style:text-properties style:font-name="CaskaydiaCove NFM" fo:font-size="12pt" style:font-size-asian="12pt" style:font-size-complex="12pt"/>
    </style:style>
    <style:style style:name="T6" style:family="text">
      <style:text-properties fo:color="#d0d0d0" loext:opacity="100%" style:font-name="CaskaydiaCove NFM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7" style:family="text">
      <style:text-properties fo:color="#666666" loext:opacity="100%" style:font-name="CaskaydiaCove NFM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8" style:family="text">
      <style:text-properties fo:color="#6ebf26" loext:opacity="100%" style:font-name="CaskaydiaCove NFM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9" style:family="text">
      <style:text-properties fo:color="#51b2fd" loext:opacity="100%" style:font-name="CaskaydiaCove NFM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0" style:family="text">
      <style:text-properties fo:font-variant="normal" fo:text-transform="none" fo:color="#666666" loext:opacity="100%" style:text-outline="false" style:text-line-through-style="none" style:text-line-through-type="none" style:font-name="CaskaydiaCove NFM" fo:font-size="12pt" fo:language="zxx" fo:country="none" fo:font-style="normal" fo:text-shadow="none" style:text-underline-style="none" fo:font-weight="normal" style:letter-kerning="true" fo:background-color="transparent" style:font-name-asian="Nimbus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ebf26" loext:opacity="100%" style:text-outline="false" style:text-line-through-style="none" style:text-line-through-type="none" style:font-name="CaskaydiaCove NFM" fo:font-size="12pt" fo:language="zxx" fo:country="none" fo:font-style="normal" fo:text-shadow="none" style:text-underline-style="none" fo:font-weight="bold" style:letter-kerning="true" fo:background-color="transparent" style:font-name-asian="Nimbus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loext:opacity="100%" style:font-name="CaskaydiaCove NFM" fo:font-size="12pt" fo:language="zxx" fo:country="none" fo:font-style="normal" style:text-underline-style="none" fo:font-weight="normal" fo:background-color="transparen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01cm" svg:y="5.671cm" presentation:class="title" presentation:user-transformed="true">
          <draw:text-box>
            <text:p>LakeTemperature Testing Software</text:p>
          </draw:text-box>
        </draw:frame>
        <draw:frame presentation:style-name="pr2" draw:text-style-name="P1" draw:layer="layout" svg:width="25.199cm" svg:height="0.564cm" svg:x="1.4cm" svg:y="7.967cm" presentation:class="subtitle" presentation:user-transformed="true">
          <draw:text-box>
            <text:p><text:span text:style-name="T1">Slides by Aidan Bensc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ackgroun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We are testing a module of <text:span text:style-name="T2"><text:a xlink:href="https://e3sm.org/" xlink:type="simple">E3SM</text:a></text:span>, an environmental model. This module, LakeTemperature, is part of the greater ELM (E3SM Land Model) which was originally a fork of the CLM (Community Land Model).</text:p>
              </text:list-item>
              <text:list-item>
                <text:p>We are able to test specifically this module using <text:span text:style-name="T2"><text:a xlink:href="https://github.com/peterdschwartz/SPEL_OpenACC" xlink:type="simple">SPEL</text:a></text:span>, a software that adds a NetCDF interface for the constants, inputs, and outputs of a module of E3SM and compiles that specific part of the model. The executable produced by this is named <text:span text:style-name="T3">elmtest.exe</text:span>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oject Goa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evelop a software that can systematically change the constants used in the LakeTemperature model and allow us to visualize and observe patterns in how this affects its output.</text:p>
              </text:list-item>
              <text:list-item>
                <text:p>Apply testing techniques to try and find inputs that will cause physically impossible or unrealistic outputs. Apply assertions pertaining to the values of constants, inputs, and outputs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Our Testing Solu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tomates the process of modifying constants in <text:span text:style-name="T3">spel-constants0001.nc</text:span> and the process of analyzing the resulting values in <text:span text:style-name="T3">fut-outputs0001.nc</text:span>.</text:p>
              </text:list-item>
              <text:list-item>
                <text:p>Both the process of choosing values for each constant and the process of analyzing the resulting outputs is extendable through sampling plugins and analysis plugins respectivel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3" draw:layer="layout" svg:width="27.999cm" svg:height="15.748cm" svg:x="0.001cm" svg:y="0cm">
          <draw:image xlink:href="Pictures/10000000000007800000043821949E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is a Sample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 sample is a set of values for the constants contained in <text:span text:style-name="T3">spel-constants0001.nc</text:span>.</text:p>
              </text:list-item>
              <text:list-item>
                <text:p><text:span text:style-name="T3">elmtest.exe</text:span> is run once for each sample.</text:p>
              </text:list-item>
            </text:list>
          </draw:text-box>
        </draw:frame>
        <draw:frame draw:style-name="gr3" draw:text-style-name="P4" draw:layer="layout" svg:width="12.394cm" svg:height="7.125cm" svg:x="1.4cm" svg:y="8.272cm">
          <draw:text-box>
            <text:p><text:span text:style-name="T4">betavis</text:span></text:p>
            <text:p><text:span text:style-name="T4">0.0</text:span></text:p>
            <text:p><text:span text:style-name="T4">za_lake</text:span></text:p>
            <text:p><text:span text:style-name="T4">0.6</text:span></text:p>
            <text:p><text:span text:style-name="T4">n2min</text:span></text:p>
            <text:p><text:span text:style-name="T4">7.4999999999999993E-005</text:span></text:p>
            <text:p><text:span text:style-name="T4">tdmax</text:span></text:p>
            <text:p><text:span text:style-name="T4">277.0</text:span></text:p>
            <text:p><text:span text:style-name="T4">pudz</text:span></text:p>
            <text:p><text:span text:style-name="T4">0.0</text:span></text:p>
            <text:p><text:span text:style-name="T4">mixfact</text:span></text:p>
            <text:p><text:span text:style-name="T4">10.0</text:span></text:p>
            <text:p><text:span text:style-name="T4">depthcrit</text:span></text:p>
            <text:p><text:span text:style-name="T4">25.0</text:span></text:p>
          </draw:text-box>
        </draw:frame>
        <draw:frame draw:style-name="gr4" draw:text-style-name="P5" draw:layer="layout" svg:width="12.393cm" svg:height="0.742cm" svg:x="1.4cm" svg:y="7.53cm">
          <draw:text-box>
            <text:p text:style-name="P3"><text:span text:style-name="T5">C</text:span><text:span text:style-name="T5">o</text:span><text:span text:style-name="T5">n</text:span><text:span text:style-name="T5">s</text:span><text:span text:style-name="T5">t</text:span><text:span text:style-name="T5">a</text:span><text:span text:style-name="T5">n</text:span><text:span text:style-name="T5">t</text:span><text:span text:style-name="T5">s</text:span><text:span text:style-name="T5"> </text:span><text:span text:style-name="T5">(</text:span><text:span text:style-name="T5">f</text:span><text:span text:style-name="T5">o</text:span><text:span text:style-name="T5">r</text:span><text:span text:style-name="T5">m</text:span><text:span text:style-name="T5">e</text:span><text:span text:style-name="T5">r</text:span><text:span text:style-name="T5">l</text:span><text:span text:style-name="T5">y</text:span><text:span text:style-name="T5"> </text:span><text:span text:style-name="T5">l</text:span><text:span text:style-name="T5">a</text:span><text:span text:style-name="T5">k</text:span><text:span text:style-name="T5">e</text:span><text:span text:style-name="T5">p</text:span><text:span text:style-name="T5">a</text:span><text:span text:style-name="T5">r</text:span><text:span text:style-name="T5">a</text:span><text:span text:style-name="T5">m</text:span><text:span text:style-name="T5">s</text:span><text:span text:style-name="T5">.</text:span><text:span text:style-name="T5">t</text:span><text:span text:style-name="T5">x</text:span><text:span text:style-name="T5">t</text:span><text:span text:style-name="T5">)</text:span></text:p>
          </draw:text-box>
        </draw:frame>
        <draw:frame draw:style-name="gr5" draw:text-style-name="P4" draw:layer="layout" svg:width="12.394cm" svg:height="7.117cm" svg:x="14.205cm" svg:y="8.273cm">
          <draw:text-box>
            <text:p><text:span text:style-name="T6">{</text:span></text:p>
            <text:p><text:span text:style-name="T7"><text:s text:c="2"/></text:span><text:span text:style-name="T8">"betavis"</text:span><text:span text:style-name="T6">:</text:span><text:span text:style-name="T7"> </text:span><text:span text:style-name="T9">0.0</text:span><text:span text:style-name="T6">,</text:span></text:p>
            <text:p><text:span text:style-name="T7"><text:s text:c="2"/></text:span><text:span text:style-name="T8">"za_lake"</text:span><text:span text:style-name="T6">:</text:span><text:span text:style-name="T7"> </text:span><text:span text:style-name="T9">0.6</text:span><text:span text:style-name="T6">,</text:span></text:p>
            <text:p><text:span text:style-name="T7"><text:s text:c="2"/></text:span><text:span text:style-name="T8">"n2min"</text:span><text:span text:style-name="T6">:</text:span><text:span text:style-name="T7"> </text:span><text:span text:style-name="T9">7.4999999999999993E-005</text:span><text:span text:style-name="T6">,</text:span></text:p>
            <text:p><text:span text:style-name="T7"><text:s text:c="2"/></text:span><text:span text:style-name="T8">"tdmax"</text:span><text:span text:style-name="T6">:</text:span><text:span text:style-name="T7"> </text:span><text:span text:style-name="T9">277.0</text:span><text:span text:style-name="T6">,</text:span></text:p>
            <text:p><text:span text:style-name="T7"><text:s text:c="2"/></text:span><text:span text:style-name="T8">"pudz"</text:span><text:span text:style-name="T6">:</text:span><text:span text:style-name="T7"> </text:span><text:span text:style-name="T9">0.0</text:span><text:span text:style-name="T6">,</text:span></text:p>
            <text:p><text:span text:style-name="T7"><text:s text:c="2"/></text:span><text:span text:style-name="T8">"mixfact"</text:span><text:span text:style-name="T6">:</text:span><text:span text:style-name="T7"> </text:span><text:span text:style-name="T9">10.0</text:span><text:span text:style-name="T6">,</text:span></text:p>
            <text:p><text:span text:style-name="T7"><text:s text:c="2"/></text:span><text:span text:style-name="T8">"depthcrit"</text:span><text:span text:style-name="T6">:</text:span><text:span text:style-name="T7"> </text:span><text:span text:style-name="T9">25.0</text:span></text:p>
            <text:p><text:span text:style-name="T6">}</text:span></text:p>
          </draw:text-box>
        </draw:frame>
        <draw:frame draw:style-name="gr4" draw:text-style-name="P5" draw:layer="layout" svg:width="12.393cm" svg:height="0.742cm" svg:x="14.205cm" svg:y="7.531cm">
          <draw:text-box>
            <text:p text:style-name="P3"><text:span text:style-name="T5">Example Sample (JSON used </text:span><text:span text:style-name="T5">for illustratio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Outputs are Received per Sample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nalysis plugins will receive the outputs from the <text:span text:style-name="T3">spel-</text:span><text:span text:style-name="T3">outputs0001.nc</text:span> file in the form of multidimensional numpy arrays.</text:p>
              </text:list-item>
            </text:list>
          </draw:text-box>
        </draw:frame>
        <draw:frame draw:style-name="gr6" draw:text-style-name="P4" draw:layer="layout" svg:width="25.193cm" svg:height="2.852cm" svg:x="1.4cm" svg:y="8.993cm">
          <draw:text-box>
            <text:p><text:span text:style-name="T6">{</text:span></text:p>
            <text:p><text:span text:style-name="T7"><text:s text:c="2"/></text:span><text:span text:style-name="T8">"veg_ef%eflx_soil_grnd"</text:span><text:span text:style-name="T6">:</text:span><text:span text:style-name="T7"> </text:span><text:span text:style-name="T6">[</text:span><text:span text:style-name="T9">0.0</text:span><text:span text:style-name="T6">,</text:span><text:span text:style-name="T7"> </text:span><text:span text:style-name="T9">...</text:span><text:span text:style-name="T6">],</text:span></text:p>
            <text:p><text:span text:style-name="T7"><text:s text:c="2"/></text:span><text:span text:style-name="T8">"veg_ef%eflx_gnet"</text:span><text:span text:style-name="T6">:</text:span><text:span text:style-name="T7"> </text:span><text:span text:style-name="T6">[[</text:span><text:span text:style-name="T9">0.0</text:span><text:span text:style-name="T6">,</text:span><text:span text:style-name="T7"> </text:span><text:span text:style-name="T9">...</text:span><text:span text:style-name="T6">],</text:span><text:span text:style-name="T7"> </text:span><text:span text:style-name="T9">...</text:span><text:span text:style-name="T6">],</text:span></text:p>
            <text:p><text:span text:style-name="T7"><text:s text:c="2"/></text:span><text:span text:style-name="T9">...</text:span></text:p>
            <text:p><text:span text:style-name="T6">}</text:span></text:p>
          </draw:text-box>
        </draw:frame>
        <draw:frame draw:style-name="gr4" draw:text-style-name="P5" draw:layer="layout" svg:width="20.304cm" svg:height="0.742cm" svg:x="3.842cm" svg:y="8.251cm">
          <draw:text-box>
            <text:p text:style-name="P3"><text:span text:style-name="T5">Outputs Received by </text:span><text:span text:style-name="T5">Analysis Plugins (JSON </text:span><text:span text:style-name="T5">for illustratio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ample Groups</text:p>
          </draw:text-box>
        </draw:frame>
        <draw:frame presentation:style-name="pr5" draw:layer="layout" svg:width="25.199cm" svg:height="9.134cm" svg:x="1.411cm" svg:y="3.257cm" presentation:class="outline" presentation:user-transformed="true">
          <draw:text-box>
            <text:list text:style-name="L2">
              <text:list-item>
                <text:p>Represents an ordered grouping of samples</text:p>
              </text:list-item>
              <text:list-item>
                <text:p>Analysis plugins can analyze the result of multiple consecutive runs of elmtest.exe in context this way.</text:p>
              </text:list-item>
            </text:list>
          </draw:text-box>
        </draw:frame>
        <draw:frame draw:style-name="gr7" draw:text-style-name="P4" draw:layer="layout" svg:width="12.394cm" svg:height="7.592cm" svg:x="1.411cm" svg:y="7.974cm">
          <draw:text-box>
            <text:p><text:span text:style-name="T6">[</text:span></text:p>
            <text:p><text:span text:style-name="T6"><text:s text:c="2"/>{</text:span></text:p>
            <text:p><text:span text:style-name="T7"><text:s text:c="4"/></text:span><text:span text:style-name="T8">"betavis"</text:span><text:span text:style-name="T6">:</text:span><text:span text:style-name="T7"> </text:span><text:span text:style-name="T9">0.0</text:span><text:span text:style-name="T6">,</text:span></text:p>
            <text:p><text:span text:style-name="T6"><text:s text:c="4"/>...</text:span></text:p>
            <text:p><text:span text:style-name="T6"><text:s text:c="2"/>},</text:span></text:p>
            <text:p text:style-name="P6"><text:span text:style-name="T6"><text:s text:c="2"/>{</text:span></text:p>
            <text:p text:style-name="P6"><text:span text:style-name="T7"><text:s text:c="4"/></text:span><text:span text:style-name="T8">"betavis"</text:span><text:span text:style-name="T6">:</text:span><text:span text:style-name="T7"> </text:span><text:span text:style-name="T9">0.25</text:span><text:span text:style-name="T6">,</text:span></text:p>
            <text:p text:style-name="P6"><text:span text:style-name="T6"><text:s text:c="4"/>...</text:span></text:p>
            <text:p text:style-name="P6"><text:span text:style-name="T6"><text:s text:c="2"/>},</text:span></text:p>
            <text:p text:style-name="P6"><text:span text:style-name="T6"><text:s text:c="2"/>{</text:span></text:p>
            <text:p text:style-name="P6"><text:span text:style-name="T7"><text:s text:c="4"/></text:span><text:span text:style-name="T8">"betavis"</text:span><text:span text:style-name="T6">:</text:span><text:span text:style-name="T7"> </text:span><text:span text:style-name="T9">0.5</text:span><text:span text:style-name="T6">,</text:span></text:p>
            <text:p text:style-name="P6"><text:span text:style-name="T6"><text:s text:c="4"/>...</text:span></text:p>
            <text:p text:style-name="P6"><text:span text:style-name="T6"><text:s text:c="2"/>}</text:span></text:p>
            <text:p><text:span text:style-name="T6">]</text:span></text:p>
          </draw:text-box>
        </draw:frame>
        <draw:frame draw:style-name="gr4" draw:text-style-name="P5" draw:layer="layout" svg:width="12.393cm" svg:height="0.742cm" svg:x="1.411cm" svg:y="7.232cm">
          <draw:text-box>
            <text:p text:style-name="P3"><text:span text:style-name="T5">Sample Group Data (JSON </text:span><text:span text:style-name="T5">for illustration)</text:span></text:p>
          </draw:text-box>
        </draw:frame>
        <draw:frame draw:style-name="gr8" draw:text-style-name="P4" draw:layer="layout" svg:width="12.739cm" svg:height="7.616cm" svg:x="14.205cm" svg:y="7.974cm">
          <draw:text-box>
            <text:p><text:span text:style-name="T6">[</text:span></text:p>
            <text:p><text:span text:style-name="T7"><text:s text:c="2"/></text:span><text:span text:style-name="T6">{</text:span></text:p>
            <text:p text:style-name="P6"><text:span text:style-name="T10"><text:s text:c="4"/></text:span><text:span text:style-name="T11">"lakestate_vars%betaprime_col</text:span><text:span text:style-name="T8">"</text:span><text:span text:style-name="T6">:</text:span><text:span text:style-name="T7"> </text:span><text:span text:style-name="T6">[</text:span><text:span text:style-name="T9">0.0</text:span><text:span text:style-name="T6">,</text:span><text:span text:style-name="T7"> </text:span><text:span text:style-name="T12">...</text:span><text:span text:style-name="T6">],</text:span></text:p>
            <text:p text:style-name="P6"><text:span text:style-name="T7"><text:s text:c="4"/></text:span><text:span text:style-name="T12">...</text:span></text:p>
            <text:p><text:span text:style-name="T7"><text:s text:c="2"/></text:span><text:span text:style-name="T6">},</text:span></text:p>
            <text:p text:style-name="P6"><text:span text:style-name="T7"><text:s text:c="2"/></text:span><text:span text:style-name="T6">{</text:span></text:p>
            <text:p text:style-name="P6"><text:span text:style-name="T10"><text:s text:c="4"/></text:span><text:span text:style-name="T11">"lakestate_vars%betaprime_col</text:span><text:span text:style-name="T8">"</text:span><text:span text:style-name="T6">:</text:span><text:span text:style-name="T7"> </text:span><text:span text:style-name="T6">[</text:span><text:span text:style-name="T9">0.25</text:span><text:span text:style-name="T6">,</text:span><text:span text:style-name="T7"> </text:span><text:span text:style-name="T12">...</text:span><text:span text:style-name="T6">],</text:span></text:p>
            <text:p text:style-name="P6"><text:span text:style-name="T7"><text:s text:c="4"/></text:span><text:span text:style-name="T12">...</text:span></text:p>
            <text:p text:style-name="P6"><text:span text:style-name="T7"><text:s text:c="2"/></text:span><text:span text:style-name="T6">},</text:span></text:p>
            <text:p text:style-name="P6"><text:span text:style-name="T7"><text:s text:c="2"/></text:span><text:span text:style-name="T6">{</text:span></text:p>
            <text:p text:style-name="P6"><text:span text:style-name="T10"><text:s text:c="4"/></text:span><text:span text:style-name="T11">"lakestate_vars%betaprime_col</text:span><text:span text:style-name="T8">"</text:span><text:span text:style-name="T6">:</text:span><text:span text:style-name="T7"> </text:span><text:span text:style-name="T6">[</text:span><text:span text:style-name="T9">0.5</text:span><text:span text:style-name="T6">,</text:span><text:span text:style-name="T7"> </text:span><text:span text:style-name="T12">...</text:span><text:span text:style-name="T6">],</text:span></text:p>
            <text:p text:style-name="P6"><text:span text:style-name="T7"><text:s text:c="4"/></text:span><text:span text:style-name="T12">...</text:span></text:p>
            <text:p text:style-name="P6"><text:span text:style-name="T7"><text:s text:c="2"/></text:span><text:span text:style-name="T6">}</text:span></text:p>
            <text:p><text:span text:style-name="T6">]</text:span></text:p>
          </draw:text-box>
        </draw:frame>
        <draw:frame draw:style-name="gr4" draw:text-style-name="P5" draw:layer="layout" svg:width="12.393cm" svg:height="0.742cm" svg:x="14.205cm" svg:y="7.232cm">
          <draw:text-box>
            <text:p text:style-name="P3"><text:span text:style-name="T5">Ordered Output Data (JSON for illustratio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lugins</text:p>
          </draw:text-box>
        </draw:frame>
        <draw:frame presentation:style-name="pr5" draw:layer="layout" svg:width="25.005cm" svg:height="9.134cm" svg:x="1.4cm" svg:y="2.977cm" presentation:class="outline" presentation:user-transformed="true">
          <draw:text-box>
            <text:list text:style-name="L2">
              <text:list-item>
                <text:p>Our testing framework supports two types of plugins, sampling and analysis. Sampling plugins define values for constants, and analysis plugins view the outputs of the mode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ampling Plugin Interface</text:p>
          </draw:text-box>
        </draw:frame>
        <draw:frame presentation:style-name="pr5" draw:layer="layout" svg:width="25.005cm" svg:height="9.134cm" svg:x="1.4cm" svg:y="3.685cm" presentation:class="outline" presentation:user-transformed="true">
          <draw:text-box>
            <text:list text:style-name="L2">
              <text:list-item>
                <text:p>Sampling plugins define a subclass of Sampler, returning one or more SampleGroups, which are sequences of individual sampl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nalysis Plugin Interface</text:p>
          </draw:text-box>
        </draw:frame>
        <draw:frame presentation:style-name="pr5" draw:layer="layout" svg:width="25.005cm" svg:height="10.179cm" svg:x="1.4cm" svg:y="3.685cm" presentation:class="outline" presentation:user-transformed="true">
          <draw:text-box>
            <text:list text:style-name="L2">
              <text:list-item>
                <text:p>Analysis plugins can either be “per sample” or “sample group” analysis plugins.</text:p>
              </text:list-item>
              <text:list-item>
                <text:p>“Per sample” plugins define a subclass of PerSampleAnalyzer, which is called each time elmtest is run, and receives the outputs produced by that specific sample.</text:p>
              </text:list-item>
              <text:list-item>
                <text:p>“Sample group” plugins define a subclass of SampleGroupAnalyzer, which is called after all samples in a group have been run through elmtest, and it receives all outputs from each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onfiguration</text:p>
          </draw:text-box>
        </draw:frame>
        <draw:frame presentation:style-name="pr5" draw:layer="layout" svg:width="25.005cm" svg:height="10.179cm" svg:x="1.4cm" svg:y="3.68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9" draw:text-style-name="P7" draw:layer="layout" svg:width="18.129cm" svg:height="7.095cm" svg:x="4.936cm" svg:y="4.3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997cm" svg:height="2.144cm" svg:x="11.002cm" svg:y="6.80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skaydiaCove NFM" svg:font-family="'CaskaydiaCove NFM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ource Code Pro Semibold" svg:font-family="'Source Code Pro Semibold'" style:font-adornments="Regular" style:font-pitch="fixed"/>
    <style:font-face style:name="URW Bookman" svg:font-family="'URW Book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f1112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RW Bookman" fo:font-family="'URW Bookman'" style:font-pitch="variable" fo:font-size="2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RW Bookman" fo:font-family="'URW Bookman'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top="0.3cm" fo:margin-bottom="0cm"/>
      <style:text-properties style:font-name="URW Bookman" fo:font-family="'URW Bookman'" style:font-pitch="variable" fo:font-size="12pt" style:font-size-asian="12pt" style:font-size-complex="12pt"/>
    </style:style>
    <style:style style:name="Default-outline4" style:family="presentation" style:parent-style-name="Default-outline3">
      <style:paragraph-properties fo:margin-top="0.2cm" fo:margin-bottom="0cm"/>
      <style:text-properties style:font-name="URW Bookman" fo:font-family="'URW Book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RW Bookman" fo:font-family="'URW Book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RW Bookman" fo:font-family="'URW Book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RW Bookman" fo:font-family="'URW Book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RW Bookman" fo:font-family="'URW Bookman'" style:font-pitch="variable" fo:font-size="36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f1112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30T18:27:27.879182752</meta:creation-date>
    <meta:generator>LibreOffice/25.8.4.2$Linux_X86_64 LibreOffice_project/580$Build-2</meta:generator>
    <dc:date>2026-01-12T23:07:31.084541752</dc:date>
    <meta:editing-duration>PT31M2S</meta:editing-duration>
    <meta:editing-cycles>15</meta:editing-cycles>
    <meta:print-date>2026-01-12T22:56:30.859734692</meta:print-date>
    <meta:printed-by>PDF files</meta:printed-by>
    <meta:document-statistic meta:object-count="82"/>
  </office:meta>
</office:document-meta>
</file>