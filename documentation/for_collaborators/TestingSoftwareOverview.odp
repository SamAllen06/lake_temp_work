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000000000780000004387537A119.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draw:stroke="none" draw:fill="none" fo:min-height="1.851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1"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5"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6" style:family="graphic" style:parent-style-name="standard">
      <style:graphic-properties draw:stroke="none" draw:fill="none" fo:min-height="1.293cm" loext:decorative="false"/>
      <style:paragraph-properties style:writing-mode="lr-tb"/>
    </style:style>
    <style:style style:name="gr17"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8"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1.633cm" style:use-optimal-row-height="false"/>
    </style:style>
    <style:style style:name="ro9" style:family="table-row">
      <style:table-row-properties style:row-height="2.777cm" style:use-optimal-row-height="false"/>
    </style:style>
    <style:style style:name="ro10" style:family="table-row">
      <style:table-row-properties style:row-height="3.158cm" style:use-optimal-row-height="false"/>
    </style:style>
    <style:style style:name="ro11" style:family="table-row">
      <style:table-row-properties style:row-height="3.538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top"/>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fo:color="#ffffff" loext:opacity="100%"/>
    </style:style>
    <style:style style:name="P21" style:family="paragraph">
      <loext:graphic-properties draw:fill="solid" draw:fill-color="#34383a" draw:opacity="90%"/>
      <style:paragraph-properties fo:text-align="center"/>
    </style:style>
    <style:style style:name="P22"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fo:font-size="18pt"/>
    </style:style>
    <style:style style:name="T15" style:family="text">
      <style:text-properties fo:font-variant="normal" fo:text-transform="none" fo:color="#ffffff" loext:opacity="100%" style:text-outline="false" style:text-line-through-style="none" style:text-line-through-type="none" style:font-name="Liberation Sans" fo:font-style="normal" fo:text-shadow="none" style:text-underline-style="none" fo:font-weight="normal" style:letter-kerning="true" style:font-name-asian="Nimbus Sans" style:font-style-asian="normal" style:font-weight-asian="normal" style:font-name-complex="FreeSans" style:font-style-complex="normal" style:font-weight-complex="normal" style:text-emphasize="none" style:font-relief="none" style:text-overline-style="none" style:text-overline-color="font-color"/>
    </style:style>
    <style:style style:name="T16" style:family="text">
      <style:text-properties fo:color="#ffffff" loext:opacity="100%"/>
    </style:style>
    <style:style style:name="T17" style:family="text">
      <style:text-properties fo:color="#ffffff" loext:opacity="100%" style:font-name="AppleSystemUIFont" style:font-name-asian="AppleSystemUIFont" style:font-name-complex="AppleSystemUIFont"/>
    </style:style>
    <style:style style:name="T18" style:family="text">
      <style:text-properties fo:color="#ffffff" loext:opacity="100%" style:text-line-through-style="none" style:text-line-through-type="none"/>
    </style:style>
    <style:style style:name="T19" style:family="text">
      <style:text-properties fo:color="#ffffff" loext:opacity="100%" style:text-line-through-style="none" style:text-line-through-type="none" style:font-name="AppleSystemUIFont" style:font-name-asian="AppleSystemUIFont" style:font-name-complex="AppleSystemUIFont"/>
    </style:style>
    <style:style style:name="T2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style:font-name="CaskaydiaCove NFM" fo:font-size="12pt" style:font-size-asian="12pt" style:font-size-complex="12pt"/>
    </style:style>
    <style:style style:name="T22"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3"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5"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6"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0" style:family="text">
      <style:text-properties fo:font-variant="normal" fo:text-transform="none" fo:color="#ffffff" loext:opacity="100%" style:text-outline="false" style:text-line-through-style="none" style:text-line-through-type="none" style:font-name="URW Bookman"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color="#ffffff" loext:opacity="100%" fo:font-style="normal" style:font-style-asian="normal" style:font-style-complex="normal"/>
    </style:style>
    <style:style style:name="T32" style:family="text">
      <style:text-properties fo:color="#ffffff" loext:opacity="100%" style:text-position="super 58%"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7.999cm" svg:height="15.748cm" svg:x="0.001cm" svg:y="0cm">
          <draw:image xlink:href="Pictures/1000000000000780000004387537A11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3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8"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Array Constants</text:p>
              </table:table-cell>
              <table:table-cell table:style-name="ce2">
                <text:p text:style-name="P12">crop, iscft, percrop</text:p>
              </table:table-cell>
            </table:table-row>
            <table:table-row table:style-name="ro2">
              <table:table-cell table:style-name="ce1">
                <text:p text:style-name="P11">Scalar Constants with Observable Outputs</text:p>
              </table:table-cell>
              <table:table-cell table:style-name="ce2">
                <text:p text:style-name="P12">Betavis, cnfac, cpliq, denh2o, grav, hfus, lake_no_ed, lakepuddling, nlevgrnd, nlevlak, nlevsno, tkwat, vkc</text:p>
              </table:table-cell>
            </table:table-row>
            <table:table-row table:style-name="ro3">
              <table:table-cell table:style-name="ce1">
                <text:p text:style-name="P11">Scalar Constants without Observable Outputs</text:p>
              </table:table-cell>
              <table:table-cell table:style-name="ce2">
                <text:p text:style-name="P12">cpice, denice, depthcrit, mixfact, pudz, tkice</text:p>
              </table:table-cell>
            </table:table-row>
          </table:table>
          <draw:image xlink:href="Pictures/TablePreview1.svm" xlink:type="simple" xlink:show="embed" xlink:actuate="onLoad"/>
        </draw:frame>
        <draw:frame draw:style-name="gr9" draw:text-style-name="P13" draw:layer="layout" svg:width="14.63cm" svg:height="4.517cm" svg:x="7.144cm" svg:y="10.504cm">
          <draw:text-box>
            <text:p><text:span text:style-name="T14">Tfrz, tdmax, n2min, and za_lake from LakeTemperature.md not included yet, don’t know if their outputs are observable or not</text:span></text:p>
            <text:p><text:span text:style-name="T14"/></text:p>
            <text:p><text:span text:style-name="T14">This table uses explicitly the constants mentioned in LakeTemperature.md plus the array constants</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Inputs</text:p>
              </table:table-cell>
              <table:table-cell table:style-name="ce4">
                <text:p text:style-name="P15"><text:span text:style-name="T15">col_es%t_grnd</text:span><text:span text:style-name="T16">, </text:span><text:span text:style-name="T15">col_pp%dz</text:span><text:span text:style-name="T16">, </text:span><text:span text:style-name="T15">col_pp%dz_lake</text:span><text:span text:style-name="T16">, </text:span><text:span text:style-name="T15">col_pp%z</text:span><text:span text:style-name="T16">, </text:span><text:span text:style-name="T15">col_pp%z_lake</text:span><text:span text:style-name="T16">, </text:span><text:span text:style-name="T15">col_pp%zi</text:span><text:span text:style-name="T16">, </text:span><text:span text:style-name="T15">col_pp&amp;lakedepth</text:span><text:span text:style-name="T16">, </text:span><text:span text:style-name="T15">col_pp&amp;snl</text:span><text:span text:style-name="T16">, </text:span><text:span text:style-name="T15">col_ws%h2osno</text:span><text:span text:style-name="T16">, </text:span><text:span text:style-name="T15">col_ws%h2osoi_ice</text:span><text:span text:style-name="T16">, </text:span><text:span text:style-name="T15">col_ws%h2osoi_liq, lakestate_vars%etal_col</text:span><text:span text:style-name="T16">, </text:span><text:span text:style-name="T15">lakestate_vars%ks_col</text:span><text:span text:style-name="T16">, </text:span><text:span text:style-name="T15">lakestate_vars%lake_raw_col</text:span><text:span text:style-name="T16">, </text:span><text:span text:style-name="T15">lakestate_vars%ws_col</text:span><text:span text:style-name="T16">, </text:span><text:span text:style-name="T15">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7">solarabs_vars%sabg_patch</text:span></text:p>
              </table:table-cell>
            </table:table-row>
            <table:table-row table:style-name="ro5">
              <table:table-cell table:style-name="ce3">
                <text:p text:style-name="P14">Both Inputs and Outputs</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7">veg_ef%eflx_soil_grnd</text:span></text:p>
              </table:table-cell>
            </table:table-row>
            <table:table-row table:style-name="ro6">
              <table:table-cell table:style-name="ce3">
                <text:p text:style-name="P14">Outputs</text:p>
              </table:table-cell>
              <table:table-cell table:style-name="ce4">
                <text:p text:style-name="P15"><text:span text:style-name="T16">ch4_vars%grnd_ch4_cond_col, col_ef%errsoi, col_es%hc_soi, col_es%hc_soisno, col_wf%qflx_snofrz, col_ws%frac_iceold, lakestate_vars%betaprime_col, </text:span><text:span text:style-name="T18">lakestate_vars%lakeresist_col, </text:span><text:span text:style-name="T19">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10" draw:text-style-name="P17" draw:layer="layout" svg:width="6.25cm" svg:height="12.158cm" svg:x="19.216cm" svg:y="3.257cm">
          <draw:text-box>
            <text:p><text:span text:style-name="T20">netcdf x_times_y {</text:span></text:p>
            <text:p><text:span text:style-name="T20">dimensions:</text:span></text:p>
            <text:p><text:span text:style-name="T20"><text:s text:c="8"/>x = 5 ;</text:span></text:p>
            <text:p><text:span text:style-name="T20"><text:s text:c="8"/>y = 5 ;</text:span></text:p>
            <text:p><text:span text:style-name="T20">variables:</text:span></text:p>
            <text:p><text:span text:style-name="T20"><text:s text:c="8"/>float x(x) ;</text:span></text:p>
            <text:p><text:span text:style-name="T20"><text:s text:c="8"/>float y(y) ;</text:span></text:p>
            <text:p><text:span text:style-name="T20"><text:s text:c="8"/>float z(x, y) ;</text:span></text:p>
            <text:p><text:span text:style-name="T20">data:</text:span></text:p>
            <text:p><text:span text:style-name="T20"/></text:p>
            <text:p><text:span text:style-name="T20"><text:s/>x = -2, -1, 0, 1, 2 ;</text:span></text:p>
            <text:p><text:span text:style-name="T20"/></text:p>
            <text:p><text:span text:style-name="T20"><text:s/>y = -4, -2, 0, 2, 4 ;</text:span></text:p>
            <text:p><text:span text:style-name="T20"/></text:p>
            <text:p><text:span text:style-name="T20"><text:s/>z =</text:span></text:p>
            <text:p><text:span text:style-name="T20"><text:s text:c="2"/>8, 4, -0, -4, -8,</text:span></text:p>
            <text:p><text:span text:style-name="T20"><text:s text:c="2"/>4, 2, -0, -2, -4,</text:span></text:p>
            <text:p><text:span text:style-name="T20"><text:s text:c="2"/>-0, -0, 0, 0, 0,</text:span></text:p>
            <text:p><text:span text:style-name="T20"><text:s text:c="2"/>-4, -2, 0, 2, 4,</text:span></text:p>
            <text:p><text:span text:style-name="T20"><text:s text:c="2"/>-8, -4, 0, 4, 8 ;</text:span></text:p>
            <text:p><text:span text:style-name="T20">}</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1" draw:text-style-name="P17" draw:layer="layout" svg:width="12.394cm" svg:height="8.189cm" svg:x="1.401cm" svg:y="5.582cm">
          <draw:text-box>
            <text:p><text:span text:style-name="T20">betavis</text:span></text:p>
            <text:p><text:span text:style-name="T20">0.0</text:span></text:p>
            <text:p><text:span text:style-name="T20">za_lake</text:span></text:p>
            <text:p><text:span text:style-name="T20">0.6</text:span></text:p>
            <text:p><text:span text:style-name="T20">n2min</text:span></text:p>
            <text:p><text:span text:style-name="T20">7.4999999999999993E-005</text:span></text:p>
            <text:p><text:span text:style-name="T20">tdmax</text:span></text:p>
            <text:p><text:span text:style-name="T20">277.0</text:span></text:p>
            <text:p><text:span text:style-name="T20">pudz</text:span></text:p>
            <text:p><text:span text:style-name="T20">0.0</text:span></text:p>
            <text:p><text:span text:style-name="T20">mixfact</text:span></text:p>
            <text:p><text:span text:style-name="T20">10.0</text:span></text:p>
            <text:p><text:span text:style-name="T20">depthcrit</text:span></text:p>
            <text:p><text:span text:style-name="T20">25.0</text:span></text:p>
          </draw:text-box>
        </draw:frame>
        <draw:frame draw:style-name="gr12" draw:text-style-name="P18" draw:layer="layout" svg:width="12.393cm" svg:height="0.818cm" svg:x="1.401cm" svg:y="4.84cm">
          <draw:text-box>
            <text:p text:style-name="P7"><text:span text:style-name="T21">Constants (formerly lakeparams.txt)</text:span></text:p>
          </draw:text-box>
        </draw:frame>
        <draw:frame draw:style-name="gr13" draw:text-style-name="P17" draw:layer="layout" svg:width="12.394cm" svg:height="7.117cm" svg:x="14.206cm" svg:y="5.583cm">
          <draw:text-box>
            <text:p><text:span text:style-name="T22">{</text:span></text:p>
            <text:p><text:span text:style-name="T23"><text:s text:c="2"/></text:span><text:span text:style-name="T24">"betavis"</text:span><text:span text:style-name="T22">:</text:span><text:span text:style-name="T23"> </text:span><text:span text:style-name="T25">0.0</text:span><text:span text:style-name="T22">,</text:span></text:p>
            <text:p><text:span text:style-name="T23"><text:s text:c="2"/></text:span><text:span text:style-name="T24">"za_lake"</text:span><text:span text:style-name="T22">:</text:span><text:span text:style-name="T23"> </text:span><text:span text:style-name="T25">0.6</text:span><text:span text:style-name="T22">,</text:span></text:p>
            <text:p><text:span text:style-name="T23"><text:s text:c="2"/></text:span><text:span text:style-name="T24">"n2min"</text:span><text:span text:style-name="T22">:</text:span><text:span text:style-name="T23"> </text:span><text:span text:style-name="T25">7.4999999999999993E-005</text:span><text:span text:style-name="T22">,</text:span></text:p>
            <text:p><text:span text:style-name="T23"><text:s text:c="2"/></text:span><text:span text:style-name="T24">"tdmax"</text:span><text:span text:style-name="T22">:</text:span><text:span text:style-name="T23"> </text:span><text:span text:style-name="T25">277.0</text:span><text:span text:style-name="T22">,</text:span></text:p>
            <text:p><text:span text:style-name="T23"><text:s text:c="2"/></text:span><text:span text:style-name="T24">"pudz"</text:span><text:span text:style-name="T22">:</text:span><text:span text:style-name="T23"> </text:span><text:span text:style-name="T25">0.0</text:span><text:span text:style-name="T22">,</text:span></text:p>
            <text:p><text:span text:style-name="T23"><text:s text:c="2"/></text:span><text:span text:style-name="T24">"mixfact"</text:span><text:span text:style-name="T22">:</text:span><text:span text:style-name="T23"> </text:span><text:span text:style-name="T25">10.0</text:span><text:span text:style-name="T22">,</text:span></text:p>
            <text:p><text:span text:style-name="T23"><text:s text:c="2"/></text:span><text:span text:style-name="T24">"depthcrit"</text:span><text:span text:style-name="T22">:</text:span><text:span text:style-name="T23"> </text:span><text:span text:style-name="T25">25.0</text:span></text:p>
            <text:p><text:span text:style-name="T22">}</text:span></text:p>
          </draw:text-box>
        </draw:frame>
        <draw:frame draw:style-name="gr12" draw:text-style-name="P18" draw:layer="layout" svg:width="12.393cm" svg:height="0.818cm" svg:x="14.206cm" svg:y="4.841cm">
          <draw:text-box>
            <text:p text:style-name="P7"><text:span text:style-name="T21">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4" draw:text-style-name="P17" draw:layer="layout" svg:width="25.193cm" svg:height="3.146cm" svg:x="1.406cm" svg:y="9.673cm">
          <draw:text-box>
            <text:p><text:span text:style-name="T22">{</text:span></text:p>
            <text:p><text:span text:style-name="T23"><text:s text:c="2"/></text:span><text:span text:style-name="T24">"veg_ef%eflx_soil_grnd"</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p>
            <text:p><text:span text:style-name="T23"><text:s text:c="2"/></text:span><text:span text:style-name="T24">"veg_ef%eflx_gnet"</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span text:style-name="T23"> </text:span><text:span text:style-name="T25">...</text:span><text:span text:style-name="T22">],</text:span></text:p>
            <text:p><text:span text:style-name="T23"><text:s text:c="2"/></text:span><text:span text:style-name="T25">...</text:span></text:p>
            <text:p><text:span text:style-name="T22">}</text:span></text:p>
          </draw:text-box>
        </draw:frame>
        <draw:frame draw:style-name="gr12" draw:text-style-name="P18" draw:layer="layout" svg:width="20.304cm" svg:height="0.818cm" svg:x="3.848cm" svg:y="8.931cm">
          <draw:text-box>
            <text:p text:style-name="P7"><text:span text:style-name="T21">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6">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17" draw:layer="layout" svg:width="12.394cm" svg:height="8.279cm" svg:x="1.411cm" svg:y="4.839cm">
          <draw:text-box>
            <text:p><text:span text:style-name="T22">[</text:span></text:p>
            <text:p><text:span text:style-name="T22"><text:s text:c="2"/>{</text:span></text:p>
            <text:p><text:span text:style-name="T23"><text:s text:c="4"/></text:span><text:span text:style-name="T24">"betavis"</text:span><text:span text:style-name="T22">:</text:span><text:span text:style-name="T23"> </text:span><text:span text:style-name="T25">0.0</text:span><text:span text:style-name="T22">,</text:span></text:p>
            <text:p><text:span text:style-name="T22"><text:s text:c="4"/>...</text:span></text:p>
            <text:p><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25</text:span><text:span text:style-name="T22">,</text:span></text:p>
            <text:p text:style-name="P19"><text:span text:style-name="T22"><text:s text:c="4"/>...</text:span></text:p>
            <text:p text:style-name="P19"><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5</text:span><text:span text:style-name="T22">,</text:span></text:p>
            <text:p text:style-name="P19"><text:span text:style-name="T22"><text:s text:c="4"/>...</text:span></text:p>
            <text:p text:style-name="P19"><text:span text:style-name="T22"><text:s text:c="2"/>}</text:span></text:p>
            <text:p><text:span text:style-name="T22">]</text:span></text:p>
          </draw:text-box>
        </draw:frame>
        <draw:frame draw:style-name="gr12" draw:text-style-name="P18" draw:layer="layout" svg:width="12.393cm" svg:height="0.818cm" svg:x="1.411cm" svg:y="4.097cm">
          <draw:text-box>
            <text:p text:style-name="P7"><text:span text:style-name="T21">Sample Group Data (JSON for illustration)</text:span></text:p>
          </draw:text-box>
        </draw:frame>
        <draw:frame draw:style-name="gr15" draw:text-style-name="P17" draw:layer="layout" svg:width="12.739cm" svg:height="8.279cm" svg:x="14.205cm" svg:y="4.839cm">
          <draw:text-box>
            <text:p><text:span text:style-name="T22">[</text:span></text:p>
            <text:p><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0</text:span><text:span text:style-name="T22">,</text:span><text:span text:style-name="T23"> </text:span><text:span text:style-name="T29">...</text:span><text:span text:style-name="T22">],</text:span></text:p>
            <text:p text:style-name="P19"><text:span text:style-name="T23"><text:s text:c="4"/></text:span><text:span text:style-name="T29">...</text:span></text:p>
            <text:p><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2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text:span text:style-name="T22">]</text:span></text:p>
          </draw:text-box>
        </draw:frame>
        <draw:frame draw:style-name="gr12" draw:text-style-name="P18" draw:layer="layout" svg:width="12.393cm" svg:height="0.818cm" svg:x="14.205cm" svg:y="4.097cm">
          <draw:text-box>
            <text:p text:style-name="P7"><text:span text:style-name="T21">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6" draw:text-style-name="P13" draw:layer="layout" svg:width="8.561cm" svg:height="1.543cm" svg:x="0.96cm" svg:y="6.473cm">
            <draw:text-box>
              <text:p>Interface</text:p>
            </draw:text-box>
          </draw:frame>
        </draw:g>
        <draw:frame draw:style-name="gr16" draw:text-style-name="P13" draw:layer="layout" svg:width="5.325cm" svg:height="1.543cm" svg:x="20.639cm" svg:y="6.473cm">
          <draw:text-box>
            <text:p>UML Diagram</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8.071cm" svg:x="1.785cm" svg:y="3.418cm">
          <table:table table:template-name="default" table:use-first-row-styles="true" table:use-banding-rows-styles="true">
            <table:table-column table:style-name="co5"/>
            <table:table-column table:style-name="co6"/>
            <table:table-row table:style-name="ro7">
              <table:table-cell table:style-name="ce1">
                <text:p text:style-name="P11">CSV Index Sampling</text:p>
              </table:table-cell>
              <table:table-cell table:style-name="ce2">
                <text:p text:style-name="P20"><text:span text:style-name="T30">Applies combinatorial testing using CSV files generated by NIST’s ACTS (short, high level description)</text:span></text:p>
                <text:p text:style-name="P20"><text:span text:style-name="T30"/></text:p>
                <text:p text:style-name="P20"><text:span text:style-name="T30">Uses CSV files ge</text:span><text:span text:style-name="T16">nerated by </text:span><text:span text:style-name="T8">ACTS </text:span><text:span text:style-name="T31">(Automated Combinatorial Testing for Software)</text:span><text:span text:style-name="T32">1</text:span><text:span text:style-name="T31"> to create samples. It will take the largest index and use that to linearly interpolate between the values for each constant found in the ranges file</text:span></text:p>
              </table:table-cell>
            </table:table-row>
            <table:table-row table:style-name="ro7">
              <table:table-cell table:style-name="ce1">
                <text:p text:style-name="P11">Order Sampling</text:p>
              </table:table-cell>
              <table:table-cell table:style-name="ce2">
                <text:p text:style-name="P12">Uses JSON files called “orders” to create “lines” in the input space (the constants), through linear interpolation</text:p>
              </table:table-cell>
            </table:table-row>
          </table:table>
          <draw:image xlink:href="Pictures/TablePreview3.svm" xlink:type="simple" xlink:show="embed" xlink:actuate="onLoad"/>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6" draw:text-style-name="P13" draw:layer="layout" svg:width="8.561cm" svg:height="1.543cm" svg:x="0.496cm" svg:y="2.825cm">
          <draw:text-box>
            <text:p>Interfaces</text:p>
          </draw:text-box>
        </draw:frame>
        <draw:frame draw:style-name="gr16" draw:text-style-name="P13" draw:layer="layout" svg:width="5.325cm" svg:height="1.543cm" svg:x="20.022cm" svg:y="3.257cm">
          <draw:text-box>
            <text:p>UML Diagram</text:p>
          </draw:text-box>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8" draw:layer="layout" svg:width="26.399cm" svg:height="11.10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1">
              <table:table-cell table:number-rows-spanned="3">
                <text:p text:style-name="P11">Per Sample Analyzers</text:p>
              </table:table-cell>
              <table:table-cell>
                <text:p text:style-name="P11">Change Detection</text:p>
              </table:table-cell>
              <table:table-cell table:style-name="ce2">
                <text:p><text:span text:style-name="T16">Identifies, per sample group, which inputs and outputs differ at some point from the reference</text:span></text:p>
              </table:table-cell>
            </table:table-row>
            <table:table-row table:style-name="ro9" table:default-cell-style-name="ce1">
              <table:covered-table-cell/>
              <table:table-cell>
                <text:p text:style-name="P11">Differences</text:p>
              </table:table-cell>
              <table:table-cell table:style-name="ce5">
                <text:p text:style-name="P12">Finds differences between values in the reference data and the current sample’s data. It records the indices of the difference, the two differing values, and the difference between them.</text:p>
              </table:table-cell>
            </table:table-row>
            <table:table-row table:style-name="ro10" table:default-cell-style-name="ce1">
              <table:covered-table-cell/>
              <table:table-cell>
                <text:p text:style-name="P11">NetCDF4 Output</text:p>
              </table:table-cell>
              <table:table-cell table:style-name="ce2">
                <text:p><text:span text:style-name="T16">Stores each sample group as an individual NetCDF file, to be used for graphing changes based on our samples. To do this, it just adds a new dimension “sample_index” and layers each sample’s NetCDF file on top of the others using that. </text:span></text:p>
              </table:table-cell>
            </table:table-row>
            <table:table-row table:style-name="ro11" table:default-cell-style-name="ce1">
              <table:table-cell>
                <text:p text:style-name="P11">Sample Group Analyzer</text:p>
              </table:table-cell>
              <table:table-cell>
                <text:p text:style-name="P11">Fault Finding</text:p>
              </table:table-cell>
              <table:table-cell table:style-name="ce2">
                <text:p><text:span text:style-name="T16">Uses “check” functions defined by the plugin user to make assertions about values in the sample data, similar to a unit testing framework but with assertions pertaining to model values rather than specific function behavior</text:span></text:p>
              </table:table-cell>
            </table:table-row>
          </table:table>
          <draw:image xlink:href="Pictures/TablePreview4.svm" xlink:type="simple" xlink:show="embed" xlink:actuate="onLoad"/>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7" draw:text-style-name="P21" draw:layer="layout" svg:width="18.129cm" svg:height="7.095cm" svg:x="4.936cm" svg:y="4.328cm">
          <text:p/>
          <draw:enhanced-geometry svg:viewBox="0 0 21600 21600" draw:type="rectangle" draw:enhanced-path="M 0 0 L 21600 0 21600 21600 0 21600 0 0 Z N"/>
        </draw:custom-shape>
        <draw:custom-shape draw:style-name="gr18" draw:text-style-name="P22"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9T14:58:26.461087000</dc:date>
    <meta:editing-duration>PT9H58M46S</meta:editing-duration>
    <meta:editing-cycles>48</meta:editing-cycles>
    <meta:print-date>2026-02-19T14:55:55.204722000</meta:print-date>
    <meta:printed-by>PDF files</meta:printed-by>
    <meta:document-statistic meta:object-count="139"/>
  </office:meta>
</office:document-meta>
</file>