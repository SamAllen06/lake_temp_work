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21949E9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CaskaydiaCove NFM" svg:font-family="'CaskaydiaCove NFM'"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7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0.492cm" loext:decorative="false"/>
      <style:paragraph-properties style:writing-mode="lr-tb"/>
    </style:style>
    <style:style style:name="gr5"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6"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602cm" loext:decorative="false"/>
      <style:paragraph-properties style:writing-mode="lr-tb"/>
    </style:style>
    <style:style style:name="gr7"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342cm" loext:decorative="false"/>
      <style:paragraph-properties style:writing-mode="lr-tb"/>
    </style:style>
    <style:style style:name="gr8"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366cm" loext:decorative="false"/>
      <style:paragraph-properties style:writing-mode="lr-tb"/>
    </style:style>
    <style:style style:name="gr9"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0"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564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solid" draw:fill-color="#202020"/>
      <style:text-properties style:font-name="CaskaydiaCove NFM" fo:font-size="12pt" style:font-size-asian="12pt" style:font-size-complex="12pt"/>
    </style:style>
    <style:style style:name="P5" style:family="paragraph">
      <style:paragraph-properties fo:text-align="center"/>
    </style:style>
    <style:style style:name="P6" style:family="paragraph">
      <loext:graphic-properties draw:fill="none" draw:fill-color="#ffffff"/>
      <style:paragraph-properties fo:text-align="center"/>
      <style:text-properties style:font-name="CaskaydiaCove NFM" fo:font-size="12pt" style:font-size-asian="12pt" style:font-size-complex="12pt"/>
    </style:style>
    <style:style style:name="P7" style:family="paragraph">
      <style:paragraph-properties fo:margin-left="0cm" fo:margin-right="0cm" fo:margin-top="0cm" fo:margin-bottom="0cm" fo:line-height="100%" fo:text-indent="0cm"/>
    </style:style>
    <style:style style:name="P8" style:family="paragraph">
      <loext:graphic-properties draw:fill="solid" draw:fill-color="#34383a" draw:opacity="90%"/>
      <style:paragraph-properties fo:text-align="center"/>
    </style:style>
    <style:style style:name="P9"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font-name="Liberation Mono"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8" style:family="text">
      <style:text-properties style:font-name="CaskaydiaCove NFM" fo:font-size="12pt" style:font-size-asian="12pt" style:font-size-complex="12pt"/>
    </style:style>
    <style:style style:name="T9"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10"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11"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12"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13"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5"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564cm" svg:x="1.4cm" svg:y="7.967cm" presentation:class="subtitle" presentation:user-transformed="true">
          <draw:text-box>
            <text:p><text:span text:style-name="T2">Slides by Aidan Bensch</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draw:text-box>
            <text:list text:style-name="L2">
              <text:list-item>
                <text:p>We are testing a module of <text:span text:style-name="T3"><text:a xlink:href="https://e3sm.org/" xlink:type="simple">E3SM</text:a></text:span><text:span text:style-name="T4">,</text:span> an environmental model. This module, <text:span text:style-name="T5">LakeTemperature</text:span><text:span text:style-name="T6">,</text:span> is part of the greater <text:span text:style-name="T4">ELM</text:span> <text:span text:style-name="T4">(E3SM Land Model)</text:span> which was originally a fork of the <text:span text:style-name="T4">CLM (Community Land Model).</text:span></text:p>
              </text:list-item>
              <text:list-item>
                <text:p>We are able to test specifically this module using <text:span text:style-name="T3"><text:a xlink:href="https://github.com/peterdschwartz/SPEL_OpenACC" xlink:type="simple">SPEL</text:a></text:span><text:span text:style-name="T4">,</text:span> a software that adds a <text:span text:style-name="T4">NetCDF</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inpu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text:span><text:span text:style-name="T1">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2" draw:text-style-name="P3" draw:layer="layout" svg:width="27.999cm" svg:height="15.748cm" svg:x="0.001cm" svg:y="0cm">
          <draw:image xlink:href="Pictures/10000000000007800000043821949E98.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item>
              <text:list-item>
                <text:p><text:span text:style-name="T1">elmtest.exe</text:span> is run once for each sample.</text:p>
              </text:list-item>
            </text:list>
          </draw:text-box>
        </draw:frame>
        <draw:frame draw:style-name="gr3" draw:text-style-name="P4" draw:layer="layout" svg:width="12.394cm" svg:height="7.125cm" svg:x="1.4cm" svg:y="8.272cm">
          <draw:text-box>
            <text:p><text:span text:style-name="T7">betavis</text:span></text:p>
            <text:p><text:span text:style-name="T7">0.0</text:span></text:p>
            <text:p><text:span text:style-name="T7">za_lake</text:span></text:p>
            <text:p><text:span text:style-name="T7">0.6</text:span></text:p>
            <text:p><text:span text:style-name="T7">n2min</text:span></text:p>
            <text:p><text:span text:style-name="T7">7.4999999999999993E-005</text:span></text:p>
            <text:p><text:span text:style-name="T7">tdmax</text:span></text:p>
            <text:p><text:span text:style-name="T7">277.0</text:span></text:p>
            <text:p><text:span text:style-name="T7">pudz</text:span></text:p>
            <text:p><text:span text:style-name="T7">0.0</text:span></text:p>
            <text:p><text:span text:style-name="T7">mixfact</text:span></text:p>
            <text:p><text:span text:style-name="T7">10.0</text:span></text:p>
            <text:p><text:span text:style-name="T7">depthcrit</text:span></text:p>
            <text:p><text:span text:style-name="T7">25.0</text:span></text:p>
          </draw:text-box>
        </draw:frame>
        <draw:frame draw:style-name="gr4" draw:text-style-name="P6" draw:layer="layout" svg:width="12.393cm" svg:height="0.742cm" svg:x="1.4cm" svg:y="7.53cm">
          <draw:text-box>
            <text:p text:style-name="P5"><text:span text:style-name="T8">Constants (formerly lakeparams.txt)</text:span></text:p>
          </draw:text-box>
        </draw:frame>
        <draw:frame draw:style-name="gr5" draw:text-style-name="P4" draw:layer="layout" svg:width="12.394cm" svg:height="7.117cm" svg:x="14.205cm" svg:y="8.273cm">
          <draw:text-box>
            <text:p><text:span text:style-name="T9">{</text:span></text:p>
            <text:p><text:span text:style-name="T10"><text:s text:c="2"/></text:span><text:span text:style-name="T11">"betavis"</text:span><text:span text:style-name="T9">:</text:span><text:span text:style-name="T10"> </text:span><text:span text:style-name="T12">0.0</text:span><text:span text:style-name="T9">,</text:span></text:p>
            <text:p><text:span text:style-name="T10"><text:s text:c="2"/></text:span><text:span text:style-name="T11">"za_lake"</text:span><text:span text:style-name="T9">:</text:span><text:span text:style-name="T10"> </text:span><text:span text:style-name="T12">0.6</text:span><text:span text:style-name="T9">,</text:span></text:p>
            <text:p><text:span text:style-name="T10"><text:s text:c="2"/></text:span><text:span text:style-name="T11">"n2min"</text:span><text:span text:style-name="T9">:</text:span><text:span text:style-name="T10"> </text:span><text:span text:style-name="T12">7.4999999999999993E-005</text:span><text:span text:style-name="T9">,</text:span></text:p>
            <text:p><text:span text:style-name="T10"><text:s text:c="2"/></text:span><text:span text:style-name="T11">"tdmax"</text:span><text:span text:style-name="T9">:</text:span><text:span text:style-name="T10"> </text:span><text:span text:style-name="T12">277.0</text:span><text:span text:style-name="T9">,</text:span></text:p>
            <text:p><text:span text:style-name="T10"><text:s text:c="2"/></text:span><text:span text:style-name="T11">"pudz"</text:span><text:span text:style-name="T9">:</text:span><text:span text:style-name="T10"> </text:span><text:span text:style-name="T12">0.0</text:span><text:span text:style-name="T9">,</text:span></text:p>
            <text:p><text:span text:style-name="T10"><text:s text:c="2"/></text:span><text:span text:style-name="T11">"mixfact"</text:span><text:span text:style-name="T9">:</text:span><text:span text:style-name="T10"> </text:span><text:span text:style-name="T12">10.0</text:span><text:span text:style-name="T9">,</text:span></text:p>
            <text:p><text:span text:style-name="T10"><text:s text:c="2"/></text:span><text:span text:style-name="T11">"depthcrit"</text:span><text:span text:style-name="T9">:</text:span><text:span text:style-name="T10"> </text:span><text:span text:style-name="T12">25.0</text:span></text:p>
            <text:p><text:span text:style-name="T9">}</text:span></text:p>
          </draw:text-box>
        </draw:frame>
        <draw:frame draw:style-name="gr4" draw:text-style-name="P6" draw:layer="layout" svg:width="12.393cm" svg:height="0.742cm" svg:x="14.205cm" svg:y="7.531cm">
          <draw:text-box>
            <text:p text:style-name="P5"><text:span text:style-name="T8">Example Sample (JSON used for illustration)</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text:span><text:span text:style-name="T1">outputs0001.nc</text:span> file in the form of multidimensional <text:span text:style-name="T1">numpy</text:span> arrays.</text:p>
              </text:list-item>
            </text:list>
          </draw:text-box>
        </draw:frame>
        <draw:frame draw:style-name="gr6" draw:text-style-name="P4" draw:layer="layout" svg:width="25.193cm" svg:height="2.852cm" svg:x="1.4cm" svg:y="8.993cm">
          <draw:text-box>
            <text:p><text:span text:style-name="T9">{</text:span></text:p>
            <text:p><text:span text:style-name="T10"><text:s text:c="2"/></text:span><text:span text:style-name="T11">"veg_ef%eflx_soil_grnd"</text:span><text:span text:style-name="T9">:</text:span><text:span text:style-name="T10"> </text:span><text:span text:style-name="T9">[</text:span><text:span text:style-name="T12">0.0</text:span><text:span text:style-name="T9">,</text:span><text:span text:style-name="T10"> </text:span><text:span text:style-name="T12">...</text:span><text:span text:style-name="T9">],</text:span></text:p>
            <text:p><text:span text:style-name="T10"><text:s text:c="2"/></text:span><text:span text:style-name="T11">"veg_ef%eflx_gnet"</text:span><text:span text:style-name="T9">:</text:span><text:span text:style-name="T10"> </text:span><text:span text:style-name="T9">[[</text:span><text:span text:style-name="T12">0.0</text:span><text:span text:style-name="T9">,</text:span><text:span text:style-name="T10"> </text:span><text:span text:style-name="T12">...</text:span><text:span text:style-name="T9">],</text:span><text:span text:style-name="T10"> </text:span><text:span text:style-name="T12">...</text:span><text:span text:style-name="T9">],</text:span></text:p>
            <text:p><text:span text:style-name="T10"><text:s text:c="2"/></text:span><text:span text:style-name="T12">...</text:span></text:p>
            <text:p><text:span text:style-name="T9">}</text:span></text:p>
          </draw:text-box>
        </draw:frame>
        <draw:frame draw:style-name="gr4" draw:text-style-name="P6" draw:layer="layout" svg:width="20.304cm" svg:height="0.742cm" svg:x="3.842cm" svg:y="8.251cm">
          <draw:text-box>
            <text:p text:style-name="P5"><text:span text:style-name="T8">Outputs Received by Analysis Plugins (JSON for illustration)</text:span></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n ordered grouping of samples</text:p>
              </text:list-item>
              <text:list-item>
                <text:p>Analysis plugins can analyze the result of multiple consecutive runs of <text:span text:style-name="T1">elmtest.exe</text:span> in context this way.</text:p>
              </text:list-item>
            </text:list>
          </draw:text-box>
        </draw:frame>
        <draw:frame draw:style-name="gr7" draw:text-style-name="P4" draw:layer="layout" svg:width="12.394cm" svg:height="7.592cm" svg:x="1.411cm" svg:y="7.974cm">
          <draw:text-box>
            <text:p><text:span text:style-name="T9">[</text:span></text:p>
            <text:p><text:span text:style-name="T9"><text:s text:c="2"/>{</text:span></text:p>
            <text:p><text:span text:style-name="T10"><text:s text:c="4"/></text:span><text:span text:style-name="T11">"betavis"</text:span><text:span text:style-name="T9">:</text:span><text:span text:style-name="T10"> </text:span><text:span text:style-name="T12">0.0</text:span><text:span text:style-name="T9">,</text:span></text:p>
            <text:p><text:span text:style-name="T9"><text:s text:c="4"/>...</text:span></text:p>
            <text:p><text:span text:style-name="T9"><text:s text:c="2"/>},</text:span></text:p>
            <text:p text:style-name="P7"><text:span text:style-name="T9"><text:s text:c="2"/>{</text:span></text:p>
            <text:p text:style-name="P7"><text:span text:style-name="T10"><text:s text:c="4"/></text:span><text:span text:style-name="T11">"betavis"</text:span><text:span text:style-name="T9">:</text:span><text:span text:style-name="T10"> </text:span><text:span text:style-name="T12">0.25</text:span><text:span text:style-name="T9">,</text:span></text:p>
            <text:p text:style-name="P7"><text:span text:style-name="T9"><text:s text:c="4"/>...</text:span></text:p>
            <text:p text:style-name="P7"><text:span text:style-name="T9"><text:s text:c="2"/>},</text:span></text:p>
            <text:p text:style-name="P7"><text:span text:style-name="T9"><text:s text:c="2"/>{</text:span></text:p>
            <text:p text:style-name="P7"><text:span text:style-name="T10"><text:s text:c="4"/></text:span><text:span text:style-name="T11">"betavis"</text:span><text:span text:style-name="T9">:</text:span><text:span text:style-name="T10"> </text:span><text:span text:style-name="T12">0.5</text:span><text:span text:style-name="T9">,</text:span></text:p>
            <text:p text:style-name="P7"><text:span text:style-name="T9"><text:s text:c="4"/>...</text:span></text:p>
            <text:p text:style-name="P7"><text:span text:style-name="T9"><text:s text:c="2"/>}</text:span></text:p>
            <text:p><text:span text:style-name="T9">]</text:span></text:p>
          </draw:text-box>
        </draw:frame>
        <draw:frame draw:style-name="gr4" draw:text-style-name="P6" draw:layer="layout" svg:width="12.393cm" svg:height="0.742cm" svg:x="1.411cm" svg:y="7.232cm">
          <draw:text-box>
            <text:p text:style-name="P5"><text:span text:style-name="T8">Sample Group Data (JSON for illustration)</text:span></text:p>
          </draw:text-box>
        </draw:frame>
        <draw:frame draw:style-name="gr8" draw:text-style-name="P4" draw:layer="layout" svg:width="12.739cm" svg:height="7.616cm" svg:x="14.205cm" svg:y="7.974cm">
          <draw:text-box>
            <text:p><text:span text:style-name="T9">[</text:span></text:p>
            <text:p><text:span text:style-name="T10"><text:s text:c="2"/></text:span><text:span text:style-name="T9">{</text:span></text:p>
            <text:p text:style-name="P7"><text:span text:style-name="T13"><text:s text:c="4"/></text:span><text:span text:style-name="T14">"lakestate_vars%betaprime_col</text:span><text:span text:style-name="T11">"</text:span><text:span text:style-name="T9">:</text:span><text:span text:style-name="T10"> </text:span><text:span text:style-name="T9">[</text:span><text:span text:style-name="T12">0.0</text:span><text:span text:style-name="T9">,</text:span><text:span text:style-name="T10"> </text:span><text:span text:style-name="T15">...</text:span><text:span text:style-name="T9">],</text:span></text:p>
            <text:p text:style-name="P7"><text:span text:style-name="T10"><text:s text:c="4"/></text:span><text:span text:style-name="T15">...</text:span></text:p>
            <text:p><text:span text:style-name="T10"><text:s text:c="2"/></text:span><text:span text:style-name="T9">},</text:span></text:p>
            <text:p text:style-name="P7"><text:span text:style-name="T10"><text:s text:c="2"/></text:span><text:span text:style-name="T9">{</text:span></text:p>
            <text:p text:style-name="P7"><text:span text:style-name="T13"><text:s text:c="4"/></text:span><text:span text:style-name="T14">"lakestate_vars%betaprime_col</text:span><text:span text:style-name="T11">"</text:span><text:span text:style-name="T9">:</text:span><text:span text:style-name="T10"> </text:span><text:span text:style-name="T9">[</text:span><text:span text:style-name="T12">0.25</text:span><text:span text:style-name="T9">,</text:span><text:span text:style-name="T10"> </text:span><text:span text:style-name="T15">...</text:span><text:span text:style-name="T9">],</text:span></text:p>
            <text:p text:style-name="P7"><text:span text:style-name="T10"><text:s text:c="4"/></text:span><text:span text:style-name="T15">...</text:span></text:p>
            <text:p text:style-name="P7"><text:span text:style-name="T10"><text:s text:c="2"/></text:span><text:span text:style-name="T9">},</text:span></text:p>
            <text:p text:style-name="P7"><text:span text:style-name="T10"><text:s text:c="2"/></text:span><text:span text:style-name="T9">{</text:span></text:p>
            <text:p text:style-name="P7"><text:span text:style-name="T13"><text:s text:c="4"/></text:span><text:span text:style-name="T14">"lakestate_vars%betaprime_col</text:span><text:span text:style-name="T11">"</text:span><text:span text:style-name="T9">:</text:span><text:span text:style-name="T10"> </text:span><text:span text:style-name="T9">[</text:span><text:span text:style-name="T12">0.5</text:span><text:span text:style-name="T9">,</text:span><text:span text:style-name="T10"> </text:span><text:span text:style-name="T15">...</text:span><text:span text:style-name="T9">],</text:span></text:p>
            <text:p text:style-name="P7"><text:span text:style-name="T10"><text:s text:c="4"/></text:span><text:span text:style-name="T15">...</text:span></text:p>
            <text:p text:style-name="P7"><text:span text:style-name="T10"><text:s text:c="2"/></text:span><text:span text:style-name="T9">}</text:span></text:p>
            <text:p><text:span text:style-name="T9">]</text:span></text:p>
          </draw:text-box>
        </draw:frame>
        <draw:frame draw:style-name="gr4" draw:text-style-name="P6" draw:layer="layout" svg:width="12.393cm" svg:height="0.742cm" svg:x="14.205cm" svg:y="7.232cm">
          <draw:text-box>
            <text:p text:style-name="P5"><text:span text:style-name="T8">Ordered Output Data (JSON for illustration)</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9.134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ich is called each time <text:span text:style-name="T1">elmtest.exe</text:span> is run, and receives the outputs produced by that specific sample.</text:p>
              </text:list-item>
              <text:list-item>
                <text:p>“Sample group” plugins define a subclass of <text:span text:style-name="T1">SampleGroupAnalyzer</text:span>, which is called after all samples in a group are run through <text:span text:style-name="T1">elmtest.exe</text:span>, and it receives all outputs from each.</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custom-shape draw:style-name="gr9" draw:text-style-name="P8" draw:layer="layout" svg:width="18.129cm" svg:height="7.095cm" svg:x="4.936cm" svg:y="4.328cm">
          <text:p/>
          <draw:enhanced-geometry svg:viewBox="0 0 21600 21600" draw:type="rectangle" draw:enhanced-path="M 0 0 L 21600 0 21600 21600 0 21600 0 0 Z N"/>
        </draw:custom-shape>
        <draw:custom-shape draw:style-name="gr10" draw:text-style-name="P9"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CaskaydiaCove NFM" svg:font-family="'CaskaydiaCove NFM'"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5.8.4.2$Linux_X86_64 LibreOffice_project/580$Build-2</meta:generator>
    <dc:date>2026-01-20T13:21:28.122693797</dc:date>
    <meta:editing-duration>PT34M40S</meta:editing-duration>
    <meta:editing-cycles>16</meta:editing-cycles>
    <meta:print-date>2026-01-12T22:56:30.859734692</meta:print-date>
    <meta:printed-by>PDF files</meta:printed-by>
    <meta:document-statistic meta:object-count="82"/>
  </office:meta>
</office:document-meta>
</file>