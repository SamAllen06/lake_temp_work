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1000000100000274000000723E6A5260.png" manifest:media-type="image/png"/>
  <manifest:file-entry manifest:full-path="Pictures/10000001000001A0000000588FC6596C.png" manifest:media-type="image/png"/>
  <manifest:file-entry manifest:full-path="Pictures/10000001000001CA0000005E8C527B2D.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312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loext:decorative="false"/>
    </style:style>
    <style:style style:name="gr6" style:family="graphic" style:parent-style-name="Object_20_with_20_no_20_fill_20_and_20_no_20_line">
      <style:graphic-properties draw:stroke="solid" svg:stroke-width="0.025cm" svg:stroke-color="#ffffff" draw:marker-start-width="0.237cm" draw:marker-end-width="0.237cm"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false" fo:min-height="2.321cm" fo:min-width="4.016cm" loext:decorative="false"/>
      <style:paragraph-properties style:writing-mode="lr-tb"/>
    </style:style>
    <style:style style:name="gr8"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7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492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602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342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366cm" loext:decorative="false"/>
      <style:paragraph-properties style:writing-mode="lr-tb"/>
    </style:style>
    <style:style style:name="gr15"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6"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564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2pt" style:font-size-asian="12pt" style:font-size-complex="12pt"/>
    </style:style>
    <style:style style:name="P5" style:family="paragraph">
      <style:text-properties fo:font-style="italic" style:font-style-asian="italic" style:font-style-complex="italic"/>
    </style:style>
    <style:style style:name="P6" style:family="paragraph">
      <loext:graphic-properties draw:fill="solid" draw:fill-color="#202020"/>
      <style:text-properties style:font-name="CaskaydiaCove NFM" fo:font-size="12pt" style:font-size-asian="12pt" style:font-size-complex="12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style:text-properties fo:font-size="15pt" style:font-size-asian="15pt" style:font-size-complex="15pt"/>
    </style:style>
    <style:style style:name="P10" style:family="paragraph">
      <loext:graphic-properties draw:fill="none" draw:fill-color="#ffffff"/>
      <style:text-properties fo:font-size="15pt" style:font-size-asian="15pt" style:font-size-complex="15pt"/>
    </style:style>
    <style:style style:name="P11" style:family="paragraph">
      <style:paragraph-properties fo:text-align="center"/>
      <style:text-properties fo:font-size="15pt" style:font-size-asian="15pt" style:font-size-complex="15pt"/>
    </style:style>
    <style:style style:name="P12" style:family="paragraph">
      <loext:graphic-properties draw:fill="none" draw:fill-color="#ffffff"/>
      <style:paragraph-properties fo:text-align="center"/>
      <style:text-properties fo:font-size="15pt" style:font-size-asian="15pt" style:font-size-complex="15pt"/>
    </style:style>
    <style:style style:name="P13" style:family="paragraph">
      <loext:graphic-properties draw:fill="none" draw:fill-color="#ffffff"/>
      <style:paragraph-properties fo:text-align="center"/>
      <style:text-properties style:font-name="CaskaydiaCove NFM" fo:font-size="12pt" style:font-size-asian="12pt" style:font-size-complex="12pt"/>
    </style:style>
    <style:style style:name="P14" style:family="paragraph">
      <style:paragraph-properties fo:margin-left="0cm" fo:margin-right="0cm" fo:margin-top="0cm" fo:margin-bottom="0cm" fo:line-height="100%" fo:text-indent="0cm"/>
    </style:style>
    <style:style style:name="P15" style:family="paragraph">
      <loext:graphic-properties draw:fill="solid" draw:fill-color="#34383a" draw:opacity="90%"/>
      <style:paragraph-properties fo:text-align="center"/>
    </style:style>
    <style:style style:name="P16"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ize="10pt" style:font-size-asian="10pt" style:font-size-complex="10pt"/>
    </style:style>
    <style:style style:name="T11"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2" style:family="text">
      <style:text-properties fo:font-size="7pt" style:font-size-asian="7pt" style:font-size-complex="7pt"/>
    </style:style>
    <style:style style:name="T13" style:family="text">
      <style:text-properties style:font-name="CaskaydiaCove NFM" fo:font-size="12pt" style:font-size-asian="12pt" style:font-size-complex="12pt"/>
    </style:style>
    <style:style style:name="T14"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5"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6"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17"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18"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0"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list text:style-name="L2">
              <text:list-header>
                <text:p text:style-name="P3"><text:span text:style-name="T9">1. “E3SM - Energy Exascale Earth System Model,” E3SM - Energy Exascale Earth System Model, Nov. 18, 2025. https://e3sm.org/ (accessed Feb. 03, 2026).</text:span></text:p>
                <text:p text:style-name="P3"><text:span text:style-name="T9">2. peterdschwartz, “GitHub - peterdschwartz/SPEL_OpenACC: Python tool designed for E3SM Land Model to create unit-tests and code-insertion of GPU compiler directives.,” GitHub, 2025. https://github.com/peterdschwartz/SPEL_OpenACC (accessed Feb. 03, 2026).</text:span></text:p>
                <text:p text:style-name="P3"><text:span text:style-name="T10">3. “Unidata | NetCDF,” Ucar.edu, 2023. https://www.unidata.ucar.edu/software/netcdf</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draw:text-box>
            <text:list text:style-name="L2">
              <text:list-item>
                <text:p>Constants control how the model behaves and manipulates data.</text:p>
              </text:list-item>
              <text:list-item>
                <text:p>Inputs provide starting data for the model.</text:p>
              </text:list-item>
              <text:list-item>
                <text:p>Outputs include data that the model has generated.</text:p>
              </text:list-item>
              <text:list-item>
                <text:p>A variable can be both an input and an output in some instances.</text:p>
              </text:list-item>
              <text:list-item>
                <text:p>We are working with 25 constants, 26 inputs, 9 outputs, and 8 input/outputs.</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2" draw:text-style-name="P6" draw:layer="layout" svg:width="6.25cm" svg:height="12.158cm" svg:x="19.216cm" svg:y="3.798cm">
          <draw:text-box>
            <text:p><text:span text:style-name="T11">netcdf x_times_y {</text:span></text:p>
            <text:p><text:span text:style-name="T11">dimensions:</text:span></text:p>
            <text:p><text:span text:style-name="T11"><text:s text:c="8"/>x = 5 ;</text:span></text:p>
            <text:p><text:span text:style-name="T11"><text:s text:c="8"/>y = 5 ;</text:span></text:p>
            <text:p><text:span text:style-name="T11">variables:</text:span></text:p>
            <text:p><text:span text:style-name="T11"><text:s text:c="8"/>float x(x) ;</text:span></text:p>
            <text:p><text:span text:style-name="T11"><text:s text:c="8"/>float y(y) ;</text:span></text:p>
            <text:p><text:span text:style-name="T11"><text:s text:c="8"/>float z(x, y) ;</text:span></text:p>
            <text:p><text:span text:style-name="T11">data:</text:span></text:p>
            <text:p><text:span text:style-name="T11"/></text:p>
            <text:p><text:span text:style-name="T11"><text:s/>x = -2, -1, 0, 1, 2 ;</text:span></text:p>
            <text:p><text:span text:style-name="T11"/></text:p>
            <text:p><text:span text:style-name="T11"><text:s/>y = -4, -2, 0, 2, 4 ;</text:span></text:p>
            <text:p><text:span text:style-name="T11"/></text:p>
            <text:p><text:span text:style-name="T11"><text:s/>z =</text:span></text:p>
            <text:p><text:span text:style-name="T11"><text:s text:c="2"/>8, 4, -0, -4, -8,</text:span></text:p>
            <text:p><text:span text:style-name="T11"><text:s text:c="2"/>4, 2, -0, -2, -4,</text:span></text:p>
            <text:p><text:span text:style-name="T11"><text:s text:c="2"/>-0, -0, 0, 0, 0,</text:span></text:p>
            <text:p><text:span text:style-name="T11"><text:s text:c="2"/>-4, -2, 0, 2, 4,</text:span></text:p>
            <text:p><text:span text:style-name="T11"><text:s text:c="2"/>-8, -4, 0, 4, 8 ;</text:span></text:p>
            <text:p><text:span text:style-name="T11">}</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3" draw:text-style-name="P8" draw:layer="layout" svg:width="27.999cm" svg:height="15.748cm" svg:x="0.001cm" svg:y="0cm">
          <draw:image xlink:href="Pictures/10000000000007800000043821949E98.png" xlink:type="simple" xlink:show="embed" xlink:actuate="onLoad" draw:mime-type="image/png">
            <text:p text:style-name="P7"/>
          </draw:image>
        </draw:frame>
        <draw:frame draw:style-name="gr4" draw:text-style-name="P7" draw:layer="layout" svg:width="8.078cm" svg:height="1.657cm" svg:x="1.602cm" svg:y="11.751cm">
          <draw:image xlink:href="Pictures/10000001000001CA0000005E8C527B2D.png" xlink:type="simple" xlink:show="embed" xlink:actuate="onLoad" draw:mime-type="image/png">
            <text:p/>
          </draw:image>
        </draw:frame>
        <draw:frame draw:style-name="gr4" draw:text-style-name="P7"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5">
          <draw:frame draw:style-name="gr6" draw:text-style-name="P7" draw:layer="layout" svg:width="9.005cm" svg:height="3.114cm" svg:x="0.91cm" svg:y="12.027cm">
            <draw:image xlink:href="Pictures/1000000100000274000000723E6A5260.png" xlink:type="simple" xlink:show="embed" xlink:actuate="onLoad" draw:mime-type="image/png">
              <text:p/>
            </draw:image>
          </draw:frame>
          <draw:frame draw:style-name="gr4" draw:text-style-name="P7" draw:layer="layout" svg:width="3.147cm" svg:height="0.528cm" svg:x="2.614cm" svg:y="13.297cm">
            <draw:image xlink:href="Pictures/10000000000000770000001413F33111.png" xlink:type="simple" xlink:show="embed" xlink:actuate="onLoad" draw:mime-type="image/png">
              <text:p/>
            </draw:image>
          </draw:frame>
          <draw:frame draw:style-name="gr4" draw:text-style-name="P7" draw:layer="layout" svg:width="3.199cm" svg:height="0.554cm" svg:x="2.589cm" svg:y="12.408cm">
            <draw:image xlink:href="Pictures/1000000000000079000000158B9956C2.png" xlink:type="simple" xlink:show="embed" xlink:actuate="onLoad" draw:mime-type="image/png">
              <text:p/>
            </draw:image>
          </draw:frame>
          <draw:frame draw:style-name="gr4" draw:text-style-name="P7" draw:layer="layout" svg:width="3.252cm" svg:height="0.66cm" svg:x="2.563cm" svg:y="14.186cm">
            <draw:image xlink:href="Pictures/100000000000007B000000191E441580.png" xlink:type="simple" xlink:show="embed" xlink:actuate="onLoad" draw:mime-type="image/png">
              <text:p/>
            </draw:image>
          </draw:frame>
          <draw:frame draw:style-name="gr7" draw:text-style-name="P10" draw:layer="layout" svg:width="4.194cm" svg:height="2.571cm" svg:x="5.696cm" svg:y="12.325cm">
            <draw:text-box>
              <text:p text:style-name="P9"><text:s/>= <text:s/>Input Data</text:p>
              <text:p text:style-name="P9"><text:span text:style-name="T12"/></text:p>
              <text:p text:style-name="P9"><text:s/>= <text:s/>Default Data</text:p>
              <text:p text:style-name="P9"><text:span text:style-name="T12"/></text:p>
              <text:p text:style-name="P9"><text:s/>= <text:s/>Output Data</text:p>
            </draw:text-box>
          </draw:frame>
          <draw:frame draw:style-name="gr8" draw:text-style-name="P12" draw:layer="layout" svg:width="1.704cm" svg:height="0.839cm" svg:x="0.91cm" svg:y="13.169cm">
            <draw:text-box>
              <text:p text:style-name="P11">Key</text:p>
            </draw:text-box>
          </draw:frame>
        </draw:g>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draw:frame draw:style-name="gr9" draw:text-style-name="P6" draw:layer="layout" svg:width="12.394cm" svg:height="8.189cm" svg:x="1.4cm" svg:y="8.272cm">
          <draw:text-box>
            <text:p><text:span text:style-name="T11">betavis</text:span></text:p>
            <text:p><text:span text:style-name="T11">0.0</text:span></text:p>
            <text:p><text:span text:style-name="T11">za_lake</text:span></text:p>
            <text:p><text:span text:style-name="T11">0.6</text:span></text:p>
            <text:p><text:span text:style-name="T11">n2min</text:span></text:p>
            <text:p><text:span text:style-name="T11">7.4999999999999993E-005</text:span></text:p>
            <text:p><text:span text:style-name="T11">tdmax</text:span></text:p>
            <text:p><text:span text:style-name="T11">277.0</text:span></text:p>
            <text:p><text:span text:style-name="T11">pudz</text:span></text:p>
            <text:p><text:span text:style-name="T11">0.0</text:span></text:p>
            <text:p><text:span text:style-name="T11">mixfact</text:span></text:p>
            <text:p><text:span text:style-name="T11">10.0</text:span></text:p>
            <text:p><text:span text:style-name="T11">depthcrit</text:span></text:p>
            <text:p><text:span text:style-name="T11">25.0</text:span></text:p>
          </draw:text-box>
        </draw:frame>
        <draw:frame draw:style-name="gr10" draw:text-style-name="P13" draw:layer="layout" svg:width="12.393cm" svg:height="0.818cm" svg:x="1.4cm" svg:y="7.53cm">
          <draw:text-box>
            <text:p text:style-name="P7"><text:span text:style-name="T13">Constants (formerly lakeparams.txt)</text:span></text:p>
          </draw:text-box>
        </draw:frame>
        <draw:frame draw:style-name="gr11" draw:text-style-name="P6" draw:layer="layout" svg:width="12.394cm" svg:height="7.117cm" svg:x="14.205cm" svg:y="8.273cm">
          <draw:text-box>
            <text:p><text:span text:style-name="T14">{</text:span></text:p>
            <text:p><text:span text:style-name="T15"><text:s text:c="2"/></text:span><text:span text:style-name="T16">"betavis"</text:span><text:span text:style-name="T14">:</text:span><text:span text:style-name="T15"> </text:span><text:span text:style-name="T17">0.0</text:span><text:span text:style-name="T14">,</text:span></text:p>
            <text:p><text:span text:style-name="T15"><text:s text:c="2"/></text:span><text:span text:style-name="T16">"za_lake"</text:span><text:span text:style-name="T14">:</text:span><text:span text:style-name="T15"> </text:span><text:span text:style-name="T17">0.6</text:span><text:span text:style-name="T14">,</text:span></text:p>
            <text:p><text:span text:style-name="T15"><text:s text:c="2"/></text:span><text:span text:style-name="T16">"n2min"</text:span><text:span text:style-name="T14">:</text:span><text:span text:style-name="T15"> </text:span><text:span text:style-name="T17">7.4999999999999993E-005</text:span><text:span text:style-name="T14">,</text:span></text:p>
            <text:p><text:span text:style-name="T15"><text:s text:c="2"/></text:span><text:span text:style-name="T16">"tdmax"</text:span><text:span text:style-name="T14">:</text:span><text:span text:style-name="T15"> </text:span><text:span text:style-name="T17">277.0</text:span><text:span text:style-name="T14">,</text:span></text:p>
            <text:p><text:span text:style-name="T15"><text:s text:c="2"/></text:span><text:span text:style-name="T16">"pudz"</text:span><text:span text:style-name="T14">:</text:span><text:span text:style-name="T15"> </text:span><text:span text:style-name="T17">0.0</text:span><text:span text:style-name="T14">,</text:span></text:p>
            <text:p><text:span text:style-name="T15"><text:s text:c="2"/></text:span><text:span text:style-name="T16">"mixfact"</text:span><text:span text:style-name="T14">:</text:span><text:span text:style-name="T15"> </text:span><text:span text:style-name="T17">10.0</text:span><text:span text:style-name="T14">,</text:span></text:p>
            <text:p><text:span text:style-name="T15"><text:s text:c="2"/></text:span><text:span text:style-name="T16">"depthcrit"</text:span><text:span text:style-name="T14">:</text:span><text:span text:style-name="T15"> </text:span><text:span text:style-name="T17">25.0</text:span></text:p>
            <text:p><text:span text:style-name="T14">}</text:span></text:p>
          </draw:text-box>
        </draw:frame>
        <draw:frame draw:style-name="gr10" draw:text-style-name="P13" draw:layer="layout" svg:width="12.393cm" svg:height="0.818cm" svg:x="14.205cm" svg:y="7.531cm">
          <draw:text-box>
            <text:p text:style-name="P7"><text:span text:style-name="T13">Example Sample (JSON used for illustration)</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1 to 3 dimensions. </text:p>
              </text:list-item>
            </text:list>
          </draw:text-box>
        </draw:frame>
        <draw:frame draw:style-name="gr12" draw:text-style-name="P6" draw:layer="layout" svg:width="25.193cm" svg:height="3.146cm" svg:x="1.406cm" svg:y="11.291cm">
          <draw:text-box>
            <text:p><text:span text:style-name="T14">{</text:span></text:p>
            <text:p><text:span text:style-name="T15"><text:s text:c="2"/></text:span><text:span text:style-name="T16">"veg_ef%eflx_soil_grnd"</text:span><text:span text:style-name="T14">:</text:span><text:span text:style-name="T15"> </text:span><text:span text:style-name="T14">[</text:span><text:span text:style-name="T17">0.0</text:span><text:span text:style-name="T14">,</text:span><text:span text:style-name="T15"> </text:span><text:span text:style-name="T17">...</text:span><text:span text:style-name="T14">],</text:span></text:p>
            <text:p><text:span text:style-name="T15"><text:s text:c="2"/></text:span><text:span text:style-name="T16">"veg_ef%eflx_gnet"</text:span><text:span text:style-name="T14">:</text:span><text:span text:style-name="T15"> </text:span><text:span text:style-name="T14">[[</text:span><text:span text:style-name="T17">0.0</text:span><text:span text:style-name="T14">,</text:span><text:span text:style-name="T15"> </text:span><text:span text:style-name="T17">...</text:span><text:span text:style-name="T14">],</text:span><text:span text:style-name="T15"> </text:span><text:span text:style-name="T17">...</text:span><text:span text:style-name="T14">],</text:span></text:p>
            <text:p><text:span text:style-name="T15"><text:s text:c="2"/></text:span><text:span text:style-name="T17">...</text:span></text:p>
            <text:p><text:span text:style-name="T14">}</text:span></text:p>
          </draw:text-box>
        </draw:frame>
        <draw:frame draw:style-name="gr10" draw:text-style-name="P13" draw:layer="layout" svg:width="20.304cm" svg:height="0.818cm" svg:x="3.848cm" svg:y="10.549cm">
          <draw:text-box>
            <text:p text:style-name="P7"><text:span text:style-name="T13">Outputs Received by Analysis Plugins (JSON for illustration)</text:spa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n ordered grouping of samples</text:p>
              </text:list-item>
              <text:list-item>
                <text:p>Analysis plugins can analyze the result of multiple consecutive runs of <text:span text:style-name="T1">elmtest.exe</text:span> in context this way.</text:p>
              </text:list-item>
            </text:list>
          </draw:text-box>
        </draw:frame>
        <draw:frame draw:style-name="gr13" draw:text-style-name="P6" draw:layer="layout" svg:width="12.394cm" svg:height="8.279cm" svg:x="1.411cm" svg:y="7.974cm">
          <draw:text-box>
            <text:p><text:span text:style-name="T14">[</text:span></text:p>
            <text:p><text:span text:style-name="T14"><text:s text:c="2"/>{</text:span></text:p>
            <text:p><text:span text:style-name="T15"><text:s text:c="4"/></text:span><text:span text:style-name="T16">"betavis"</text:span><text:span text:style-name="T14">:</text:span><text:span text:style-name="T15"> </text:span><text:span text:style-name="T17">0.0</text:span><text:span text:style-name="T14">,</text:span></text:p>
            <text:p><text:span text:style-name="T14"><text:s text:c="4"/>...</text:span></text:p>
            <text:p><text:span text:style-name="T14"><text:s text:c="2"/>},</text:span></text:p>
            <text:p text:style-name="P14"><text:span text:style-name="T14"><text:s text:c="2"/>{</text:span></text:p>
            <text:p text:style-name="P14"><text:span text:style-name="T15"><text:s text:c="4"/></text:span><text:span text:style-name="T16">"betavis"</text:span><text:span text:style-name="T14">:</text:span><text:span text:style-name="T15"> </text:span><text:span text:style-name="T17">0.25</text:span><text:span text:style-name="T14">,</text:span></text:p>
            <text:p text:style-name="P14"><text:span text:style-name="T14"><text:s text:c="4"/>...</text:span></text:p>
            <text:p text:style-name="P14"><text:span text:style-name="T14"><text:s text:c="2"/>},</text:span></text:p>
            <text:p text:style-name="P14"><text:span text:style-name="T14"><text:s text:c="2"/>{</text:span></text:p>
            <text:p text:style-name="P14"><text:span text:style-name="T15"><text:s text:c="4"/></text:span><text:span text:style-name="T16">"betavis"</text:span><text:span text:style-name="T14">:</text:span><text:span text:style-name="T15"> </text:span><text:span text:style-name="T17">0.5</text:span><text:span text:style-name="T14">,</text:span></text:p>
            <text:p text:style-name="P14"><text:span text:style-name="T14"><text:s text:c="4"/>...</text:span></text:p>
            <text:p text:style-name="P14"><text:span text:style-name="T14"><text:s text:c="2"/>}</text:span></text:p>
            <text:p><text:span text:style-name="T14">]</text:span></text:p>
          </draw:text-box>
        </draw:frame>
        <draw:frame draw:style-name="gr10" draw:text-style-name="P13" draw:layer="layout" svg:width="12.393cm" svg:height="0.818cm" svg:x="1.411cm" svg:y="7.232cm">
          <draw:text-box>
            <text:p text:style-name="P7"><text:span text:style-name="T13">Sample Group Data (JSON for illustration)</text:span></text:p>
          </draw:text-box>
        </draw:frame>
        <draw:frame draw:style-name="gr14" draw:text-style-name="P6" draw:layer="layout" svg:width="12.739cm" svg:height="8.279cm" svg:x="14.205cm" svg:y="7.974cm">
          <draw:text-box>
            <text:p><text:span text:style-name="T14">[</text:span></text:p>
            <text:p><text:span text:style-name="T15"><text:s text:c="2"/></text:span><text:span text:style-name="T14">{</text:span></text:p>
            <text:p text:style-name="P14"><text:span text:style-name="T18"><text:s text:c="4"/></text:span><text:span text:style-name="T19">"lakestate_vars%betaprime_col</text:span><text:span text:style-name="T16">"</text:span><text:span text:style-name="T14">:</text:span><text:span text:style-name="T15"> </text:span><text:span text:style-name="T14">[</text:span><text:span text:style-name="T17">0.0</text:span><text:span text:style-name="T14">,</text:span><text:span text:style-name="T15"> </text:span><text:span text:style-name="T20">...</text:span><text:span text:style-name="T14">],</text:span></text:p>
            <text:p text:style-name="P14"><text:span text:style-name="T15"><text:s text:c="4"/></text:span><text:span text:style-name="T20">...</text:span></text:p>
            <text:p><text:span text:style-name="T15"><text:s text:c="2"/></text:span><text:span text:style-name="T14">},</text:span></text:p>
            <text:p text:style-name="P14"><text:span text:style-name="T15"><text:s text:c="2"/></text:span><text:span text:style-name="T14">{</text:span></text:p>
            <text:p text:style-name="P14"><text:span text:style-name="T18"><text:s text:c="4"/></text:span><text:span text:style-name="T19">"lakestate_vars%betaprime_col</text:span><text:span text:style-name="T16">"</text:span><text:span text:style-name="T14">:</text:span><text:span text:style-name="T15"> </text:span><text:span text:style-name="T14">[</text:span><text:span text:style-name="T17">0.25</text:span><text:span text:style-name="T14">,</text:span><text:span text:style-name="T15"> </text:span><text:span text:style-name="T20">...</text:span><text:span text:style-name="T14">],</text:span></text:p>
            <text:p text:style-name="P14"><text:span text:style-name="T15"><text:s text:c="4"/></text:span><text:span text:style-name="T20">...</text:span></text:p>
            <text:p text:style-name="P14"><text:span text:style-name="T15"><text:s text:c="2"/></text:span><text:span text:style-name="T14">},</text:span></text:p>
            <text:p text:style-name="P14"><text:span text:style-name="T15"><text:s text:c="2"/></text:span><text:span text:style-name="T14">{</text:span></text:p>
            <text:p text:style-name="P14"><text:span text:style-name="T18"><text:s text:c="4"/></text:span><text:span text:style-name="T19">"lakestate_vars%betaprime_col</text:span><text:span text:style-name="T16">"</text:span><text:span text:style-name="T14">:</text:span><text:span text:style-name="T15"> </text:span><text:span text:style-name="T14">[</text:span><text:span text:style-name="T17">0.5</text:span><text:span text:style-name="T14">,</text:span><text:span text:style-name="T15"> </text:span><text:span text:style-name="T20">...</text:span><text:span text:style-name="T14">],</text:span></text:p>
            <text:p text:style-name="P14"><text:span text:style-name="T15"><text:s text:c="4"/></text:span><text:span text:style-name="T20">...</text:span></text:p>
            <text:p text:style-name="P14"><text:span text:style-name="T15"><text:s text:c="2"/></text:span><text:span text:style-name="T14">}</text:span></text:p>
            <text:p><text:span text:style-name="T14">]</text:span></text:p>
          </draw:text-box>
        </draw:frame>
        <draw:frame draw:style-name="gr10" draw:text-style-name="P13" draw:layer="layout" svg:width="12.393cm" svg:height="0.818cm" svg:x="14.205cm" svg:y="7.232cm">
          <draw:text-box>
            <text:p text:style-name="P7"><text:span text:style-name="T13">Ordered Output Data (JSON for illustration)</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ich is called each time <text:span text:style-name="T1">elmtest.exe</text:span> is run, and receives the outputs produced by that specific sample.</text:p>
              </text:list-item>
              <text:list-item>
                <text:p>“Sample group” plugins define a subclass of <text:span text:style-name="T1">SampleGroupAnalyzer</text:span>, which is called after all samples in a group are run through <text:span text:style-name="T1">elmtest.exe</text:span>, and it receives all outputs from each.</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custom-shape draw:style-name="gr15" draw:text-style-name="P15" draw:layer="layout" svg:width="18.129cm" svg:height="7.095cm" svg:x="4.936cm" svg:y="4.328cm">
          <text:p/>
          <draw:enhanced-geometry svg:viewBox="0 0 21600 21600" draw:type="rectangle" draw:enhanced-path="M 0 0 L 21600 0 21600 21600 0 21600 0 0 Z N"/>
        </draw:custom-shape>
        <draw:custom-shape draw:style-name="gr16" draw:text-style-name="P16"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05T10:59:05.673257000</dc:date>
    <meta:editing-duration>PT1H19M38S</meta:editing-duration>
    <meta:editing-cycles>22</meta:editing-cycles>
    <meta:print-date>2026-02-03T12:10:48.026305886</meta:print-date>
    <meta:printed-by>PDF files</meta:printed-by>
    <meta:document-statistic meta:object-count="101"/>
  </office:meta>
</office:document-meta>
</file>