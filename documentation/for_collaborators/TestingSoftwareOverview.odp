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5.svm" manifest:media-type=""/>
  <manifest:file-entry manifest:full-path="Pictures/TablePreview3.svm" manifest:media-type=""/>
  <manifest:file-entry manifest:full-path="Pictures/TablePreview6.svm" manifest:media-type=""/>
  <manifest:file-entry manifest:full-path="Pictures/TablePreview2.svm" manifest:media-type=""/>
  <manifest:file-entry manifest:full-path="Pictures/TablePreview1.svm" manifest:media-type=""/>
  <manifest:file-entry manifest:full-path="Pictures/1000000100000274000000723E6A5260.png" manifest:media-type="image/png"/>
  <manifest:file-entry manifest:full-path="Pictures/1000000100004F6000002CA6ED1B5D07.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0001000003800000009AF1E33EAA.png" manifest:media-type="image/png"/>
  <manifest:file-entry manifest:full-path="Pictures/100083500006338000037CF833B75D60.pdf" manifest:media-type="application/pdf"/>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4"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5"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left"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left"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left"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text-properties fo:color="#ffffff" loext:opacity="100%" fo:font-size="18pt"/>
    </style:style>
    <style:style style:name="P14" style:family="paragraph">
      <style:paragraph-properties fo:text-align="center"/>
      <style:text-properties fo:color="#ffffff" loext:opacity="100%" fo:font-size="18pt"/>
    </style:style>
    <style:style style:name="P15" style:family="paragraph">
      <style:paragraph-properties fo:text-align="left"/>
      <style:text-properties fo:color="#ffffff" loext:opacity="100%"/>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margin-top="0.42cm" fo:margin-bottom="0.35cm" fo:text-align="left"/>
      <style:text-properties fo:font-size="10pt" style:font-size-asian="10pt" style:font-size-complex="10pt"/>
    </style:style>
    <style:style style:name="P21" style:family="paragraph">
      <loext:graphic-properties draw:fill="solid" draw:fill-color="#34383a" draw:opacity="90%"/>
      <style:paragraph-properties fo:text-align="center"/>
    </style:style>
    <style:style style:name="P22"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color="#ffffff" loext:opacity="100%"/>
    </style:style>
    <style:style style:name="T14" style:family="text">
      <style:text-properties fo:color="#ffffff" loext:opacity="100%" fo:font-size="18pt"/>
    </style:style>
    <style:style style:name="T15"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style:text-line-through-style="solid" style:text-line-through-type="single"/>
    </style:style>
    <style:style style:name="T17" style:family="text">
      <style:text-properties style:font-name="CaskaydiaCove NFM" fo:font-size="12pt" style:font-size-asian="12pt" style:font-size-complex="12pt"/>
    </style:style>
    <style:style style:name="T18"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0"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1"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2"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25" style:family="text">
      <style:text-properties style:text-position="super 58%"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8.001cm" svg:height="15.75cm" svg:x="0cm" svg:y="0cm">
          <draw:image xlink:href="Pictures/100083500006338000037CF833B75D60.pdf" xlink:type="simple" xlink:show="embed" xlink:actuate="onLoad" draw:mime-type="application/pdf" loext:page-number="0">
            <text:p/>
          </draw:image>
          <draw:image xlink:href="Pictures/1000000100004F6000002CA6ED1B5D07.png" xlink:type="simple" xlink:show="embed" xlink:actuate="onLoad" draw:mime-type="image/png"/>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8 constants c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6 inputs provide starting data for the model.</text:p>
              </text:list-item>
              <text:list-item>
                <text:p text:style-name="P9">The 9 outputs include data that the model has generated.</text:p>
              </text:list-item>
              <text:list-item>
                <text:p text:style-name="P9">8 variables are both an input and an output in some instances.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7"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11"><text:span text:style-name="T13">Array Constants</text:span></text:p>
              </table:table-cell>
              <table:table-cell table:style-name="ce2">
                <text:p text:style-name="P12"><text:span text:style-name="T13">crop</text:span></text:p>
              </table:table-cell>
            </table:table-row>
            <table:table-row table:style-name="ro2">
              <table:covered-table-cell table:style-name="ce1"/>
              <table:table-cell table:style-name="ce2">
                <text:p text:style-name="P12"><text:span text:style-name="T13">iscft</text:span></text:p>
              </table:table-cell>
            </table:table-row>
            <table:table-row table:style-name="ro2">
              <table:covered-table-cell table:style-name="ce1"/>
              <table:table-cell table:style-name="ce2">
                <text:p text:style-name="P12"><text:span text:style-name="T13">percrop</text:span></text:p>
              </table:table-cell>
            </table:table-row>
            <table:table-row table:style-name="ro2">
              <table:table-cell table:style-name="ce3" table:number-rows-spanned="9">
                <text:p text:style-name="P11"><text:span text:style-name="T13">Scalar Constants (with observable effects)</text:span></text:p>
              </table:table-cell>
              <table:table-cell table:style-name="ce4">
                <text:p text:style-name="P13"><text:span text:style-name="T14">betavis</text:span></text:p>
              </table:table-cell>
            </table:table-row>
            <table:table-row table:style-name="ro2">
              <table:covered-table-cell table:style-name="ce5"/>
              <table:table-cell table:style-name="ce4">
                <text:p text:style-name="P13"><text:span text:style-name="T14">cnfac</text:span></text:p>
              </table:table-cell>
            </table:table-row>
            <table:table-row table:style-name="ro2">
              <table:covered-table-cell table:style-name="ce5"/>
              <table:table-cell table:style-name="ce4">
                <text:p text:style-name="P13"><text:span text:style-name="T14">cpliq</text:span></text:p>
              </table:table-cell>
            </table:table-row>
            <table:table-row table:style-name="ro2">
              <table:covered-table-cell table:style-name="ce5"/>
              <table:table-cell table:style-name="ce4">
                <text:p text:style-name="P13"><text:span text:style-name="T14">denh2o</text:span></text:p>
              </table:table-cell>
            </table:table-row>
            <table:table-row table:style-name="ro2">
              <table:covered-table-cell table:style-name="ce5"/>
              <table:table-cell table:style-name="ce4">
                <text:p text:style-name="P13"><text:span text:style-name="T14">dtime_mod</text:span></text:p>
              </table:table-cell>
            </table:table-row>
            <table:table-row table:style-name="ro2">
              <table:covered-table-cell table:style-name="ce5"/>
              <table:table-cell table:style-name="ce4">
                <text:p text:style-name="P13"><text:span text:style-name="T14">grav</text:span></text:p>
              </table:table-cell>
            </table:table-row>
            <table:table-row table:style-name="ro2">
              <table:covered-table-cell table:style-name="ce5"/>
              <table:table-cell table:style-name="ce4">
                <text:p text:style-name="P13"><text:span text:style-name="T14">hfus</text:span></text:p>
              </table:table-cell>
            </table:table-row>
            <table:table-row table:style-name="ro2">
              <table:covered-table-cell table:style-name="ce5"/>
              <table:table-cell table:style-name="ce6">
                <text:p text:style-name="P12"><text:span text:style-name="T13">lake_no_ed</text:span></text:p>
              </table:table-cell>
            </table:table-row>
            <table:table-row table:style-name="ro2">
              <table:covered-table-cell table:style-name="ce5"/>
              <table:table-cell table:style-name="ce6">
                <text:p text:style-name="P12"><text:span text:style-name="T13">lakepuddling</text:span></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Table of Constants, Inputs, and Outputs</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4"><text:span text:style-name="T14">Scalar Constants (with observable effects)</text:span></text:p>
              </table:table-cell>
              <table:table-cell table:style-name="ce10">
                <text:p text:style-name="P13"><text:span text:style-name="T14">nlevgrnd</text:span></text:p>
              </table:table-cell>
            </table:table-row>
            <table:table-row table:style-name="ro2">
              <table:covered-table-cell table:style-name="ce11"/>
              <table:table-cell table:style-name="ce4">
                <text:p text:style-name="P13"><text:span text:style-name="T14">nlevlak</text:span></text:p>
              </table:table-cell>
            </table:table-row>
            <table:table-row table:style-name="ro2">
              <table:covered-table-cell table:style-name="ce11"/>
              <table:table-cell table:style-name="ce4">
                <text:p text:style-name="P13"><text:span text:style-name="T14">nlevsno</text:span></text:p>
              </table:table-cell>
            </table:table-row>
            <table:table-row table:style-name="ro2">
              <table:covered-table-cell table:style-name="ce11"/>
              <table:table-cell table:style-name="ce4">
                <text:p text:style-name="P13"><text:span text:style-name="T14">nlevsoi</text:span></text:p>
              </table:table-cell>
            </table:table-row>
            <table:table-row table:style-name="ro2">
              <table:covered-table-cell table:style-name="ce11"/>
              <table:table-cell table:style-name="ce4">
                <text:p text:style-name="P13"><text:span text:style-name="T14">thk_bedrock</text:span></text:p>
              </table:table-cell>
            </table:table-row>
            <table:table-row table:style-name="ro2">
              <table:covered-table-cell table:style-name="ce11"/>
              <table:table-cell table:style-name="ce4">
                <text:p text:style-name="P13"><text:span text:style-name="T14">tkwat</text:span></text:p>
              </table:table-cell>
            </table:table-row>
            <table:table-row table:style-name="ro2">
              <table:covered-table-cell table:style-name="ce5"/>
              <table:table-cell table:style-name="ce4">
                <text:p text:style-name="P13"><text:span text:style-name="T14">use_lch4</text:span></text:p>
              </table:table-cell>
            </table:table-row>
            <table:table-row table:style-name="ro4">
              <table:covered-table-cell table:style-name="ce11"/>
              <table:table-cell table:style-name="ce4">
                <text:p text:style-name="P13"><text:span text:style-name="T14">vkc</text:span></text:p>
              </table:table-cell>
            </table:table-row>
            <table:table-row table:style-name="ro2">
              <table:table-cell table:style-name="ce12" table:number-rows-spanned="4">
                <text:p text:style-name="P14"><text:span text:style-name="T14">Scalar Constants (without observable effects)</text:span></text:p>
              </table:table-cell>
              <table:table-cell table:style-name="ce13">
                <text:p text:style-name="P13"><text:span text:style-name="T14">cpice</text:span></text:p>
              </table:table-cell>
            </table:table-row>
            <table:table-row table:style-name="ro2">
              <table:covered-table-cell table:style-name="ce12"/>
              <table:table-cell table:style-name="ce13">
                <text:p text:style-name="P13"><text:span text:style-name="T14">denice</text:span></text:p>
              </table:table-cell>
            </table:table-row>
            <table:table-row table:style-name="ro2">
              <table:covered-table-cell table:style-name="ce12"/>
              <table:table-cell table:style-name="ce13">
                <text:p text:style-name="P13"><text:span text:style-name="T14">depthcrit</text:span></text:p>
              </table:table-cell>
            </table:table-row>
            <table:table-row table:style-name="ro2">
              <table:covered-table-cell table:style-name="ce12"/>
              <table:table-cell table:style-name="ce13">
                <text:p text:style-name="P13"><text:span text:style-name="T14">iulog</text:span></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4"><text:span text:style-name="T14">Scalar Constants (without observable effects)</text:span></text:p>
              </table:table-cell>
              <table:table-cell table:style-name="ce15">
                <text:p text:style-name="P13"><text:span text:style-name="T14">mixfact</text:span></text:p>
              </table:table-cell>
            </table:table-row>
            <table:table-row table:style-name="ro2">
              <table:covered-table-cell table:style-name="ce12"/>
              <table:table-cell table:style-name="ce13">
                <text:p text:style-name="P13"><text:span text:style-name="T14">pudz</text:span></text:p>
              </table:table-cell>
            </table:table-row>
            <table:table-row table:style-name="ro2">
              <table:covered-table-cell table:style-name="ce12"/>
              <table:table-cell table:style-name="ce13">
                <text:p text:style-name="P13"><text:span text:style-name="T14">tkair</text:span></text:p>
              </table:table-cell>
            </table:table-row>
            <table:table-row table:style-name="ro2">
              <table:covered-table-cell table:style-name="ce12"/>
              <table:table-cell table:style-name="ce13">
                <text:p text:style-name="P13"><text:span text:style-name="T14">tkice</text:span></text:p>
              </table:table-cell>
            </table:table-row>
            <table:table-row table:style-name="ro2">
              <table:table-cell table:style-name="ce16" table:number-rows-spanned="8">
                <text:p text:style-name="P14"><text:span text:style-name="T14">Inputs</text:span></text:p>
              </table:table-cell>
              <table:table-cell table:style-name="ce17">
                <text:p text:style-name="P12"><text:span text:style-name="T13">betaprime_col</text:span></text:p>
              </table:table-cell>
            </table:table-row>
            <table:table-row table:style-name="ro2">
              <table:covered-table-cell table:style-name="ce16"/>
              <table:table-cell table:style-name="ce17">
                <text:p text:style-name="P12"><text:span text:style-name="T13">eflx_gnet</text:span></text:p>
              </table:table-cell>
            </table:table-row>
            <table:table-row table:style-name="ro2">
              <table:covered-table-cell table:style-name="ce16"/>
              <table:table-cell table:style-name="ce17">
                <text:p text:style-name="P12"><text:span text:style-name="T13">eflx_sh_grnd</text:span></text:p>
              </table:table-cell>
            </table:table-row>
            <table:table-row table:style-name="ro2">
              <table:covered-table-cell table:style-name="ce16"/>
              <table:table-cell table:style-name="ce17">
                <text:p text:style-name="P12"><text:span text:style-name="T13">eflx_sh_tot</text:span></text:p>
              </table:table-cell>
            </table:table-row>
            <table:table-row table:style-name="ro2">
              <table:covered-table-cell table:style-name="ce16"/>
              <table:table-cell table:style-name="ce17">
                <text:p text:style-name="P12"><text:span text:style-name="T13">eflx_snomelt</text:span></text:p>
              </table:table-cell>
            </table:table-row>
            <table:table-row table:style-name="ro2">
              <table:covered-table-cell table:style-name="ce16"/>
              <table:table-cell table:style-name="ce17">
                <text:p text:style-name="P12"><text:span text:style-name="T13">eflx_soil_grnd</text:span></text:p>
              </table:table-cell>
            </table:table-row>
            <table:table-row table:style-name="ro2">
              <table:covered-table-cell table:style-name="ce16"/>
              <table:table-cell table:style-name="ce17">
                <text:p text:style-name="P12"><text:span text:style-name="T13">errsoi</text:span></text:p>
              </table:table-cell>
            </table:table-row>
            <table:table-row table:style-name="ro5">
              <table:covered-table-cell table:style-name="ce16"/>
              <table:table-cell table:style-name="ce18">
                <text:p text:style-name="P13"><text:span text:style-name="T14">grnd_ch4_cond_col</text:span></text:p>
              </table:table-cell>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11"><text:span text:style-name="T13">Inputs</text:span></text:p>
              </table:table-cell>
              <table:table-cell table:style-name="ce20">
                <text:p text:style-name="P12"><text:span text:style-name="T13">hc_soi</text:span></text:p>
              </table:table-cell>
            </table:table-row>
            <table:table-row table:style-name="ro2">
              <table:covered-table-cell table:style-name="ce21"/>
              <table:table-cell table:style-name="ce17">
                <text:p text:style-name="P12"><text:span text:style-name="T13">hc_soisno</text:span></text:p>
              </table:table-cell>
            </table:table-row>
            <table:table-row table:style-name="ro2">
              <table:covered-table-cell table:style-name="ce21"/>
              <table:table-cell table:style-name="ce17">
                <text:p text:style-name="P12"><text:span text:style-name="T13">imelt</text:span></text:p>
              </table:table-cell>
            </table:table-row>
            <table:table-row table:style-name="ro2">
              <table:covered-table-cell table:style-name="ce21"/>
              <table:table-cell table:style-name="ce17">
                <text:p text:style-name="P12"><text:span text:style-name="T13">lakeresist_col</text:span></text:p>
              </table:table-cell>
            </table:table-row>
            <table:table-row table:style-name="ro2">
              <table:covered-table-cell table:style-name="ce21"/>
              <table:table-cell table:style-name="ce17">
                <text:p text:style-name="P12"><text:span text:style-name="T13">lake_icefrac_col</text:span></text:p>
              </table:table-cell>
            </table:table-row>
            <table:table-row table:style-name="ro2">
              <table:covered-table-cell table:style-name="ce21"/>
              <table:table-cell table:style-name="ce17">
                <text:p text:style-name="P12"><text:span text:style-name="T13">lake_icethick_col</text:span></text:p>
              </table:table-cell>
            </table:table-row>
            <table:table-row table:style-name="ro2">
              <table:covered-table-cell table:style-name="ce21"/>
              <table:table-cell table:style-name="ce17">
                <text:p text:style-name="P12"><text:span text:style-name="T13">qflx_snofrz_lyr</text:span></text:p>
              </table:table-cell>
            </table:table-row>
            <table:table-row table:style-name="ro2">
              <table:covered-table-cell table:style-name="ce22"/>
              <table:table-cell table:style-name="ce17">
                <text:p text:style-name="P12"><text:span text:style-name="T13">qflx_snomelt</text:span></text:p>
              </table:table-cell>
            </table:table-row>
            <table:table-row table:style-name="ro2">
              <table:covered-table-cell table:style-name="ce22"/>
              <table:table-cell table:style-name="ce17">
                <text:p text:style-name="P12"><text:span text:style-name="T13">qflx_snow_melt</text:span></text:p>
              </table:table-cell>
            </table:table-row>
            <table:table-row table:style-name="ro2">
              <table:covered-table-cell table:style-name="ce22"/>
              <table:table-cell table:style-name="ce17">
                <text:p text:style-name="P12"><text:span text:style-name="T13">savedtke1_col</text:span></text:p>
              </table:table-cell>
            </table:table-row>
            <table:table-row table:style-name="ro2">
              <table:covered-table-cell table:style-name="ce22"/>
              <table:table-cell table:style-name="ce17">
                <text:p text:style-name="P12"><text:span text:style-name="T13">h2osno</text:span></text:p>
              </table:table-cell>
            </table:table-row>
            <table:table-row table:style-name="ro5">
              <table:covered-table-cell table:style-name="ce22"/>
              <table:table-cell table:style-name="ce17">
                <text:p text:style-name="P12"><text:span text:style-name="T13">snow_depth</text:span></text:p>
              </table:table-cell>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11"><text:span text:style-name="T13">Inputs</text:span></text:p>
              </table:table-cell>
              <table:table-cell table:style-name="ce23">
                <text:p text:style-name="P15"><text:span text:style-name="T13">t_lake</text:span></text:p>
              </table:table-cell>
            </table:table-row>
            <table:table-row table:style-name="ro2">
              <table:covered-table-cell table:style-name="ce22"/>
              <table:table-cell table:style-name="ce24">
                <text:p text:style-name="P15"><text:span text:style-name="T13">t_soisno</text:span></text:p>
              </table:table-cell>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table-cell table:style-name="ce25" table:number-rows-spanned="6">
                <text:p text:style-name="P11"><text:span text:style-name="T13">Inputs &amp; Outputs</text:span></text:p>
              </table:table-cell>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5">
              <table:covered-table-cell table:style-name="ce25"/>
              <table:table-cell table:style-name="ce26"/>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7"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11"><text:span text:style-name="T13">Inputs &amp; Outputs</text:span></text:p>
              </table:table-cell>
              <table:table-cell table:style-name="ce28"/>
            </table:table-row>
            <table:table-row table:style-name="ro2">
              <table:covered-table-cell table:style-name="ce25"/>
              <table:table-cell table:style-name="ce29"/>
            </table:table-row>
            <table:table-row table:style-name="ro2">
              <table:table-cell table:style-name="ce30" table:number-rows-spanned="9">
                <text:p text:style-name="P11"><text:span text:style-name="T13">Outputs</text:span></text:p>
              </table:table-cell>
              <table:table-cell table:style-name="ce31">
                <text:p text:style-name="P12"><text:span text:style-name="T13">ch4_vars</text:span></text:p>
              </table:table-cell>
            </table:table-row>
            <table:table-row table:style-name="ro2">
              <table:covered-table-cell table:style-name="ce30"/>
              <table:table-cell table:style-name="ce31">
                <text:p text:style-name="P12"><text:span text:style-name="T13">col_ef</text:span></text:p>
              </table:table-cell>
            </table:table-row>
            <table:table-row table:style-name="ro2">
              <table:covered-table-cell table:style-name="ce30"/>
              <table:table-cell table:style-name="ce31">
                <text:p text:style-name="P12"><text:span text:style-name="T13">col_es</text:span></text:p>
              </table:table-cell>
            </table:table-row>
            <table:table-row table:style-name="ro2">
              <table:covered-table-cell table:style-name="ce30"/>
              <table:table-cell table:style-name="ce31">
                <text:p text:style-name="P12"><text:span text:style-name="T13">col_wf</text:span></text:p>
              </table:table-cell>
            </table:table-row>
            <table:table-row table:style-name="ro2">
              <table:covered-table-cell table:style-name="ce30"/>
              <table:table-cell table:style-name="ce31">
                <text:p text:style-name="P12"><text:span text:style-name="T13">col_ws</text:span></text:p>
              </table:table-cell>
            </table:table-row>
            <table:table-row table:style-name="ro2">
              <table:covered-table-cell table:style-name="ce30"/>
              <table:table-cell table:style-name="ce31">
                <text:p text:style-name="P12"><text:span text:style-name="T13">lakestate_vars</text:span></text:p>
              </table:table-cell>
            </table:table-row>
            <table:table-row table:style-name="ro2">
              <table:covered-table-cell table:style-name="ce30"/>
              <table:table-cell table:style-name="ce31">
                <text:p text:style-name="P12"><text:span text:style-name="T13">veg_ef</text:span></text:p>
              </table:table-cell>
            </table:table-row>
            <table:table-row table:style-name="ro2">
              <table:covered-table-cell table:style-name="ce30"/>
              <table:table-cell table:style-name="ce31"/>
            </table:table-row>
            <table:table-row table:style-name="ro2">
              <table:covered-table-cell table:style-name="ce30"/>
              <table:table-cell table:style-name="ce31"/>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7" draw:layer="layout" svg:width="6.25cm" svg:height="12.158cm" svg:x="19.216cm" svg:y="3.798cm">
          <draw:text-box>
            <text:p><text:span text:style-name="T15">netcdf x_times_y {</text:span></text:p>
            <text:p><text:span text:style-name="T15">dimensions:</text:span></text:p>
            <text:p><text:span text:style-name="T15"><text:s text:c="8"/>x = 5 ;</text:span></text:p>
            <text:p><text:span text:style-name="T15"><text:s text:c="8"/>y = 5 ;</text:span></text:p>
            <text:p><text:span text:style-name="T15">variables:</text:span></text:p>
            <text:p><text:span text:style-name="T15"><text:s text:c="8"/>float x(x) ;</text:span></text:p>
            <text:p><text:span text:style-name="T15"><text:s text:c="8"/>float y(y) ;</text:span></text:p>
            <text:p><text:span text:style-name="T15"><text:s text:c="8"/>float z(x, y) ;</text:span></text:p>
            <text:p><text:span text:style-name="T15">data:</text:span></text:p>
            <text:p><text:span text:style-name="T15"/></text:p>
            <text:p><text:span text:style-name="T15"><text:s/>x = -2, -1, 0, 1, 2 ;</text:span></text:p>
            <text:p><text:span text:style-name="T15"/></text:p>
            <text:p><text:span text:style-name="T15"><text:s/>y = -4, -2, 0, 2, 4 ;</text:span></text:p>
            <text:p><text:span text:style-name="T15"/></text:p>
            <text:p><text:span text:style-name="T15"><text:s/>z =</text:span></text:p>
            <text:p><text:span text:style-name="T15"><text:s text:c="2"/>8, 4, -0, -4, -8,</text:span></text:p>
            <text:p><text:span text:style-name="T15"><text:s text:c="2"/>4, 2, -0, -2, -4,</text:span></text:p>
            <text:p><text:span text:style-name="T15"><text:s text:c="2"/>-0, -0, 0, 0, 0,</text:span></text:p>
            <text:p><text:span text:style-name="T15"><text:s text:c="2"/>-4, -2, 0, 2, 4,</text:span></text:p>
            <text:p><text:span text:style-name="T15"><text:s text:c="2"/>-8, -4, 0, 4, 8 ;</text:span></text:p>
            <text:p><text:span text:style-name="T15">}</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0"><text:span text:style-name="T16">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9" draw:text-style-name="P17" draw:layer="layout" svg:width="12.394cm" svg:height="8.189cm" svg:x="1.401cm" svg:y="5.582cm">
          <draw:text-box>
            <text:p><text:span text:style-name="T15">betavis</text:span></text:p>
            <text:p><text:span text:style-name="T15">0.0</text:span></text:p>
            <text:p><text:span text:style-name="T15">za_lake</text:span></text:p>
            <text:p><text:span text:style-name="T15">0.6</text:span></text:p>
            <text:p><text:span text:style-name="T15">n2min</text:span></text:p>
            <text:p><text:span text:style-name="T15">7.4999999999999993E-005</text:span></text:p>
            <text:p><text:span text:style-name="T15">tdmax</text:span></text:p>
            <text:p><text:span text:style-name="T15">277.0</text:span></text:p>
            <text:p><text:span text:style-name="T15">pudz</text:span></text:p>
            <text:p><text:span text:style-name="T15">0.0</text:span></text:p>
            <text:p><text:span text:style-name="T15">mixfact</text:span></text:p>
            <text:p><text:span text:style-name="T15">10.0</text:span></text:p>
            <text:p><text:span text:style-name="T15">depthcrit</text:span></text:p>
            <text:p><text:span text:style-name="T15">25.0</text:span></text:p>
          </draw:text-box>
        </draw:frame>
        <draw:frame draw:style-name="gr10" draw:text-style-name="P18" draw:layer="layout" svg:width="12.393cm" svg:height="0.818cm" svg:x="1.401cm" svg:y="4.84cm">
          <draw:text-box>
            <text:p text:style-name="P7"><text:span text:style-name="T17">Constants (formerly lakeparams.txt)</text:span></text:p>
          </draw:text-box>
        </draw:frame>
        <draw:frame draw:style-name="gr11" draw:text-style-name="P17" draw:layer="layout" svg:width="12.394cm" svg:height="7.117cm" svg:x="14.206cm" svg:y="5.583cm">
          <draw:text-box>
            <text:p><text:span text:style-name="T18">{</text:span></text:p>
            <text:p><text:span text:style-name="T19"><text:s text:c="2"/></text:span><text:span text:style-name="T20">"betavis"</text:span><text:span text:style-name="T18">:</text:span><text:span text:style-name="T19"> </text:span><text:span text:style-name="T21">0.0</text:span><text:span text:style-name="T18">,</text:span></text:p>
            <text:p><text:span text:style-name="T19"><text:s text:c="2"/></text:span><text:span text:style-name="T20">"za_lake"</text:span><text:span text:style-name="T18">:</text:span><text:span text:style-name="T19"> </text:span><text:span text:style-name="T21">0.6</text:span><text:span text:style-name="T18">,</text:span></text:p>
            <text:p><text:span text:style-name="T19"><text:s text:c="2"/></text:span><text:span text:style-name="T20">"n2min"</text:span><text:span text:style-name="T18">:</text:span><text:span text:style-name="T19"> </text:span><text:span text:style-name="T21">7.4999999999999993E-005</text:span><text:span text:style-name="T18">,</text:span></text:p>
            <text:p><text:span text:style-name="T19"><text:s text:c="2"/></text:span><text:span text:style-name="T20">"tdmax"</text:span><text:span text:style-name="T18">:</text:span><text:span text:style-name="T19"> </text:span><text:span text:style-name="T21">277.0</text:span><text:span text:style-name="T18">,</text:span></text:p>
            <text:p><text:span text:style-name="T19"><text:s text:c="2"/></text:span><text:span text:style-name="T20">"pudz"</text:span><text:span text:style-name="T18">:</text:span><text:span text:style-name="T19"> </text:span><text:span text:style-name="T21">0.0</text:span><text:span text:style-name="T18">,</text:span></text:p>
            <text:p><text:span text:style-name="T19"><text:s text:c="2"/></text:span><text:span text:style-name="T20">"mixfact"</text:span><text:span text:style-name="T18">:</text:span><text:span text:style-name="T19"> </text:span><text:span text:style-name="T21">10.0</text:span><text:span text:style-name="T18">,</text:span></text:p>
            <text:p><text:span text:style-name="T19"><text:s text:c="2"/></text:span><text:span text:style-name="T20">"depthcrit"</text:span><text:span text:style-name="T18">:</text:span><text:span text:style-name="T19"> </text:span><text:span text:style-name="T21">25.0</text:span></text:p>
            <text:p><text:span text:style-name="T18">}</text:span></text:p>
          </draw:text-box>
        </draw:frame>
        <draw:frame draw:style-name="gr10" draw:text-style-name="P18" draw:layer="layout" svg:width="12.393cm" svg:height="0.818cm" svg:x="14.206cm" svg:y="4.841cm">
          <draw:text-box>
            <text:p text:style-name="P7"><text:span text:style-name="T17">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7" draw:layer="layout" svg:width="25.193cm" svg:height="3.146cm" svg:x="1.406cm" svg:y="11.291cm">
          <draw:text-box>
            <text:p><text:span text:style-name="T18">{</text:span></text:p>
            <text:p><text:span text:style-name="T19"><text:s text:c="2"/></text:span><text:span text:style-name="T20">"veg_ef%eflx_soil_grnd"</text:span><text:span text:style-name="T18">:</text:span><text:span text:style-name="T19"> </text:span><text:span text:style-name="T18">[</text:span><text:span text:style-name="T21">0.0</text:span><text:span text:style-name="T18">,</text:span><text:span text:style-name="T19"> </text:span><text:span text:style-name="T21">...</text:span><text:span text:style-name="T18">],</text:span></text:p>
            <text:p><text:span text:style-name="T19"><text:s text:c="2"/></text:span><text:span text:style-name="T20">"veg_ef%eflx_gnet"</text:span><text:span text:style-name="T18">:</text:span><text:span text:style-name="T19"> </text:span><text:span text:style-name="T18">[[</text:span><text:span text:style-name="T21">0.0</text:span><text:span text:style-name="T18">,</text:span><text:span text:style-name="T19"> </text:span><text:span text:style-name="T21">...</text:span><text:span text:style-name="T18">],</text:span><text:span text:style-name="T19"> </text:span><text:span text:style-name="T21">...</text:span><text:span text:style-name="T18">],</text:span></text:p>
            <text:p><text:span text:style-name="T19"><text:s text:c="2"/></text:span><text:span text:style-name="T21">...</text:span></text:p>
            <text:p><text:span text:style-name="T18">}</text:span></text:p>
          </draw:text-box>
        </draw:frame>
        <draw:frame draw:style-name="gr10" draw:text-style-name="P18" draw:layer="layout" svg:width="20.304cm" svg:height="0.818cm" svg:x="3.848cm" svg:y="10.549cm">
          <draw:text-box>
            <text:p text:style-name="P7"><text:span text:style-name="T17">Outputs Received by Analysis Plugins (JSON for illustration)</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3" draw:text-style-name="P17" draw:layer="layout" svg:width="12.394cm" svg:height="8.279cm" svg:x="1.411cm" svg:y="4.839cm">
          <draw:text-box>
            <text:p><text:span text:style-name="T18">[</text:span></text:p>
            <text:p><text:span text:style-name="T18"><text:s text:c="2"/>{</text:span></text:p>
            <text:p><text:span text:style-name="T19"><text:s text:c="4"/></text:span><text:span text:style-name="T20">"betavis"</text:span><text:span text:style-name="T18">:</text:span><text:span text:style-name="T19"> </text:span><text:span text:style-name="T21">0.0</text:span><text:span text:style-name="T18">,</text:span></text:p>
            <text:p><text:span text:style-name="T18"><text:s text:c="4"/>...</text:span></text:p>
            <text:p><text:span text:style-name="T18"><text:s text:c="2"/>},</text:span></text:p>
            <text:p text:style-name="P19"><text:span text:style-name="T18"><text:s text:c="2"/>{</text:span></text:p>
            <text:p text:style-name="P19"><text:span text:style-name="T19"><text:s text:c="4"/></text:span><text:span text:style-name="T20">"betavis"</text:span><text:span text:style-name="T18">:</text:span><text:span text:style-name="T19"> </text:span><text:span text:style-name="T21">0.25</text:span><text:span text:style-name="T18">,</text:span></text:p>
            <text:p text:style-name="P19"><text:span text:style-name="T18"><text:s text:c="4"/>...</text:span></text:p>
            <text:p text:style-name="P19"><text:span text:style-name="T18"><text:s text:c="2"/>},</text:span></text:p>
            <text:p text:style-name="P19"><text:span text:style-name="T18"><text:s text:c="2"/>{</text:span></text:p>
            <text:p text:style-name="P19"><text:span text:style-name="T19"><text:s text:c="4"/></text:span><text:span text:style-name="T20">"betavis"</text:span><text:span text:style-name="T18">:</text:span><text:span text:style-name="T19"> </text:span><text:span text:style-name="T21">0.5</text:span><text:span text:style-name="T18">,</text:span></text:p>
            <text:p text:style-name="P19"><text:span text:style-name="T18"><text:s text:c="4"/>...</text:span></text:p>
            <text:p text:style-name="P19"><text:span text:style-name="T18"><text:s text:c="2"/>}</text:span></text:p>
            <text:p><text:span text:style-name="T18">]</text:span></text:p>
          </draw:text-box>
        </draw:frame>
        <draw:frame draw:style-name="gr10" draw:text-style-name="P18" draw:layer="layout" svg:width="12.393cm" svg:height="0.818cm" svg:x="1.411cm" svg:y="4.097cm">
          <draw:text-box>
            <text:p text:style-name="P7"><text:span text:style-name="T17">Sample Group Data (JSON for illustration)</text:span></text:p>
          </draw:text-box>
        </draw:frame>
        <draw:frame draw:style-name="gr13" draw:text-style-name="P17" draw:layer="layout" svg:width="12.739cm" svg:height="8.279cm" svg:x="14.205cm" svg:y="4.839cm">
          <draw:text-box>
            <text:p><text:span text:style-name="T18">[</text:span></text:p>
            <text:p><text:span text:style-name="T19"><text:s text:c="2"/></text:span><text:span text:style-name="T18">{</text:span></text:p>
            <text:p text:style-name="P19"><text:span text:style-name="T22"><text:s text:c="4"/></text:span><text:span text:style-name="T23">"lakestate_vars%betaprime_col</text:span><text:span text:style-name="T20">"</text:span><text:span text:style-name="T18">:</text:span><text:span text:style-name="T19"> </text:span><text:span text:style-name="T18">[</text:span><text:span text:style-name="T21">0.0</text:span><text:span text:style-name="T18">,</text:span><text:span text:style-name="T19"> </text:span><text:span text:style-name="T24">...</text:span><text:span text:style-name="T18">],</text:span></text:p>
            <text:p text:style-name="P19"><text:span text:style-name="T19"><text:s text:c="4"/></text:span><text:span text:style-name="T24">...</text:span></text:p>
            <text:p><text:span text:style-name="T19"><text:s text:c="2"/></text:span><text:span text:style-name="T18">},</text:span></text:p>
            <text:p text:style-name="P19"><text:span text:style-name="T19"><text:s text:c="2"/></text:span><text:span text:style-name="T18">{</text:span></text:p>
            <text:p text:style-name="P19"><text:span text:style-name="T22"><text:s text:c="4"/></text:span><text:span text:style-name="T23">"lakestate_vars%betaprime_col</text:span><text:span text:style-name="T20">"</text:span><text:span text:style-name="T18">:</text:span><text:span text:style-name="T19"> </text:span><text:span text:style-name="T18">[</text:span><text:span text:style-name="T21">0.25</text:span><text:span text:style-name="T18">,</text:span><text:span text:style-name="T19"> </text:span><text:span text:style-name="T24">...</text:span><text:span text:style-name="T18">],</text:span></text:p>
            <text:p text:style-name="P19"><text:span text:style-name="T19"><text:s text:c="4"/></text:span><text:span text:style-name="T24">...</text:span></text:p>
            <text:p text:style-name="P19"><text:span text:style-name="T19"><text:s text:c="2"/></text:span><text:span text:style-name="T18">},</text:span></text:p>
            <text:p text:style-name="P19"><text:span text:style-name="T19"><text:s text:c="2"/></text:span><text:span text:style-name="T18">{</text:span></text:p>
            <text:p text:style-name="P19"><text:span text:style-name="T22"><text:s text:c="4"/></text:span><text:span text:style-name="T23">"lakestate_vars%betaprime_col</text:span><text:span text:style-name="T20">"</text:span><text:span text:style-name="T18">:</text:span><text:span text:style-name="T19"> </text:span><text:span text:style-name="T18">[</text:span><text:span text:style-name="T21">0.5</text:span><text:span text:style-name="T18">,</text:span><text:span text:style-name="T19"> </text:span><text:span text:style-name="T24">...</text:span><text:span text:style-name="T18">],</text:span></text:p>
            <text:p text:style-name="P19"><text:span text:style-name="T19"><text:s text:c="4"/></text:span><text:span text:style-name="T24">...</text:span></text:p>
            <text:p text:style-name="P19"><text:span text:style-name="T19"><text:s text:c="2"/></text:span><text:span text:style-name="T18">}</text:span></text:p>
            <text:p><text:span text:style-name="T18">]</text:span></text:p>
          </draw:text-box>
        </draw:frame>
        <draw:frame draw:style-name="gr10" draw:text-style-name="P18" draw:layer="layout" svg:width="12.393cm" svg:height="0.818cm" svg:x="14.205cm" svg:y="4.097cm">
          <draw:text-box>
            <text:p text:style-name="P7"><text:span text:style-name="T17">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2.159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
                  <text:list-item>
                    <text:p>For example, if we have constants A and B, default input data, and a specific output variable O, one question we might have is which of the constants has a greater effect on the output variable O. </text:p>
                  </text:list-item>
                  <text:list-item>
                    <text:p>We could answer this by defining a sampling plugin that would set the constants to be different values, such as A=5 and B=5 for one run, A=10 and B=5 for another run, and A=5 and B=10 for the third run.</text:p>
                  </text:list-item>
                  <text:list-item>
                    <text:p>Then we would need an analysis plugin that focuses on the how the value of output O changes between runs to determine whether constant A or B affects it more. </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 UML Diagram</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draw:frame draw:style-name="gr2" draw:text-style-name="P5" draw:layer="layout" svg:width="15.804cm" svg:height="2.715cm" svg:x="6.378cm" svg:y="10.104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layer="layout" svg:width="25.199cm" svg:height="9.134cm" svg:x="1.4cm" svg:y="3.685cm" presentation:class="outline">
          <draw:text-box>
            <text:list text:style-name="L2">
              <text:list-item>
                <text:p>CSV Index Sampling</text:p>
                <text:list>
                  <text:list-item>
                    <text:p>Uses CSV files generated by <text:span text:style-name="T4">ACTS</text:span><text:span text:style-name="T25">1</text:span><text:span text:style-name="T7"> to create samples. It will take the largest index and use that to linearly interpolate between the values for each constant found in the ranges file</text:span></text:p>
                  </text:list-item>
                </text:list>
              </text:list-item>
              <text:list-item>
                <text:p>Order Sampling</text:p>
                <text:list>
                  <text:list-item>
                    <text:p>Uses JSON files called “orders” to create “lines” in the input space (the constants), through linear interpolation</text:p>
                  </text:list-item>
                </text:list>
              </text:list-item>
            </text:list>
          </draw:text-box>
        </draw:frame>
        <draw:frame presentation:style-name="pr5" draw:text-style-name="P4" draw:layer="layout" svg:width="25.199cm" svg:height="0.839cm" svg:x="1.327cm" svg:y="14.306cm" presentation:class="outline" presentation:user-transformed="true">
          <draw:text-box>
            <text:p text:style-name="P20"><text:span text:style-name="T9">1. “Automated Combinatorial Testing for Software (ACTS).” </text:span><text:span text:style-name="T10">National Institute of Standards and Technology</text:span><text:span text:style-name="T9">, 20 July 2016, csrc.nist.rip/groups/SNS/acts/. </text:span></text:p>
            <text:p text:style-name="P20"><text:span text:style-name="T9"/></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7">Analysis Plugin Interface Visuals</text:p>
          </draw:text-box>
        </draw:frame>
        <draw:frame draw:style-name="gr2" draw:text-style-name="P5" draw:layer="layout" svg:width="9.489cm" svg:height="6.031cm" svg:x="3.443cm" svg:y="5.545cm">
          <draw:image xlink:href="Pictures/100000010000021A000001568880D7F2.png" xlink:type="simple" xlink:show="embed" xlink:actuate="onLoad" draw:mime-type="image/png">
            <text:p/>
          </draw:image>
        </draw:frame>
        <draw:frame draw:style-name="gr2" draw:text-style-name="P5" draw:layer="layout" svg:width="9.771cm" svg:height="6.102cm" svg:x="14.502cm" svg:y="5.474cm">
          <draw:image xlink:href="Pictures/100000010000022A0000015ACDD290C6.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presentation:style-name="pr5" draw:layer="layout" svg:width="25.199cm" svg:height="9.134cm" svg:x="1.4cm" svg:y="3.685cm" presentation:class="outline" presentation:user-transformed="true">
          <draw:text-box>
            <text:list text:style-name="L2">
              <text:list-item>
                <text:p>Change Detection</text:p>
                <text:list>
                  <text:list-item>
                    <text:p>Identifies, per sample group, which inputs and outputs differ at some point from the reference</text:p>
                  </text:list-item>
                </text:list>
              </text:list-item>
              <text:list-item>
                <text:p>Differences</text:p>
                <text:list>
                  <text:list-item>
                    <text:p>Finds differences between values in the reference data and the current sample’s data. It records the indices of the difference, the two differing values, and the difference between them.</text:p>
                  </text:list-item>
                </text:list>
              </text:list-item>
              <text:list-item>
                <text:p>Fault Finding</text:p>
                <text:list>
                  <text:list-item>
                    <text:p>Uses “check” functions defined by the plugin user to make assertions about values in the sample data, similar to a unit testing framework but with assertions pertaining to model values rather than specific function behavior</text:p>
                  </text:list-item>
                </text:list>
              </text:list-item>
              <text:list-item>
                <text:p>NetCDF4 Output</text:p>
                <text:list>
                  <text:list-item>
                    <text:p>Stores each sample group as an individual NetCDF file, to be used for graphing changes based on our samples. To do this, it just adds a new dimension “sample_index” and layers each sample’s NetCDF file on top of the others using that. </text:p>
                  </text:list-item>
                </text:list>
              </text:list-item>
            </text:list>
            <text:p/>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4" draw:text-style-name="P21" draw:layer="layout" svg:width="18.129cm" svg:height="7.095cm" svg:x="4.936cm" svg:y="4.328cm">
          <text:p/>
          <draw:enhanced-geometry svg:viewBox="0 0 21600 21600" draw:type="rectangle" draw:enhanced-path="M 0 0 L 21600 0 21600 21600 0 21600 0 0 Z N"/>
        </draw:custom-shape>
        <draw:custom-shape draw:style-name="gr15" draw:text-style-name="P22"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26</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7T10:02:53.674000000</dc:date>
    <meta:editing-duration>PT3H46M41S</meta:editing-duration>
    <meta:editing-cycles>39</meta:editing-cycles>
    <meta:print-date>2026-02-12T10:51:06.806072000</meta:print-date>
    <meta:printed-by>PDF files</meta:printed-by>
    <meta:document-statistic meta:object-count="152"/>
  </office:meta>
</office:document-meta>
</file>