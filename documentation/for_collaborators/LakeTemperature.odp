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CaskaydiaCove NFM" svg:font-family="'CaskaydiaCove NFM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URW Bookman" svg:font-family="'URW Book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34383a" draw:fill="solid" draw:fill-color="#34383a" draw:opacity="90%" draw:textarea-horizontal-align="justify" draw:textarea-vertical-align="middle" draw:auto-grow-height="false" fo:min-height="6.845cm" fo:min-width="17.629cm" loext:decorative="false"/>
    </style:style>
    <style:style style:name="gr3" style:family="graphic" style:parent-style-name="standard">
      <style:graphic-properties svg:stroke-color="#f46b2b" draw:fill="solid" draw:fill-color="#f46b2b" draw:opacity="90%" draw:textarea-horizontal-align="justify" draw:textarea-vertical-align="middle" draw:auto-grow-height="false" fo:min-height="1.894cm" fo:min-width="5.497cm" loext:decorative="false"/>
    </style:style>
    <style:style style:name="gr4" style:family="graphic" style:parent-style-name="standard">
      <style:graphic-properties ch2_options="{'Style': 'native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6.63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23cm" loext:decorative="false"/>
      <style:paragraph-properties style:writing-mode="lr-tb"/>
    </style:style>
    <style:style style:name="gr6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6.867cm" loext:decorative="false"/>
      <style:paragraph-properties style:writing-mode="lr-tb"/>
    </style:style>
    <style:style style:name="gr7" style:family="graphic" style:parent-style-name="standard">
      <style:graphic-properties ch2_options="{'Style': 'native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2.13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92cm" loext:decorative="false"/>
      <style:paragraph-properties style:writing-mode="lr-tb"/>
    </style:style>
    <style:style style:name="gr9" style:family="graphic" style:parent-style-name="standard">
      <style:graphic-properties ch2_options="{'Style': 'native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02020" draw:auto-grow-height="true" draw:auto-grow-width="false" fo:min-height="4.09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0.56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style:font-name="URW Bookman"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34383a" draw:opacity="90%"/>
      <style:paragraph-properties fo:text-align="center"/>
    </style:style>
    <style:style style:name="P4" style:family="paragraph">
      <loext:graphic-properties draw:fill="solid" draw:fill-color="#f46b2b" draw:opacity="90%"/>
      <style:paragraph-properties fo:text-align="center"/>
    </style:style>
    <style:style style:name="P5" style:family="paragraph">
      <style:text-properties style:font-name="CaskaydiaCove NFM" fo:font-size="12pt" style:font-size-asian="12pt" style:font-size-complex="12pt"/>
    </style:style>
    <style:style style:name="P6" style:family="paragraph">
      <loext:graphic-properties draw:fill="solid" draw:fill-color="#202020"/>
      <style:text-properties style:font-name="CaskaydiaCove NFM" fo:font-size="12pt" style:font-size-asian="12pt" style:font-size-complex="12pt"/>
    </style:style>
    <style:style style:name="P7" style:family="paragraph">
      <style:paragraph-properties fo:text-align="center"/>
      <style:text-properties style:font-name="CaskaydiaCove NFM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style:font-name="CaskaydiaCove NFM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font-name="CaskaydiaCove NFM" fo:font-size="12pt" style:font-size-asian="12pt" style:font-size-complex="12pt"/>
    </style:style>
    <style:style style:name="T1" style:family="text">
      <style:text-properties style:font-name="URW Bookman" fo:font-size="16pt" style:font-size-asian="16pt" style:font-size-complex="16pt"/>
    </style:style>
    <style:style style:name="T2" style:family="text">
      <style:text-properties style:use-window-font-color="true" loext:opacity="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3" style:family="text">
      <style:text-properties style:font-name="CaskaydiaCove NFM" fo:font-size="12pt" style:font-size-asian="12pt" style:font-size-complex="12pt"/>
    </style:style>
    <style:style style:name="T4" style:family="text">
      <style:text-properties fo:color="#d0d0d0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5" style:family="text">
      <style:text-properties fo:color="#666666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6" style:family="text">
      <style:text-properties fo:color="#6ebf26" loext:opacity="100%" style:font-name="CaskaydiaCove NFM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7" style:family="text">
      <style:text-properties fo:color="#51b2fd" loext:opacity="100%" style:font-name="CaskaydiaCove NFM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ebf26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bold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d0d0d0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1b2fd" loext:opacity="100%" style:text-outline="false" style:text-line-through-style="none" style:text-line-through-type="none" style:font-name="CaskaydiaCove NFM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1b2fd" loext:opacity="100%" style:text-outline="false" style:text-line-through-style="none" style:text-line-through-type="none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d0d0d0" loext:opacity="100%" style:text-outline="false" style:text-line-through-style="none" style:text-line-through-type="none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fo:font-size="12pt" fo:language="zxx" fo:country="none" fo:font-style="normal" fo:text-shadow="none" style:text-underline-style="none" fo:font-weight="normal" style:letter-kerning="true" fo:background-color="transparent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01cm" svg:y="5.671cm" presentation:class="title" presentation:user-transformed="true">
          <draw:text-box>
            <text:p>Testing LakeTemperature</text:p>
          </draw:text-box>
        </draw:frame>
        <draw:frame presentation:style-name="pr2" draw:text-style-name="P1" draw:layer="layout" svg:width="25.199cm" svg:height="0.564cm" svg:x="1.4cm" svg:y="7.967cm" presentation:class="subtitle" presentation:user-transformed="true">
          <draw:text-box>
            <text:p><text:span text:style-name="T1">Slides by Aidan Bens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3" draw:layer="layout" svg:width="18.129cm" svg:height="7.095cm" svg:x="4.936cm" svg:y="4.3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997cm" svg:height="2.144cm" svg:x="11.002cm" svg:y="6.8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Goa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velop a software that can systematically change the constants used in the LakeTemperature model and allow us to visualize and observe patterns in how this affects its output.</text:p>
              </text:list-item>
              <text:list-item>
                <text:p>Apply testing techniques to try and find inputs that will cause physically impossible or unrealisti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akeTemperature Model Interfa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 a unit test produced by SPEL for the LakeTemperature module with a specific dataset.</text:p>
              </text:list-item>
              <text:list-item>
                <text:p>Allows us to change the values of constants normally specified in LakeCon using the file lakeparams.txt.</text:p>
              </text:list-item>
              <text:list-item>
                <text:p>Provides a file cpu_LakeTemperatureTest.txt that lists output values for comparison purposes.</text:p>
              </text:list-item>
              <text:list-item>
                <text:p>We can set values in lakeparams.txt, run elmtest.exe, and get results inside cpu_LakeTemperatureTest.tx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r Testing Solu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mates the process of inputting constants into lakeparams.txt and the process of analyzing the resulting values in cpu_LakeTemperatureTest.txt.</text:p>
              </text:list-item>
              <text:list-item>
                <text:p>Both the process of picking values for the constants and the process of analyzing the resulting outputs is extendable through sampling plugins and analysis plugins respective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a Sampl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ample is a set of values for the constants contained in lakeparams.txt.</text:p>
              </text:list-item>
              <text:list-item>
                <text:p>elmtest.exe is run once for every sample.</text:p>
              </text:list-item>
            </text:list>
          </draw:text-box>
        </draw:frame>
        <draw:frame draw:style-name="gr4" draw:text-style-name="P6" draw:layer="layout" svg:width="12.394cm" svg:height="7.125cm" svg:x="1.4cm" svg:y="8.272cm">
          <draw:text-box>
            <text:p text:style-name="P5"><text:span text:style-name="T2">betavis</text:span></text:p>
            <text:p text:style-name="P5"><text:span text:style-name="T2">0.0</text:span></text:p>
            <text:p text:style-name="P5"><text:span text:style-name="T2">za_lake</text:span></text:p>
            <text:p text:style-name="P5"><text:span text:style-name="T2">0.6</text:span></text:p>
            <text:p text:style-name="P5"><text:span text:style-name="T2">n2min</text:span></text:p>
            <text:p text:style-name="P5"><text:span text:style-name="T2">7.4999999999999993E-005</text:span></text:p>
            <text:p text:style-name="P5"><text:span text:style-name="T2">tdmax</text:span></text:p>
            <text:p text:style-name="P5"><text:span text:style-name="T2">277.0</text:span></text:p>
            <text:p text:style-name="P5"><text:span text:style-name="T2">pudz</text:span></text:p>
            <text:p text:style-name="P5"><text:span text:style-name="T2">0.0</text:span></text:p>
            <text:p text:style-name="P5"><text:span text:style-name="T2">mixfact</text:span></text:p>
            <text:p text:style-name="P5"><text:span text:style-name="T2">10.0</text:span></text:p>
            <text:p text:style-name="P5"><text:span text:style-name="T2">depthcrit</text:span></text:p>
            <text:p text:style-name="P5"><text:span text:style-name="T2">25.0</text:span></text:p>
          </draw:text-box>
        </draw:frame>
        <draw:frame draw:style-name="gr5" draw:text-style-name="P8" draw:layer="layout" svg:width="12.393cm" svg:height="0.742cm" svg:x="1.4cm" svg:y="7.53cm">
          <draw:text-box>
            <text:p text:style-name="P7"><text:span text:style-name="T3">lakeparams.txt</text:span></text:p>
          </draw:text-box>
        </draw:frame>
        <draw:frame draw:style-name="gr6" draw:text-style-name="P6" draw:layer="layout" svg:width="12.394cm" svg:height="7.117cm" svg:x="14.205cm" svg:y="8.273cm">
          <draw:text-box>
            <text:p text:style-name="P5"><text:span text:style-name="T4">{</text:span></text:p>
            <text:p text:style-name="P5"><text:span text:style-name="T5"><text:s text:c="2"/></text:span><text:span text:style-name="T6">"betavis"</text:span><text:span text:style-name="T4">:</text:span><text:span text:style-name="T5"> </text:span><text:span text:style-name="T7">0.0</text:span><text:span text:style-name="T4">,</text:span></text:p>
            <text:p text:style-name="P5"><text:span text:style-name="T5"><text:s text:c="2"/></text:span><text:span text:style-name="T6">"za_lake"</text:span><text:span text:style-name="T4">:</text:span><text:span text:style-name="T5"> </text:span><text:span text:style-name="T7">0.6</text:span><text:span text:style-name="T4">,</text:span></text:p>
            <text:p text:style-name="P5"><text:span text:style-name="T5"><text:s text:c="2"/></text:span><text:span text:style-name="T6">"n2min"</text:span><text:span text:style-name="T4">:</text:span><text:span text:style-name="T5"> </text:span><text:span text:style-name="T7">7.4999999999999993E-005</text:span><text:span text:style-name="T4">,</text:span></text:p>
            <text:p text:style-name="P5"><text:span text:style-name="T5"><text:s text:c="2"/></text:span><text:span text:style-name="T6">"tdmax"</text:span><text:span text:style-name="T4">:</text:span><text:span text:style-name="T5"> </text:span><text:span text:style-name="T7">277.0</text:span><text:span text:style-name="T4">,</text:span></text:p>
            <text:p text:style-name="P5"><text:span text:style-name="T5"><text:s text:c="2"/></text:span><text:span text:style-name="T6">"pudz"</text:span><text:span text:style-name="T4">:</text:span><text:span text:style-name="T5"> </text:span><text:span text:style-name="T7">0.0</text:span><text:span text:style-name="T4">,</text:span></text:p>
            <text:p text:style-name="P5"><text:span text:style-name="T5"><text:s text:c="2"/></text:span><text:span text:style-name="T6">"mixfact"</text:span><text:span text:style-name="T4">:</text:span><text:span text:style-name="T5"> </text:span><text:span text:style-name="T7">10.0</text:span><text:span text:style-name="T4">,</text:span></text:p>
            <text:p text:style-name="P5"><text:span text:style-name="T5"><text:s text:c="2"/></text:span><text:span text:style-name="T6">"depthcrit"</text:span><text:span text:style-name="T4">:</text:span><text:span text:style-name="T5"> </text:span><text:span text:style-name="T7">25.0</text:span></text:p>
            <text:p text:style-name="P5"><text:span text:style-name="T4">}</text:span></text:p>
          </draw:text-box>
        </draw:frame>
        <draw:frame draw:style-name="gr5" draw:text-style-name="P8" draw:layer="layout" svg:width="12.393cm" svg:height="0.742cm" svg:x="14.205cm" svg:y="7.531cm">
          <draw:text-box>
            <text:p text:style-name="P7"><text:span text:style-name="T3">Example Samp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Outputs are Received per Sample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alysis plugins will receive the outputs from the cpu_LakeTemperatureTest.txt file in the form of a dictionary.</text:p>
              </text:list-item>
            </text:list>
          </draw:text-box>
        </draw:frame>
        <draw:frame draw:style-name="gr7" draw:text-style-name="P6" draw:layer="layout" svg:width="25.198cm" svg:height="3.197cm" svg:x="1.4cm" svg:y="6.562cm">
          <draw:text-box>
            <text:p text:style-name="P5"><text:span text:style-name="T2"><text:s/>veg_ef%eflx_soil_grnd</text:span></text:p>
            <text:p text:style-name="P5"><text:span text:style-name="T2"><text:s text:c="3"/>1.0000000000000000E+036 <text:s text:c="2"/>1.0000000000000000E+036 <text:s text:c="2"/>1.0000000000000000E+036</text:span></text:p>
            <text:p text:style-name="P5"><text:span text:style-name="T2"><text:s text:c="3"/>1.0000000000000000E+036 <text:s text:c="3"/>77.59170422598278 <text:s text:c="7"/>1.0000000000000000E+036</text:span></text:p>
            <text:p text:style-name="P5"><text:span text:style-name="T2"><text:s text:c="2"/>veg_ef%eflx_gnet</text:span></text:p>
            <text:p text:style-name="P5"><text:span text:style-name="T2"><text:s text:c="3"/>1.0000000000000000E+036 <text:s text:c="2"/>1.0000000000000000E+036 <text:s text:c="2"/>1.0000000000000000E+036</text:span></text:p>
            <text:p text:style-name="P5"><text:span text:style-name="T2"><text:s text:c="3"/>1.0000000000000000E+036 <text:s text:c="3"/>76.98736546216425 <text:s text:c="7"/>1.0000000000000000E+036</text:span></text:p>
          </draw:text-box>
        </draw:frame>
        <draw:frame draw:style-name="gr8" draw:text-style-name="P8" draw:layer="layout" svg:width="25.198cm" svg:height="0.742cm" svg:x="1.4cm" svg:y="5.82cm">
          <draw:text-box>
            <text:p text:style-name="P7"><text:span text:style-name="T3">cpu_LakeTemperatureTest.txt</text:span></text:p>
          </draw:text-box>
        </draw:frame>
        <draw:frame draw:style-name="gr9" draw:text-style-name="P6" draw:layer="layout" svg:width="25.193cm" svg:height="5.161cm" svg:x="1.4cm" svg:y="10.501cm">
          <draw:text-box>
            <text:p text:style-name="P5"><text:span text:style-name="T4">{</text:span></text:p>
            <text:p text:style-name="P9"><text:span text:style-name="T8"><text:s text:c="2"/></text:span><text:span text:style-name="T9">"veg_ef%eflx_soil_grnd"</text:span><text:span text:style-name="T10">:</text:span><text:span text:style-name="T8"> </text:span><text:span text:style-name="T10">[</text:span></text:p>
            <text:p text:style-name="P9"><text:span text:style-name="T11"><text:s text:c="4"/>1.0000000000000000E+036</text:span><text:span text:style-name="T4">,</text:span><text:span text:style-name="T5"> </text:span><text:span text:style-name="T7">1.0000000000000000E+036</text:span><text:span text:style-name="T4">,</text:span><text:span text:style-name="T5"> </text:span><text:span text:style-name="T7">1.0000000000000000E+036</text:span><text:span text:style-name="T4">,</text:span></text:p>
            <text:p text:style-name="P9"><text:span text:style-name="T12"><text:s text:c="4"/>1.0000000000000000E+036</text:span><text:span text:style-name="T13">,</text:span><text:span text:style-name="T14"> </text:span><text:span text:style-name="T12">77.59170422598278</text:span><text:span text:style-name="T13">,</text:span><text:span text:style-name="T14"> </text:span><text:span text:style-name="T12">1.0000000000000000E+036</text:span></text:p>
            <text:p text:style-name="P9"><text:span text:style-name="T5"><text:s text:c="2"/></text:span><text:span text:style-name="T4">],</text:span></text:p>
            <text:p text:style-name="P9"><text:span text:style-name="T8"><text:s text:c="2"/></text:span><text:span text:style-name="T9">"veg_ef%eflx_gnet"</text:span><text:span text:style-name="T10">:</text:span><text:span text:style-name="T8"> </text:span><text:span text:style-name="T10">[</text:span></text:p>
            <text:p text:style-name="P9"><text:span text:style-name="T11"><text:s text:c="4"/>1.0000000000000000E+036</text:span><text:span text:style-name="T4">,</text:span><text:span text:style-name="T5"> </text:span><text:span text:style-name="T7">1.0000000000000000E+036</text:span><text:span text:style-name="T4">,</text:span><text:span text:style-name="T5"> </text:span><text:span text:style-name="T7">1.0000000000000000E+036</text:span><text:span text:style-name="T4">,</text:span></text:p>
            <text:p text:style-name="P9"><text:span text:style-name="T11"><text:s text:c="4"/>1.0000000000000000E+036</text:span><text:span text:style-name="T10">,</text:span><text:span text:style-name="T8"> </text:span><text:span text:style-name="T11">76.98736546216425</text:span><text:span text:style-name="T10">,</text:span><text:span text:style-name="T8"> </text:span><text:span text:style-name="T11">1.0000000000000000E+036</text:span></text:p>
            <text:p text:style-name="P9"><text:span text:style-name="T5"><text:s text:c="2"/></text:span><text:span text:style-name="T4">],</text:span></text:p>
            <text:p text:style-name="P5"><text:span text:style-name="T4">}</text:span></text:p>
          </draw:text-box>
        </draw:frame>
        <draw:frame draw:style-name="gr8" draw:text-style-name="P8" draw:layer="layout" svg:width="20.304cm" svg:height="0.742cm" svg:x="1.4cm" svg:y="9.759cm">
          <draw:text-box>
            <text:p text:style-name="P7"><text:span text:style-name="T3">Outputs Received by Analysis Plugi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CaskaydiaCove NFM" svg:font-family="'CaskaydiaCove NFM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f1112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dwaita Sans" fo:font-family="'Adwaita Sans'" style:font-family-generic="swiss" style:font-pitch="variable" fo:font-size="2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dwaita Sans" fo:font-family="'Adwaita Sans'" style:font-family-generic="swiss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style:font-name="Adwaita Sans" fo:font-family="'Adwaita Sans'" style:font-family-generic="swiss" style:font-pitch="variable" fo:font-size="12pt" style:font-size-asian="12pt" style:font-size-complex="12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RW Bookman" fo:font-family="'URW Bookman'" style:font-pitch="variable" fo:font-size="36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f1112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18:27:27.879182752</meta:creation-date>
    <meta:generator>LibreOffice/25.8.1.1$Linux_X86_64 LibreOffice_project/580$Build-1</meta:generator>
    <dc:date>2025-09-09T01:31:30.894129745</dc:date>
    <meta:editing-duration>PT7M42S</meta:editing-duration>
    <meta:editing-cycles>6</meta:editing-cycles>
    <meta:document-statistic meta:object-count="57"/>
  </office:meta>
</office:document-meta>
</file>