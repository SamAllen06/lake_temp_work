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CaskaydiaCove NFM" svg:font-family="'CaskaydiaCove NFM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ch2_options="{'Style': 'native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6.8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4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6.867cm" loext:decorative="false"/>
      <style:paragraph-properties style:writing-mode="lr-tb"/>
    </style:style>
    <style:style style:name="gr5" style:family="graphic" style:parent-style-name="standard">
      <style:graphic-properties ch2_options="{'Style': 'native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2.947cm" loext:decorative="false"/>
      <style:paragraph-properties style:writing-mode="lr-tb"/>
    </style:style>
    <style:style style:name="gr6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4.911cm" loext:decorative="false"/>
      <style:paragraph-properties style:writing-mode="lr-tb"/>
    </style:style>
    <style:style style:name="gr7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7.342cm" loext:decorative="false"/>
      <style:paragraph-properties style:writing-mode="lr-tb"/>
    </style:style>
    <style:style style:name="gr8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7.366cm" loext:decorative="false"/>
      <style:paragraph-properties style:writing-mode="lr-tb"/>
    </style:style>
    <style:style style:name="gr9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8.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4cm" loext:decorative="false"/>
      <style:paragraph-properties style:writing-mode="lr-tb"/>
    </style:style>
    <style:style style:name="gr11" style:family="graphic" style:parent-style-name="standard">
      <style:graphic-properties svg:stroke-color="#34383a" draw:fill="solid" draw:fill-color="#34383a" draw:opacity="90%" draw:textarea-horizontal-align="justify" draw:textarea-vertical-align="middle" draw:auto-grow-height="false" fo:min-height="6.845cm" fo:min-width="17.629cm" loext:decorative="false"/>
    </style:style>
    <style:style style:name="gr12" style:family="graphic" style:parent-style-name="standard">
      <style:graphic-properties svg:stroke-color="#f46b2b" draw:fill="solid" draw:fill-color="#f46b2b" draw:opacity="90%" draw:textarea-horizontal-align="justify" draw:textarea-vertical-align="middle" draw:auto-grow-height="false" fo:min-height="1.894cm" fo:min-width="5.497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0.56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style:font-name="URW Bookman"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202020"/>
      <style:text-properties style:font-name="CaskaydiaCove NFM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askaydiaCove NFM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34383a" draw:opacity="90%"/>
      <style:paragraph-properties fo:text-align="center"/>
    </style:style>
    <style:style style:name="P8" style:family="paragraph">
      <loext:graphic-properties draw:fill="solid" draw:fill-color="#f46b2b" draw:opacity="90%"/>
      <style:paragraph-properties fo:text-align="center"/>
    </style:style>
    <style:style style:name="T1" style:family="text">
      <style:text-properties style:font-name="URW Bookman" fo:font-size="16pt" style:font-size-asian="16pt" style:font-size-complex="16pt"/>
    </style:style>
    <style:style style:name="T2" style:family="text">
      <style:text-properties style:use-window-font-color="true" loext:opacity="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" style:family="text">
      <style:text-properties style:font-name="CaskaydiaCove NFM" fo:font-size="12pt" style:font-size-asian="12pt" style:font-size-complex="12pt"/>
    </style:style>
    <style:style style:name="T4" style:family="text">
      <style:text-properties fo:color="#d0d0d0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5" style:family="text">
      <style:text-properties fo:color="#666666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6" style:family="text">
      <style:text-properties fo:color="#6ebf26" loext:opacity="100%" style:font-name="CaskaydiaCove NFM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7" style:family="text">
      <style:text-properties fo:color="#51b2fd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ebf26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bold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d0d0d0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1b2fd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6ebf26" loext:opacity="100%" style:font-name="CaskaydiaCove NFM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4" style:family="text">
      <style:text-properties fo:color="#d0d0d0" loext:opacity="100%" style:font-name="CaskaydiaCove NFM" fo:font-size="9pt" fo:language="zxx" fo:country="none" fo:font-style="normal" style:text-underline-style="none" fo:font-weight="normal" fo:background-color="transparen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5.671cm" presentation:class="title" presentation:user-transformed="true">
          <draw:text-box>
            <text:p>Testing LakeTemperature</text:p>
          </draw:text-box>
        </draw:frame>
        <draw:frame presentation:style-name="pr2" draw:text-style-name="P1" draw:layer="layout" svg:width="25.199cm" svg:height="0.564cm" svg:x="1.4cm" svg:y="7.967cm" presentation:class="subtitle" presentation:user-transformed="true">
          <draw:text-box>
            <text:p><text:span text:style-name="T1">Slides by Aidan Bens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ject 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velop a software that can systematically change the constants used in the LakeTemperature model and allow us to visualize and observe patterns in how this affects its output.</text:p>
              </text:list-item>
              <text:list-item>
                <text:p>Apply testing techniques to try and find inputs that will cause physically impossible or unrealisti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akeTemperature Model Interfac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a unit test produced by SPEL for the LakeTemperature module with a specific dataset.</text:p>
              </text:list-item>
              <text:list-item>
                <text:p>Allows us to change the values of constants normally specified in LakeCon using the file lakeparams.txt.</text:p>
              </text:list-item>
              <text:list-item>
                <text:p>Provides a file cpu_LakeTemperatureTest.txt that lists output values for comparison purposes.</text:p>
              </text:list-item>
              <text:list-item>
                <text:p>We can set values in lakeparams.txt, run elmtest.exe, and get results inside cpu_LakeTemperatureTest.tx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r Testing Solu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mates the process of inputting constants into lakeparams.txt and the process of analyzing the resulting values in cpu_LakeTemperatureTest.txt.</text:p>
              </text:list-item>
              <text:list-item>
                <text:p>Both the process of picking values for the constants and the process of analyzing the resulting outputs is extendable through sampling plugins and analysis plugins respective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a Sampl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sample is a set of values for the constants contained in lakeparams.txt.</text:p>
              </text:list-item>
              <text:list-item>
                <text:p>elmtest.exe is run once for every sample.</text:p>
              </text:list-item>
            </text:list>
          </draw:text-box>
        </draw:frame>
        <draw:frame draw:style-name="gr2" draw:text-style-name="P3" draw:layer="layout" svg:width="12.394cm" svg:height="7.125cm" svg:x="1.4cm" svg:y="8.272cm">
          <draw:text-box>
            <text:p><text:span text:style-name="T2">betavis</text:span></text:p>
            <text:p><text:span text:style-name="T2">0.0</text:span></text:p>
            <text:p><text:span text:style-name="T2">za_lake</text:span></text:p>
            <text:p><text:span text:style-name="T2">0.6</text:span></text:p>
            <text:p><text:span text:style-name="T2">n2min</text:span></text:p>
            <text:p><text:span text:style-name="T2">7.4999999999999993E-005</text:span></text:p>
            <text:p><text:span text:style-name="T2">tdmax</text:span></text:p>
            <text:p><text:span text:style-name="T2">277.0</text:span></text:p>
            <text:p><text:span text:style-name="T2">pudz</text:span></text:p>
            <text:p><text:span text:style-name="T2">0.0</text:span></text:p>
            <text:p><text:span text:style-name="T2">mixfact</text:span></text:p>
            <text:p><text:span text:style-name="T2">10.0</text:span></text:p>
            <text:p><text:span text:style-name="T2">depthcrit</text:span></text:p>
            <text:p><text:span text:style-name="T2">25.0</text:span></text:p>
          </draw:text-box>
        </draw:frame>
        <draw:frame draw:style-name="gr3" draw:text-style-name="P5" draw:layer="layout" svg:width="12.393cm" svg:height="0.742cm" svg:x="1.4cm" svg:y="7.53cm">
          <draw:text-box>
            <text:p text:style-name="P4"><text:span text:style-name="T3">lakeparams.txt</text:span></text:p>
          </draw:text-box>
        </draw:frame>
        <draw:frame draw:style-name="gr4" draw:text-style-name="P3" draw:layer="layout" svg:width="12.394cm" svg:height="7.117cm" svg:x="14.205cm" svg:y="8.273cm">
          <draw:text-box>
            <text:p><text:span text:style-name="T4">{</text:span></text:p>
            <text:p><text:span text:style-name="T5"><text:s text:c="2"/></text:span><text:span text:style-name="T6">"betavis"</text:span><text:span text:style-name="T4">:</text:span><text:span text:style-name="T5"> </text:span><text:span text:style-name="T7">0.0</text:span><text:span text:style-name="T4">,</text:span></text:p>
            <text:p><text:span text:style-name="T5"><text:s text:c="2"/></text:span><text:span text:style-name="T6">"za_lake"</text:span><text:span text:style-name="T4">:</text:span><text:span text:style-name="T5"> </text:span><text:span text:style-name="T7">0.6</text:span><text:span text:style-name="T4">,</text:span></text:p>
            <text:p><text:span text:style-name="T5"><text:s text:c="2"/></text:span><text:span text:style-name="T6">"n2min"</text:span><text:span text:style-name="T4">:</text:span><text:span text:style-name="T5"> </text:span><text:span text:style-name="T7">7.4999999999999993E-005</text:span><text:span text:style-name="T4">,</text:span></text:p>
            <text:p><text:span text:style-name="T5"><text:s text:c="2"/></text:span><text:span text:style-name="T6">"tdmax"</text:span><text:span text:style-name="T4">:</text:span><text:span text:style-name="T5"> </text:span><text:span text:style-name="T7">277.0</text:span><text:span text:style-name="T4">,</text:span></text:p>
            <text:p><text:span text:style-name="T5"><text:s text:c="2"/></text:span><text:span text:style-name="T6">"pudz"</text:span><text:span text:style-name="T4">:</text:span><text:span text:style-name="T5"> </text:span><text:span text:style-name="T7">0.0</text:span><text:span text:style-name="T4">,</text:span></text:p>
            <text:p><text:span text:style-name="T5"><text:s text:c="2"/></text:span><text:span text:style-name="T6">"mixfact"</text:span><text:span text:style-name="T4">:</text:span><text:span text:style-name="T5"> </text:span><text:span text:style-name="T7">10.0</text:span><text:span text:style-name="T4">,</text:span></text:p>
            <text:p><text:span text:style-name="T5"><text:s text:c="2"/></text:span><text:span text:style-name="T6">"depthcrit"</text:span><text:span text:style-name="T4">:</text:span><text:span text:style-name="T5"> </text:span><text:span text:style-name="T7">25.0</text:span></text:p>
            <text:p><text:span text:style-name="T4">}</text:span></text:p>
          </draw:text-box>
        </draw:frame>
        <draw:frame draw:style-name="gr3" draw:text-style-name="P5" draw:layer="layout" svg:width="12.393cm" svg:height="0.742cm" svg:x="14.205cm" svg:y="7.531cm">
          <draw:text-box>
            <text:p text:style-name="P4"><text:span text:style-name="T3">Example Sam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Outputs are Received per Sample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alysis plugins will receive the outputs from the cpu_LakeTemperatureTest.txt file in the form of a dictionary.</text:p>
              </text:list-item>
            </text:list>
          </draw:text-box>
        </draw:frame>
        <draw:frame draw:style-name="gr5" draw:text-style-name="P3" draw:layer="layout" svg:width="25.198cm" svg:height="3.197cm" svg:x="1.4cm" svg:y="6.562cm">
          <draw:text-box>
            <text:p><text:span text:style-name="T2"><text:s/>veg_ef%eflx_soil_grnd</text:span></text:p>
            <text:p><text:span text:style-name="T2"><text:s text:c="3"/>1.0000000000000000E+036 <text:s text:c="2"/>1.0000000000000000E+036 <text:s text:c="2"/>1.0000000000000000E+036</text:span></text:p>
            <text:p><text:span text:style-name="T2"><text:s text:c="3"/>1.0000000000000000E+036 <text:s text:c="3"/>77.59170422598278 <text:s text:c="7"/>1.0000000000000000E+036</text:span></text:p>
            <text:p><text:span text:style-name="T2"><text:s text:c="2"/>veg_ef%eflx_gnet</text:span></text:p>
            <text:p><text:span text:style-name="T2"><text:s text:c="3"/>1.0000000000000000E+036 <text:s text:c="2"/>1.0000000000000000E+036 <text:s text:c="2"/>1.0000000000000000E+036</text:span></text:p>
            <text:p><text:span text:style-name="T2"><text:s text:c="3"/>1.0000000000000000E+036 <text:s text:c="3"/>76.98736546216425 <text:s text:c="7"/>1.0000000000000000E+036</text:span></text:p>
          </draw:text-box>
        </draw:frame>
        <draw:frame draw:style-name="gr3" draw:text-style-name="P5" draw:layer="layout" svg:width="25.198cm" svg:height="0.742cm" svg:x="1.4cm" svg:y="5.82cm">
          <draw:text-box>
            <text:p text:style-name="P4"><text:span text:style-name="T3">cpu_LakeTemperatureTest.txt</text:span></text:p>
          </draw:text-box>
        </draw:frame>
        <draw:frame draw:style-name="gr6" draw:text-style-name="P3" draw:layer="layout" svg:width="25.193cm" svg:height="5.161cm" svg:x="1.4cm" svg:y="10.501cm">
          <draw:text-box>
            <text:p><text:span text:style-name="T4">{</text:span></text:p>
            <text:p text:style-name="P6"><text:span text:style-name="T8"><text:s text:c="2"/></text:span><text:span text:style-name="T9">"veg_ef%eflx_soil_grnd"</text:span><text:span text:style-name="T10">:</text:span><text:span text:style-name="T8"> </text:span><text:span text:style-name="T10">[</text:span></text:p>
            <text:p text:style-name="P6"><text:span text:style-name="T11"><text:s text:c="4"/>1.0000000000000000E+036</text:span><text:span text:style-name="T4">,</text:span><text:span text:style-name="T5"> </text:span><text:span text:style-name="T7">1.0000000000000000E+036</text:span><text:span text:style-name="T4">,</text:span><text:span text:style-name="T5"> </text:span><text:span text:style-name="T7">1.0000000000000000E+036</text:span><text:span text:style-name="T4">,</text:span></text:p>
            <text:p text:style-name="P6"><text:span text:style-name="T11"><text:s text:c="4"/>1.0000000000000000E+036</text:span><text:span text:style-name="T10">,</text:span><text:span text:style-name="T8"> </text:span><text:span text:style-name="T11">77.59170422598278</text:span><text:span text:style-name="T10">,</text:span><text:span text:style-name="T8"> </text:span><text:span text:style-name="T11">1.0000000000000000E+036</text:span></text:p>
            <text:p text:style-name="P6"><text:span text:style-name="T5"><text:s text:c="2"/></text:span><text:span text:style-name="T4">],</text:span></text:p>
            <text:p text:style-name="P6"><text:span text:style-name="T8"><text:s text:c="2"/></text:span><text:span text:style-name="T9">"veg_ef%eflx_gnet"</text:span><text:span text:style-name="T10">:</text:span><text:span text:style-name="T8"> </text:span><text:span text:style-name="T10">[</text:span></text:p>
            <text:p text:style-name="P6"><text:span text:style-name="T11"><text:s text:c="4"/>1.0000000000000000E+036</text:span><text:span text:style-name="T4">,</text:span><text:span text:style-name="T5"> </text:span><text:span text:style-name="T7">1.0000000000000000E+036</text:span><text:span text:style-name="T4">,</text:span><text:span text:style-name="T5"> </text:span><text:span text:style-name="T7">1.0000000000000000E+036</text:span><text:span text:style-name="T4">,</text:span></text:p>
            <text:p text:style-name="P6"><text:span text:style-name="T11"><text:s text:c="4"/>1.0000000000000000E+036</text:span><text:span text:style-name="T10">,</text:span><text:span text:style-name="T8"> </text:span><text:span text:style-name="T11">76.98736546216425</text:span><text:span text:style-name="T10">,</text:span><text:span text:style-name="T8"> </text:span><text:span text:style-name="T11">1.0000000000000000E+036</text:span></text:p>
            <text:p text:style-name="P6"><text:span text:style-name="T5"><text:s text:c="2"/></text:span><text:span text:style-name="T4">],</text:span></text:p>
            <text:p><text:span text:style-name="T4">}</text:span></text:p>
          </draw:text-box>
        </draw:frame>
        <draw:frame draw:style-name="gr3" draw:text-style-name="P5" draw:layer="layout" svg:width="20.304cm" svg:height="0.742cm" svg:x="1.4cm" svg:y="9.759cm">
          <draw:text-box>
            <text:p text:style-name="P4"><text:span text:style-name="T3">Outputs Received by Analysis Plugi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ample Groups</text:p>
          </draw:text-box>
        </draw:frame>
        <draw:frame presentation:style-name="pr5" draw:layer="layout" svg:width="25.199cm" svg:height="9.134cm" svg:x="1.411cm" svg:y="3.257cm" presentation:class="outline" presentation:user-transformed="true">
          <draw:text-box>
            <text:list text:style-name="L2">
              <text:list-item>
                <text:p>Represents an ordered grouping of samples</text:p>
              </text:list-item>
              <text:list-item>
                <text:p>Analysis plugins can analyze the result of multiple consecutive runs of elmtest.exe in context this way.</text:p>
              </text:list-item>
            </text:list>
          </draw:text-box>
        </draw:frame>
        <draw:frame draw:style-name="gr7" draw:text-style-name="P3" draw:layer="layout" svg:width="12.394cm" svg:height="7.592cm" svg:x="1.411cm" svg:y="7.974cm">
          <draw:text-box>
            <text:p><text:span text:style-name="T4">[</text:span></text:p>
            <text:p><text:span text:style-name="T4"><text:s text:c="2"/>{</text:span></text:p>
            <text:p><text:span text:style-name="T5"><text:s text:c="4"/></text:span><text:span text:style-name="T6">"betavis"</text:span><text:span text:style-name="T4">:</text:span><text:span text:style-name="T5"> </text:span><text:span text:style-name="T7">0.0</text:span><text:span text:style-name="T4">,</text:span></text:p>
            <text:p><text:span text:style-name="T4"><text:s text:c="4"/>...</text:span></text:p>
            <text:p><text:span text:style-name="T4"><text:s text:c="2"/>},</text:span></text:p>
            <text:p text:style-name="P6"><text:span text:style-name="T4"><text:s text:c="2"/>{</text:span></text:p>
            <text:p text:style-name="P6"><text:span text:style-name="T5"><text:s text:c="4"/></text:span><text:span text:style-name="T6">"betavis"</text:span><text:span text:style-name="T4">:</text:span><text:span text:style-name="T5"> </text:span><text:span text:style-name="T7">0.25</text:span><text:span text:style-name="T4">,</text:span></text:p>
            <text:p text:style-name="P6"><text:span text:style-name="T4"><text:s text:c="4"/>...</text:span></text:p>
            <text:p text:style-name="P6"><text:span text:style-name="T4"><text:s text:c="2"/>},</text:span></text:p>
            <text:p text:style-name="P6"><text:span text:style-name="T4"><text:s text:c="2"/>{</text:span></text:p>
            <text:p text:style-name="P6"><text:span text:style-name="T5"><text:s text:c="4"/></text:span><text:span text:style-name="T6">"betavis"</text:span><text:span text:style-name="T4">:</text:span><text:span text:style-name="T5"> </text:span><text:span text:style-name="T7">0.5</text:span><text:span text:style-name="T4">,</text:span></text:p>
            <text:p text:style-name="P6"><text:span text:style-name="T4"><text:s text:c="4"/>...</text:span></text:p>
            <text:p text:style-name="P6"><text:span text:style-name="T4"><text:s text:c="2"/>}</text:span></text:p>
            <text:p><text:span text:style-name="T4">]</text:span></text:p>
          </draw:text-box>
        </draw:frame>
        <draw:frame draw:style-name="gr3" draw:text-style-name="P5" draw:layer="layout" svg:width="12.393cm" svg:height="0.742cm" svg:x="1.411cm" svg:y="7.232cm">
          <draw:text-box>
            <text:p text:style-name="P4"><text:span text:style-name="T3">Sample Group Data</text:span></text:p>
          </draw:text-box>
        </draw:frame>
        <draw:frame draw:style-name="gr8" draw:text-style-name="P3" draw:layer="layout" svg:width="12.739cm" svg:height="7.616cm" svg:x="14.205cm" svg:y="7.974cm">
          <draw:text-box>
            <text:p><text:span text:style-name="T4">[</text:span></text:p>
            <text:p><text:span text:style-name="T5"><text:s text:c="2"/></text:span><text:span text:style-name="T4">{</text:span></text:p>
            <text:p text:style-name="P6"><text:span text:style-name="T8"><text:s text:c="4"/></text:span><text:span text:style-name="T9">"lakestate_vars%betaprime_col</text:span><text:span text:style-name="T6">"</text:span><text:span text:style-name="T4">:</text:span><text:span text:style-name="T5"> </text:span><text:span text:style-name="T4">[</text:span><text:span text:style-name="T7">0.0</text:span><text:span text:style-name="T4">,</text:span><text:span text:style-name="T5"> </text:span><text:span text:style-name="T12">...</text:span><text:span text:style-name="T4">],</text:span></text:p>
            <text:p text:style-name="P6"><text:span text:style-name="T5"><text:s text:c="4"/></text:span><text:span text:style-name="T12">...</text:span></text:p>
            <text:p><text:span text:style-name="T5"><text:s text:c="2"/></text:span><text:span text:style-name="T4">},</text:span></text:p>
            <text:p text:style-name="P6"><text:span text:style-name="T5"><text:s text:c="2"/></text:span><text:span text:style-name="T4">{</text:span></text:p>
            <text:p text:style-name="P6"><text:span text:style-name="T8"><text:s text:c="4"/></text:span><text:span text:style-name="T9">"lakestate_vars%betaprime_col</text:span><text:span text:style-name="T6">"</text:span><text:span text:style-name="T4">:</text:span><text:span text:style-name="T5"> </text:span><text:span text:style-name="T4">[</text:span><text:span text:style-name="T7">0.25</text:span><text:span text:style-name="T4">,</text:span><text:span text:style-name="T5"> </text:span><text:span text:style-name="T12">...</text:span><text:span text:style-name="T4">],</text:span></text:p>
            <text:p text:style-name="P6"><text:span text:style-name="T5"><text:s text:c="4"/></text:span><text:span text:style-name="T12">...</text:span></text:p>
            <text:p text:style-name="P6"><text:span text:style-name="T5"><text:s text:c="2"/></text:span><text:span text:style-name="T4">},</text:span></text:p>
            <text:p text:style-name="P6"><text:span text:style-name="T5"><text:s text:c="2"/></text:span><text:span text:style-name="T4">{</text:span></text:p>
            <text:p text:style-name="P6"><text:span text:style-name="T8"><text:s text:c="4"/></text:span><text:span text:style-name="T9">"lakestate_vars%betaprime_col</text:span><text:span text:style-name="T6">"</text:span><text:span text:style-name="T4">:</text:span><text:span text:style-name="T5"> </text:span><text:span text:style-name="T4">[</text:span><text:span text:style-name="T7">0.5</text:span><text:span text:style-name="T4">,</text:span><text:span text:style-name="T5"> </text:span><text:span text:style-name="T12">...</text:span><text:span text:style-name="T4">],</text:span></text:p>
            <text:p text:style-name="P6"><text:span text:style-name="T5"><text:s text:c="4"/></text:span><text:span text:style-name="T12">...</text:span></text:p>
            <text:p text:style-name="P6"><text:span text:style-name="T5"><text:s text:c="2"/></text:span><text:span text:style-name="T4">}</text:span></text:p>
            <text:p><text:span text:style-name="T4">]</text:span></text:p>
          </draw:text-box>
        </draw:frame>
        <draw:frame draw:style-name="gr3" draw:text-style-name="P5" draw:layer="layout" svg:width="12.393cm" svg:height="0.742cm" svg:x="14.205cm" svg:y="7.232cm">
          <draw:text-box>
            <text:p text:style-name="P4"><text:span text:style-name="T3">Ordered Output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lugins</text:p>
          </draw:text-box>
        </draw:frame>
        <draw:frame presentation:style-name="pr5" draw:layer="layout" svg:width="25.005cm" svg:height="9.134cm" svg:x="1.4cm" svg:y="3.685cm" presentation:class="outline" presentation:user-transformed="true">
          <draw:text-box>
            <text:list text:style-name="L2">
              <text:list-item>
                <text:p>Our testing framework supports two types of plugins, sampling and analysis.</text:p>
              </text:list-item>
              <text:list-item>
                <text:p>Sampling plugins produce a number of sample groups</text:p>
              </text:list-item>
              <text:list-item>
                <text:p>Analysis plugins can see the values in each sample group and the outputs from elmtest for each sample in that sample group.</text:p>
              </text:list-item>
              <text:list-item>
                <text:p>Analysis plugins can either opt to be run individually on each sample or wait to be run on the entire sample grou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005cm" svg:height="9.134cm" svg:x="1.4cm" svg:y="3.685cm" presentation:class="outline" presentation:user-transformed="true">
          <draw:text-box>
            <text:list text:style-name="L2">
              <text:list-item>
                <text:p>Let’s use one sampling plugin, “Order Sampling” and one analysis plugin “Differences”.</text:p>
              </text:list-item>
            </text:list>
          </draw:text-box>
        </draw:frame>
        <draw:frame draw:style-name="gr9" draw:text-style-name="P3" draw:layer="layout" svg:width="12.527cm" svg:height="8.91cm" svg:x="1.628cm" svg:y="6.616cm">
          <draw:text-box>
            <text:p><text:span text:style-name="T13">Successfully loaded binary.</text:span></text:p>
            <text:p><text:span text:style-name="T4"/></text:p>
            <text:p><text:span text:style-name="T14">Loading sampling plugins:</text:span></text:p>
            <text:p><text:span text:style-name="T14"><text:tab/></text:span><text:span text:style-name="T13">[Order Sampling]: Loaded</text:span></text:p>
            <text:p><text:span text:style-name="T4"/></text:p>
            <text:p><text:span text:style-name="T14">Loaded 1 sampling plugins successfully.</text:span></text:p>
            <text:p><text:span text:style-name="T4"/></text:p>
            <text:p><text:span text:style-name="T14">Loading analysis plugins:</text:span></text:p>
            <text:p><text:span text:style-name="T14"><text:tab/></text:span><text:span text:style-name="T13">[Differences]: Loaded</text:span></text:p>
            <text:p><text:span text:style-name="T4"/></text:p>
            <text:p><text:span text:style-name="T14">Loaded 1 analysis plugins successfully.</text:span></text:p>
            <text:p><text:span text:style-name="T4"/></text:p>
            <text:p><text:span text:style-name="T14">Sampling from plugins:</text:span></text:p>
            <text:p><text:span text:style-name="T14"><text:tab/></text:span><text:span text:style-name="T13">[Order Sampling]:</text:span></text:p>
            <text:p><text:span text:style-name="T14"><text:tab/></text:span><text:span text:style-name="T14"><text:tab/></text:span><text:span text:style-name="T14">(betavis_min_to_max): 11 samples</text:span></text:p>
            <text:p><text:span text:style-name="T14"><text:tab/></text:span><text:span text:style-name="T14"><text:tab/></text:span><text:span text:style-name="T14">Total: 1 groups, 11 samples</text:span></text:p>
            <text:p><text:span text:style-name="T4"/></text:p>
            <text:p><text:span text:style-name="T14"><text:tab/></text:span><text:span text:style-name="T14">Grand Total: 1 groups, 11 samples</text:span></text:p>
            <text:p><text:span text:style-name="T4"/></text:p>
            <text:p><text:span text:style-name="T14">Time estimated: 0:0:0:14</text:span></text:p>
            <text:p><text:span text:style-name="T14">Would you like to continue? (Yes/No)</text:span></text:p>
          </draw:text-box>
        </draw:frame>
        <draw:frame draw:style-name="gr10" draw:text-style-name="P5" draw:layer="layout" svg:width="12.525cm" svg:height="0.884cm" svg:x="1.629cm" svg:y="5.932cm">
          <draw:text-box>
            <text:p text:style-name="P4"><text:span text:style-name="T3">Initial Outp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1" draw:text-style-name="P7" draw:layer="layout" svg:width="18.129cm" svg:height="7.095cm" svg:x="4.936cm" svg:y="4.3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997cm" svg:height="2.144cm" svg:x="11.002cm" svg:y="6.8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CaskaydiaCove NFM" svg:font-family="'CaskaydiaCove NFM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f1112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dwaita Sans" fo:font-family="'Adwaita Sans'" style:font-family-generic="swiss" style:font-pitch="variable" fo:font-size="2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dwaita Sans" fo:font-family="'Adwaita Sans'" style:font-family-generic="swiss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style:font-name="Adwaita Sans" fo:font-family="'Adwaita Sans'" style:font-family-generic="swiss" style:font-pitch="variable" fo:font-size="12pt" style:font-size-asian="12pt" style:font-size-complex="12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pitch="variable" fo:font-size="36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1112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18:27:27.879182752</meta:creation-date>
    <meta:generator>LibreOffice/25.8.1.1$Linux_X86_64 LibreOffice_project/580$Build-1</meta:generator>
    <dc:date>2025-09-16T01:13:28.773641678</dc:date>
    <meta:editing-duration>PT14M34S</meta:editing-duration>
    <meta:editing-cycles>11</meta:editing-cycles>
    <meta:print-date>2025-09-16T01:13:14.237487173</meta:print-date>
    <meta:printed-by>PDF files</meta:printed-by>
    <meta:document-statistic meta:object-count="75"/>
  </office:meta>
</office:document-meta>
</file>