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8415907.jpg" manifest:media-type="image/jpeg"/>
  <manifest:file-entry manifest:full-path="Pictures/10000000000007800000043853B13ED2.jpg" manifest:media-type="image/jpeg"/>
  <manifest:file-entry manifest:full-path="Pictures/100000000000078000000438416F6CD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in-height="7.4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17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in-height="9.5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in-height="8.46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81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54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111111" draw:auto-grow-height="true" draw:auto-grow-width="false" fo:min-height="1.82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4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15cm" draw:shadow="visible" draw:shadow-offset-x="0cm" draw:shadow-offset-y="0.071cm" draw:shadow-color="#000000" draw:shadow-opacity="100%" loext:shadow-blur="0.14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15cm" draw:shadow="hidden" draw:shadow-offset-x="0cm" draw:shadow-offset-y="0.071cm" draw:shadow-color="#000000" draw:shadow-opacity="100%" loext:shadow-blur="0.14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90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2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6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3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0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38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111111" draw:auto-grow-height="true" draw:auto-grow-width="false" fo:min-height="3.17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64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2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111111" draw:auto-grow-height="true" draw:auto-grow-width="false" fo:min-height="6.34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428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111111" draw:auto-grow-height="true" draw:auto-grow-width="false" fo:min-height="3.30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ource Code Pro" fo:font-size="12pt" style:font-size-asian="12pt" style:font-size-complex="12pt"/>
    </style:style>
    <style:style style:name="P4" style:family="paragraph">
      <loext:graphic-properties draw:fill="solid" draw:fill-color="#111111"/>
      <style:text-properties style:font-name="Source Code Pro"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Source Code Pro Semibold1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style:font-name="Source Code Pro Semibold1"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end"/>
      <style:text-properties style:font-name="Source Code Pro Semibold1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Source Code Pro Semibold1" fo:font-size="18pt" style:font-size-asian="18pt" style:font-size-complex="18pt"/>
    </style:style>
    <style:style style:name="P17" style:family="paragraph">
      <style:text-properties fo:font-size="48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 fo:background-color="transparent"/>
    </style:style>
    <style:style style:name="T2" style:family="text">
      <style:text-properties style:text-underline-style="none" fo:background-color="transparent"/>
    </style:style>
    <style:style style:name="T3" style:family="text">
      <style:text-properties style:font-name="Source Code Pro" fo:font-size="12pt" style:font-size-asian="12pt" style:font-size-complex="12pt"/>
    </style:style>
    <style:style style:name="T4" style:family="text">
      <style:text-properties fo:color="#ffff00" loext:opacity="100%" style:font-name="Source Code Pr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Source Code Pro" fo:font-size="12pt" style:font-size-asian="12pt" style:font-size-complex="12pt"/>
    </style:style>
    <style:style style:name="T6" style:family="text">
      <style:text-properties fo:color="#ffff00" loext:opacity="100%" style:font-name="Source Code Pro" fo:font-size="12pt" style:font-size-asian="12pt" style:font-size-complex="12pt"/>
    </style:style>
    <style:style style:name="T7" style:family="text">
      <style:text-properties fo:color="#ffffff" loext:opacity="100%" style:font-name="Source Code Pro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Nimbus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ource Code Pro Semibold1" fo:font-size="16pt" style:font-size-asian="16pt" style:font-size-complex="16pt"/>
    </style:style>
    <style:style style:name="T10" style:family="text">
      <style:text-properties style:font-name="Source Code Pro Semibold1" fo:font-size="24pt" style:font-size-asian="24pt" style:font-size-complex="24pt"/>
    </style:style>
    <style:style style:name="T11" style:family="text">
      <style:text-properties style:font-name="Source Code Pro Semibold1" fo:font-size="12pt" style:font-size-asian="12pt" style:font-size-complex="12pt"/>
    </style:style>
    <style:style style:name="T12" style:family="text">
      <style:text-properties style:font-name="Source Code Pro Semibold1" fo:font-size="18pt" style:font-size-asian="18pt" style:font-size-complex="18pt"/>
    </style:style>
    <style:style style:name="T13" style:family="text">
      <style:text-properties fo:font-size="4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Source Code Pro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Source Code Pro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esting the Lake Temperatur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rpo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 and identify patterns in how changing the inputs (constants) of elmtest.exe, an environmental model, affects its outpu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elmtest.ex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tran binary</text:p>
              </text:list-item>
              <text:list-item>
                <text:p>Compiled in a docker image from <text:span text:style-name="T1"><text:a xlink:href="https://github.com/daliwang/Docker4SPEL" xlink:type="simple">Docker4SPEL</text:a></text:span></text:p>
              </text:list-item>
              <text:list-item>
                <text:p><text:span text:style-name="T2">Environmental 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lmtest.exe interf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s: lakeparams.txt</text:p>
              </text:list-item>
              <text:list-item>
                <text:p>Outputs: cpu_LakeTemperatureTest.t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keparams.txt</text:p>
          </draw:text-box>
        </draw:frame>
        <draw:frame draw:style-name="gr2" draw:text-style-name="P3" draw:layer="layout" svg:width="17.78cm" svg:height="1.838cm" svg:x="5.11cm" svg:y="2.882cm">
          <draw:text-box>
            <text:p text:style-name="P2"><text:span text:style-name="T3">CONTAINER:/app/elmtest/lakeparams.txt</text:span></text:p>
          </draw:text-box>
        </draw:frame>
        <draw:frame draw:style-name="gr3" draw:text-style-name="P4" draw:layer="layout" svg:width="17.78cm" svg:height="7.657cm" svg:x="5.11cm" svg:y="4.047cm">
          <draw:text-box>
            <text:p><text:span text:style-name="T3">betavis</text:span></text:p>
            <text:p><text:span text:style-name="T3">1.0</text:span></text:p>
            <text:p><text:span text:style-name="T3">za_lake</text:span></text:p>
            <text:p><text:span text:style-name="T3">2.0</text:span></text:p>
            <text:p><text:span text:style-name="T3">n2min</text:span></text:p>
            <text:p><text:span text:style-name="T3">7.5e-05</text:span></text:p>
            <text:p><text:span text:style-name="T3">tdmax</text:span></text:p>
            <text:p><text:span text:style-name="T3">275.0</text:span></text:p>
            <text:p><text:span text:style-name="T3">pudz</text:span></text:p>
            <text:p><text:span text:style-name="T3">11.0</text:span></text:p>
            <text:p><text:span text:style-name="T3">mixfact</text:span></text:p>
            <text:p><text:span text:style-name="T3">0.5</text:span></text:p>
            <text:p><text:span text:style-name="T3">depthcrit</text:span></text:p>
            <text:p><text:span text:style-name="T3">25.0</text:span></text:p>
          </draw:text-box>
        </draw:frame>
        <draw:frame draw:style-name="gr4" draw:text-style-name="P5" draw:layer="layout" svg:width="4.004cm" svg:height="3.426cm" svg:x="1.106cm" svg:y="1.54cm">
          <draw:text-box>
            <text:p>Add annotations for input and output file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pu_LakeTemperatureTestDocker.txt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CONTAINER:/app/elmtest/cpu_LakeTemperatureTestDocker.txt (Default Parameters)</text:span></text:p>
          </draw:text-box>
        </draw:frame>
        <draw:frame draw:style-name="gr5" draw:text-style-name="P4" draw:layer="layout" svg:width="22.86cm" svg:height="9.773cm" svg:x="2.57cm" svg:y="4.047cm">
          <draw:text-box>
            <text:p><text:span text:style-name="T3"><text:s/>col_ws%h2osno</text:span></text:p>
            <text:p><text:span text:style-name="T3"><text:s text:c="4"/>0.000000000000000 <text:s text:c="8"/>0.000000000000000 <text:s text:c="8"/>0.000000000000000 <text:s text:c="5"/></text:span></text:p>
            <text:p><text:span text:style-name="T3"><text:s text:c="4"/>0.000000000000000 <text:s text:c="8"/>0.000000000000000 <text:s text:c="8"/>0.000000000000000 <text:s text:c="5"/></text:span></text:p>
            <text:p><text:span text:style-name="T3"><text:s text:c="4"/>0.000000000000000 <text:s text:c="8"/>0.000000000000000 <text:s text:c="8"/>0.000000000000000 <text:s text:c="5"/></text:span></text:p>
            <text:p><text:span text:style-name="T3"><text:s text:c="4"/>0.000000000000000 <text:s text:c="8"/>0.000000000000000 <text:s text:c="8"/>0.000000000000000 <text:s text:c="5"/></text:span></text:p>
            <text:p><text:span text:style-name="T3"><text:s text:c="4"/>0.000000000000000 <text:s text:c="8"/>0.000000000000000 <text:s text:c="8"/>0.000000000000000 <text:s text:c="5"/></text:span></text:p>
            <text:p text:style-name="P7"><text:span text:style-name="T3"><text:s text:c="4"/>0.000000000000000 <text:s text:c="8"/>0.000000000000000 <text:s text:c="8"/>0.000000000000000 <text:s text:c="5"/></text:span></text:p>
            <text:p text:style-name="P8"><text:span text:style-name="T4">- - - … - - -</text:span></text:p>
            <text:p text:style-name="P9"><text:span text:style-name="T5"><text:s/>col_es%hc_soi</text:span></text:p>
            <text:p text:style-name="P9"><text:span text:style-name="T5"><text:s text:c="3"/>1.0000000000000000E+036 <text:s text:c="2"/>1.0000000000000000E+036 <text:s text:c="2"/>1.0000000000000000E+036 </text:span></text:p>
            <text:p text:style-name="P9"><text:span text:style-name="T5"><text:s text:c="3"/>1.0000000000000000E+036 <text:s text:c="2"/>1.0000000000000000E+036 <text:s text:c="2"/>1.0000000000000000E+036 </text:span></text:p>
            <text:p text:style-name="P9"><text:span text:style-name="T5"><text:s text:c="3"/>1.0000000000000000E+036 <text:s text:c="2"/>1.0000000000000000E+036 <text:s text:c="2"/>1.0000000000000000E+036 </text:span></text:p>
            <text:p text:style-name="P9"><text:span text:style-name="T5"><text:s text:c="3"/>1.0000000000000000E+036 <text:s text:c="2"/>1.0000000000000000E+036 <text:s text:c="2"/>1.0000000000000000E+036 </text:span></text:p>
            <text:p text:style-name="P9"><text:span text:style-name="T5"><text:s text:c="3"/>1.0000000000000000E+036 <text:s text:c="2"/>1.0000000000000000E+036 <text:s text:c="2"/>1.0000000000000000E+036 </text:span></text:p>
            <text:p text:style-name="P9"><text:span text:style-name="T5"><text:s text:c="3"/>1.0000000000000000E+036 <text:s text:c="3"/>15270.67984628235 <text:s text:c="7"/>1.0000000000000000E+036 </text:span></text:p>
            <text:p text:style-name="P8"><text:span text:style-name="T4">- - - … - - -</text:span></text:p>
            <text:p text:style-name="P9"><text:span text:style-name="T6"/></text:p>
            <text:p text:style-name="P9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velopment using fake_binary.ex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Docker container is stateless.</text:p>
              </text:list-item>
              <text:list-item>
                <text:p>elmtest.exe depends on shared objects inside the docker image</text:p>
              </text:list-item>
              <text:list-item>
                <text:p>fake_binary.exe was developed to use the same interface as elmtest.exe but without depending on the docker image</text:p>
                <text:list>
                  <text:list-item>
                    <text:p>Uses known functions to compute output, making testing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ake_LakeTemperatureTest.txt</text:p>
          </draw:text-box>
        </draw:frame>
        <draw:frame draw:style-name="gr2" draw:text-style-name="P3" draw:layer="layout" svg:width="22.86cm" svg:height="1.838cm" svg:x="2.57cm" svg:y="2.575cm">
          <draw:text-box>
            <text:p text:style-name="P2"><text:span text:style-name="T3">lake_temp_work/lake_temperature_mapper/fake_binary/fake_LakeTemperatureTest.txt</text:span></text:p>
            <text:p text:style-name="P2"><text:span text:style-name="T3">(Default Parameters)</text:span></text:p>
          </draw:text-box>
        </draw:frame>
        <draw:frame draw:style-name="gr6" draw:text-style-name="P4" draw:layer="layout" svg:width="22.86cm" svg:height="8.715cm" svg:x="2.57cm" svg:y="4.047cm">
          <draw:text-box>
            <text:p><text:span text:style-name="T7">fakevar%sum</text:span></text:p>
            <text:p><text:span text:style-name="T7"><text:s text:c="2"/>314.500075 629.000150</text:span></text:p>
            <text:p><text:span text:style-name="T7"><text:s text:c="2"/>31.450007 157.250037</text:span></text:p>
            <text:p><text:span text:style-name="T7">fakevar%product</text:span></text:p>
            <text:p><text:span text:style-name="T7"><text:s text:c="2"/>31.450007 157.250037</text:span></text:p>
            <text:p><text:span text:style-name="T7"><text:s text:c="2"/>5.671875 32.170166</text:span></text:p>
            <text:p><text:span text:style-name="T4"/></text:p>
            <text:p text:style-name="P9"><text:span text:style-name="T6"/></text:p>
            <text:p text:style-name="P9"><text:span text:style-name="T3"/></text:p>
          </draw:text-box>
        </draw:frame>
        <draw:frame draw:style-name="gr7" draw:text-style-name="P5" draw:layer="layout" svg:width="7.625cm" svg:height="4.061cm" svg:x="3.92cm" svg:y="10.367cm">
          <draw:text-box>
            <text:p>Show functions, inputs, input default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iginal Testing Approa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nerate input values using a json file with instructions for linear interpolation</text:p>
                <text:list>
                  <text:list-item>
                    <text:p>Became the Order Sampling plugin</text:p>
                  </text:list-item>
                </text:list>
              </text:list-item>
              <text:list-item>
                <text:p>Write change to lakeparams.txt</text:p>
              </text:list-item>
              <text:list-item>
                <text:p>Run elmtest.exe</text:p>
              </text:list-item>
              <text:list-item>
                <text:p>Compare cpu_LakeTemperatureTest.txt to cpu_LakeTemperatureRef.txt</text:p>
                <text:list>
                  <text:list-item>
                    <text:p>The difference analysis performed here became the Differences analysis plugin</text:p>
                  </text:list-item>
                </text:list>
              </text:list-item>
              <text:list-item>
                <text:p>Repeat</text:p>
              </text:list-item>
            </text:list>
          </draw:text-box>
        </draw:frame>
        <draw:frame draw:style-name="gr8" draw:text-style-name="P5" draw:layer="layout" svg:width="7.553cm" svg:height="0.886cm" svg:x="4.603cm" svg:y="13.355cm">
          <draw:text-box>
            <text:p>Add json example</text:p>
          </draw:text-box>
        </draw:frame>
        <draw:frame draw:style-name="gr9" draw:text-style-name="P5" draw:layer="layout" svg:width="3.223cm" svg:height="1.521cm" svg:x="10.817cm" svg:y="13.355cm">
          <draw:text-box>
            <text:p>Add diff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prompted a new approach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ternate sampling methods</text:p>
                <text:list>
                  <text:list-item>
                    <text:p>CSV of indices from NIST’s ACTS</text:p>
                  </text:list-item>
                </text:list>
              </text:list-item>
              <text:list-item>
                <text:p>Alternate analysis</text:p>
                <text:list>
                  <text:list-item>
                    <text:p>Linear Regression</text:p>
                  </text:list-item>
                  <text:list-item>
                    <text:p>Overall variance</text:p>
                  </text:list-item>
                  <text:list-item>
                    <text:p>Find physically impossible outputs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4.546cm" svg:height="2.791cm" svg:x="21.287cm" svg:y="5.172cm">
          <draw:text-box>
            <text:p>Explain why indices are used for ACTS</text:p>
          </draw:text-box>
        </draw:frame>
        <draw:frame draw:style-name="gr9" draw:text-style-name="P5" draw:layer="layout" svg:width="3.801cm" svg:height="1.521cm" svg:x="21.599cm" svg:y="9.068cm">
          <draw:text-box>
            <text:p>Define term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w Approach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Split testing program into three steps</text:p>
                <text:list>
                  <text:list-item>
                    <text:p>Sample Generation</text:p>
                    <text:list>
                      <text:list-item>
                        <text:p>Generate input values to give to the model</text:p>
                      </text:list-item>
                    </text:list>
                  </text:list-item>
                  <text:list-item>
                    <text:p>Testing</text:p>
                    <text:list>
                      <text:list-item>
                        <text:p>Run the model</text:p>
                      </text:list-item>
                    </text:list>
                  </text:list-item>
                  <text:list-item>
                    <text:p>Analysis</text:p>
                    <text:list>
                      <text:list-item>
                        <text:p>Analyze the resulting da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5" draw:layer="layout" svg:width="7.841cm" svg:height="1.299cm" svg:x="10.92cm" svg:y="13.542cm">
          <draw:text-box>
            <text:p>Diagram her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hat is a sample?</text:p>
                <text:list>
                  <text:list-item>
                    <text:p>A dictionary mapping input parameter names to their values</text:p>
                  </text:list-item>
                  <text:list-item>
                    <text:p>Example: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22.86cm" svg:height="2.079cm" svg:x="2.57cm" svg:y="8.835cm">
          <draw:text-box>
            <text:p><text:span text:style-name="T4"/></text:p>
            <text:p text:style-name="P10"><text:span text:style-name="T8">{ </text:span><text:span text:style-name="T3">betavis: 1.0, za_lake: 2.0, n2min: 7.5e-05, tdmax: 275.0, pudz: 11.0, …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hat is a sampler?</text:p>
                <text:list>
                  <text:list-item>
                    <text:p>A class that generates any number of sample groups</text:p>
                  </text:list-item>
                  <text:list-item>
                    <text:p>Acts as the interface between a sampling plugin and the testing program</text:p>
                    <text:list>
                      <text:list-item>
                        <text:p>A sampling plugin must have one class extending Sampler, and at least one extending SampleGrou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5" draw:layer="layout" svg:width="5.364cm" svg:height="1.521cm" svg:x="11.545cm" svg:y="13.181cm">
          <draw:text-box>
            <text:p>Sampling plugin?</text:p>
          </draw:text-box>
        </draw:frame>
        <draw:frame draw:style-name="gr9" draw:text-style-name="P5" draw:layer="layout" svg:width="6.951cm" svg:height="1.521cm" svg:x="18.737cm" svg:y="13.205cm">
          <draw:text-box>
            <text:p>Separate code level and conceptual level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hat is a sampler loader?</text:p>
                <text:list>
                  <text:list-item>
                    <text:p>The class that discovers and loads sampling plugins</text:p>
                  </text:list-item>
                  <text:list-item>
                    <text:p>It then collects a list of samplers from each plugin and instantiates them. (Loading)</text:p>
                  </text:list-item>
                  <text:list-item>
                    <text:p>Then, it requests all of the sample groups from each sampler. (Sampl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3" draw:text-style-name="P11" draw:layer="layout" svg:width="19.334cm" svg:height="10.875cm" svg:x="8.136cm" svg:y="2.937cm">
          <draw:image xlink:href="Pictures/100000000000078000000438416F6CD6.jpg" xlink:type="simple" xlink:show="embed" xlink:actuate="onLoad" draw:mime-type="image/jpeg">
            <text:p/>
          </draw:image>
        </draw:frame>
        <draw:frame draw:style-name="gr14" draw:text-style-name="P11" draw:layer="layout" svg:width="9.189cm" svg:height="5.169cm" svg:x="0.261cm" svg:y="8.352cm">
          <draw:image xlink:href="Pictures/10000000000007800000043853B13ED2.jpg" xlink:type="simple" xlink:show="embed" xlink:actuate="onLoad" draw:mime-type="image/jpe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Sample Generation</text:p>
          </draw:text-box>
        </draw:frame>
        <draw:frame draw:style-name="gr15" draw:text-style-name="P13" draw:layer="layout" svg:width="5.188cm" svg:height="1.169cm" svg:x="0cm" svg:y="9.379cm">
          <draw:text-box>
            <text:p text:style-name="P12"><text:span text:style-name="T9">Sample Group</text:span></text:p>
          </draw:text-box>
        </draw:frame>
        <draw:frame draw:style-name="gr15" draw:text-style-name="P13" draw:layer="layout" svg:width="5.188cm" svg:height="1.169cm" svg:x="0cm" svg:y="8.483cm">
          <draw:text-box>
            <text:p text:style-name="P12"><text:span text:style-name="T9">Sample</text:span></text:p>
          </draw:text-box>
        </draw:frame>
        <draw:frame draw:style-name="gr15" draw:text-style-name="P13" draw:layer="layout" svg:width="5.188cm" svg:height="1.169cm" svg:x="0cm" svg:y="10.326cm">
          <draw:text-box>
            <text:p text:style-name="P12"><text:span text:style-name="T9">Sampler</text:span></text:p>
          </draw:text-box>
        </draw:frame>
        <draw:frame draw:style-name="gr16" draw:text-style-name="P14" draw:layer="layout" svg:width="16.159cm" svg:height="1.497cm" svg:x="9.709cm" svg:y="7.504cm">
          <draw:text-box>
            <text:p text:style-name="P2"><text:span text:style-name="T10">Sampler Loader</text:span></text:p>
          </draw:text-box>
        </draw:frame>
        <draw:frame draw:style-name="gr17" draw:text-style-name="P13" draw:layer="layout" svg:width="8.123cm" svg:height="1.665cm" svg:x="13.361cm" svg:y="2.768cm">
          <draw:text-box>
            <text:p text:style-name="P12"><text:span text:style-name="T9">Samplers from Plugins</text:span></text:p>
          </draw:text-box>
        </draw:frame>
        <draw:frame draw:style-name="gr18" draw:text-style-name="P15" draw:layer="layout" svg:width="11.008cm" svg:height="1.665cm" svg:x="11.852cm" svg:y="6.182cm">
          <draw:text-box>
            <text:p text:style-name="P12"><text:span text:style-name="T11">SampleGroups generated by each Sampler</text:span></text:p>
          </draw:text-box>
        </draw:frame>
        <draw:frame draw:style-name="gr19" draw:text-style-name="P15" draw:layer="layout" svg:width="12.157cm" svg:height="1.665cm" svg:x="11.617cm" svg:y="12.652cm">
          <draw:text-box>
            <text:p text:style-name="P12"><text:span text:style-name="T11">SampleGroups now independent of their plugins</text:span></text:p>
          </draw:text-box>
        </draw:frame>
        <draw:frame draw:style-name="gr20" draw:text-style-name="P5" draw:layer="layout" svg:width="6.639cm" svg:height="2.156cm" svg:x="0.745cm" svg:y="0.842cm">
          <draw:text-box>
            <text:p>Make class diagram and divide into components</text:p>
          </draw:text-box>
        </draw:frame>
        <draw:frame draw:style-name="gr20" draw:text-style-name="P5" draw:layer="layout" svg:width="4.209cm" svg:height="2.156cm" svg:x="0.986cm" svg:y="3.44cm">
          <draw:text-box>
            <text:p>Talk about design patterns</text:p>
          </draw:text-box>
        </draw:frame>
        <draw:frame draw:style-name="gr21" draw:text-style-name="P5" draw:layer="layout" svg:width="5.893cm" svg:height="2.47cm" svg:x="2.02cm" svg:y="6.013cm">
          <draw:text-box>
            <text:p>Show variance in groups and sampler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Write a sample to the model’s parameters file</text:p>
              </text:list-item>
              <text:list-item>
                <text:p>Run the model</text:p>
              </text:list-item>
              <text:list-item>
                <text:p>Read the model’s output file</text:p>
              </text:list-item>
              <text:list-item>
                <text:p>Send that test data to individual sample analyzers</text:p>
              </text:list-item>
              <text:list-item>
                <text:p>When a full sample group has been tested, send a table containing each sample’s test data to full sample group analyzers</text:p>
              </text:list-item>
            </text:list>
          </draw:text-box>
        </draw:frame>
        <draw:frame draw:style-name="gr9" draw:text-style-name="P5" draw:layer="layout" svg:width="7.456cm" svg:height="1.521cm" svg:x="2.347cm" svg:y="12.583cm">
          <draw:text-box>
            <text:p>Elaborate + examples on different slide</text:p>
          </draw:text-box>
        </draw:frame>
        <draw:frame draw:style-name="gr20" draw:text-style-name="P5" draw:layer="layout" svg:width="8.106cm" svg:height="2.156cm" svg:x="11.136cm" svg:y="13.518cm">
          <draw:text-box>
            <text:p>Make sure to unify language across the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nalysis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All plugins discovered and loaded by Analyzer Loader</text:p>
              </text:list-item>
              <text:list-item>
                <text:p>Plugins can either analyze samples individually or as a group.</text:p>
                <text:list>
                  <text:list-item>
                    <text:p>Contains a PerSampleAnalyzer subclass if opting to analyze samples individually</text:p>
                  </text:list-item>
                  <text:list-item>
                    <text:p>Contains a SampleGroupAnalyzer subclass if opting to analyze samples as a group</text:p>
                  </text:list-item>
                </text:list>
              </text:list-item>
              <text:list-item>
                <text:p>Each plugin is given its test data, the reference data, and the samples used to generate that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4" draw:text-style-name="P11" draw:layer="layout" svg:width="27.999cm" svg:height="15.749cm" svg:x="0.056cm" svg:y="0.039cm">
          <draw:image xlink:href="Pictures/100000000000078000000438B8415907.jpg" xlink:type="simple" xlink:show="embed" xlink:actuate="onLoad" draw:mime-type="image/jpe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Testing</text:p>
          </draw:text-box>
        </draw:frame>
        <draw:frame draw:style-name="gr22" draw:text-style-name="P14" draw:layer="layout" svg:width="6.946cm" svg:height="1.318cm" svg:x="0cm" svg:y="9.722cm">
          <draw:text-box>
            <text:p text:style-name="P2"><text:span text:style-name="T10">Sample Group</text:span></text:p>
          </draw:text-box>
        </draw:frame>
        <draw:frame draw:style-name="gr22" draw:text-style-name="P14" draw:layer="layout" svg:width="6.946cm" svg:height="1.318cm" svg:x="0.056cm" svg:y="5.044cm">
          <draw:text-box>
            <text:p text:style-name="P2"><text:span text:style-name="T10">Samples</text:span></text:p>
          </draw:text-box>
        </draw:frame>
        <draw:frame draw:style-name="gr22" draw:text-style-name="P14" draw:layer="layout" svg:width="6.946cm" svg:height="1.318cm" svg:x="6.67cm" svg:y="5.044cm">
          <draw:text-box>
            <text:p text:style-name="P2"><text:span text:style-name="T10">Model</text:span></text:p>
          </draw:text-box>
        </draw:frame>
        <draw:frame draw:style-name="gr23" draw:text-style-name="P14" draw:layer="layout" svg:width="6.946cm" svg:height="2.385cm" svg:x="13.285cm" svg:y="9.611cm">
          <draw:text-box>
            <text:p text:style-name="P2"><text:span text:style-name="T10">Table of test data</text:span></text:p>
          </draw:text-box>
        </draw:frame>
        <draw:frame draw:style-name="gr24" draw:text-style-name="P16" draw:layer="layout" svg:width="6.946cm" svg:height="1.853cm" svg:x="20.765cm" svg:y="3.913cm">
          <draw:text-box>
            <text:p text:style-name="P2"><text:span text:style-name="T12">Individual Sample Analyzer</text:span></text:p>
          </draw:text-box>
        </draw:frame>
        <draw:frame draw:style-name="gr24" draw:text-style-name="P16" draw:layer="layout" svg:width="6.946cm" svg:height="1.853cm" svg:x="20.712cm" svg:y="9.999cm">
          <draw:text-box>
            <text:p text:style-name="P2"><text:span text:style-name="T12">Full Sample Group Analyzer</text:span></text:p>
          </draw:text-box>
        </draw:frame>
        <draw:frame draw:style-name="gr25" draw:text-style-name="P5" draw:layer="layout" svg:width="6.278cm" svg:height="1.636cm" svg:x="8.057cm" svg:y="13.686cm">
          <draw:text-box>
            <text:p>3d?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7" draw:layer="layout" svg:width="25.199cm" svg:height="2.629cm" svg:x="1.401cm" svg:y="6.561cm" presentation:class="title" presentation:user-transformed="true">
          <draw:text-box>
            <text:p><text:span text:style-name="T13">Extr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der Sampler (Sampling Plugin)</text:p>
          </draw:text-box>
        </draw:frame>
        <draw:frame presentation:style-name="pr4" draw:layer="layout" svg:width="25.199cm" svg:height="9.134cm" svg:x="1.4cm" svg:y="3.449cm" presentation:class="outline" presentation:user-transformed="true">
          <draw:text-box>
            <text:list text:style-name="L2">
              <text:list-item>
                <text:p>Generates samples using “order files”</text:p>
                <text:list>
                  <text:list-item>
                    <text:p>JSON files with instructions for linearly interpolating through ranges for each input parameter</text:p>
                  </text:list-item>
                </text:list>
              </text:list-item>
              <text:list-item>
                <text:p>Each order file is treated as its own sample grou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8" draw:layer="layout" svg:width="25.199cm" svg:height="2.629cm" svg:x="1.4cm" svg:y="0.628cm" presentation:class="title" presentation:user-transformed="true">
          <draw:text-box>
            <text:p><text:span text:style-name="T14">Example Order: betavis_min_to_max.json</text:span></text:p>
          </draw:text-box>
        </draw:frame>
        <draw:frame draw:style-name="gr2" draw:text-style-name="P3" draw:layer="layout" svg:width="20.32cm" svg:height="1.838cm" svg:x="3.84cm" svg:y="2.882cm">
          <draw:text-box>
            <text:p text:style-name="P2"><text:span text:style-name="T3">lake_temp_work/lake_temperature_mapper/mapping_orders/betavis_min_to_max.json</text:span></text:p>
          </draw:text-box>
        </draw:frame>
        <draw:frame draw:style-name="gr26" draw:text-style-name="P4" draw:layer="layout" svg:width="17.78cm" svg:height="3.425cm" svg:x="5.11cm" svg:y="6.163cm">
          <draw:text-box>
            <text:p><text:span text:style-name="T3">{</text:span></text:p>
            <text:p><text:span text:style-name="T3"><text:s text:c="2"/>"samples":11,</text:span></text:p>
            <text:p><text:span text:style-name="T3"><text:s text:c="2"/>"ranges":{</text:span></text:p>
            <text:p><text:span text:style-name="T3"><text:s text:c="4"/>"betavis": ["r(0)", "r(1)"]</text:span></text:p>
            <text:p><text:span text:style-name="T3"><text:s text:c="2"/>}</text:span></text:p>
            <text:p><text:span text:style-name="T3">}</text:span></text:p>
          </draw:text-box>
        </draw:frame>
        <draw:frame draw:style-name="gr27" draw:text-style-name="P3" draw:layer="layout" svg:width="20.32cm" svg:height="0.906cm" svg:x="3.84cm" svg:y="11.969cm">
          <draw:text-box>
            <text:p text:style-name="P2"><text:span text:style-name="T3">Results in: [0.0, 0.1, 0.2, 0.3, 0.4, 0.5, 0.6, 0.7, 0.8, 0.9, 1.0]</text:span></text:p>
          </draw:text-box>
        </draw:frame>
        <draw:frame draw:style-name="gr28" draw:text-style-name="P3" draw:layer="layout" svg:width="20.32cm" svg:height="2.896cm" svg:x="3.84cm" svg:y="13.009cm">
          <draw:text-box>
            <text:p text:style-name="P2"><text:span text:style-name="T3">What does r(t) mean?</text:span></text:p>
            <text:p text:style-name="P2"><text:span text:style-name="T3">Represents a value returned from performing an unbounded linear interpolation</text:span></text:p>
            <text:p text:style-name="P2"><text:span text:style-name="T3">between the minimum and maximum values specified in the range file (FUT_lake_range.txt for Lake Temperature), with t</text:span></text:p>
            <text:p text:style-name="P2"><text:span text:style-name="T3">as the time value.</text:span></text:p>
          </draw:text-box>
        </draw:frame>
        <draw:frame draw:style-name="gr9" draw:text-style-name="P5" draw:layer="layout" svg:width="12.363cm" svg:height="1.521cm" svg:x="8.25cm" svg:y="10.319cm">
          <draw:text-box>
            <text:p>Make t values that are not just 0 and 1 (and explain 0 and 1)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8" draw:layer="layout" svg:width="25.199cm" svg:height="2.629cm" svg:x="1.4cm" svg:y="0.628cm" presentation:class="title" presentation:user-transformed="true">
          <draw:text-box>
            <text:p><text:span text:style-name="T14">Example Line Order: all_min_to_max.json</text:span></text:p>
          </draw:text-box>
        </draw:frame>
        <draw:frame draw:style-name="gr29" draw:text-style-name="P3" draw:layer="layout" svg:width="20.32cm" svg:height="0.874cm" svg:x="3.84cm" svg:y="3cm">
          <draw:text-box>
            <text:p text:style-name="P2"><text:span text:style-name="T3">lake_temp_work/lake_temperature_mapper/mapping_orders/all_min_to_max.json</text:span></text:p>
          </draw:text-box>
        </draw:frame>
        <draw:frame draw:style-name="gr30" draw:text-style-name="P4" draw:layer="layout" svg:width="17.78cm" svg:height="6.599cm" svg:x="5.11cm" svg:y="5.97cm">
          <draw:text-box>
            <text:p><text:span text:style-name="T3">{</text:span></text:p>
            <text:p><text:span text:style-name="T3"><text:s text:c="2"/>"samples":11,</text:span></text:p>
            <text:p><text:span text:style-name="T3"><text:s text:c="2"/>"ranges": {</text:span></text:p>
            <text:p><text:span text:style-name="T3"><text:s text:c="4"/>"betavis":["r(0)", "r(1)"],</text:span></text:p>
            <text:p><text:span text:style-name="T3"><text:s text:c="4"/>"za_lake":["r(0)", "r(1)"],</text:span></text:p>
            <text:p><text:span text:style-name="T3"><text:s text:c="4"/>"n2min":["r(0)", "r(1)"],</text:span></text:p>
            <text:p><text:span text:style-name="T3"><text:s text:c="4"/>"tdmax":["r(0)", "r(1)"],</text:span></text:p>
            <text:p><text:span text:style-name="T3"><text:s text:c="4"/>"pudz":["r(0)", "r(1)"],</text:span></text:p>
            <text:p><text:span text:style-name="T3"><text:s text:c="4"/>"mixfact":["r(0)", "r(1)"],</text:span></text:p>
            <text:p><text:span text:style-name="T3"><text:s text:c="4"/>"depthcrit":["r(0)", "r(1)"]</text:span></text:p>
            <text:p><text:span text:style-name="T3"><text:s text:c="2"/>}</text:span></text:p>
            <text:p><text:span text:style-name="T3">}</text:span></text:p>
          </draw:text-box>
        </draw:frame>
        <draw:frame draw:style-name="gr27" draw:text-style-name="P3" draw:layer="layout" svg:width="20.32cm" svg:height="0.906cm" svg:x="3.84cm" svg:y="14.001cm">
          <draw:text-box>
            <text:p text:style-name="P2"><text:span text:style-name="T3">Interpolates between each range </text:span><text:span text:style-name="T15">simultaneously,</text:span><text:span text:style-name="T16"> forming a line.</text:span></text:p>
          </draw:text-box>
        </draw:frame>
        <draw:frame draw:style-name="gr8" draw:text-style-name="P5" draw:layer="layout" svg:width="7.191cm" svg:height="0.886cm" svg:x="10.391cm" svg:y="13.037cm">
          <draw:text-box>
            <text:p>Show value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8" draw:layer="layout" svg:width="25.677cm" svg:height="2.629cm" svg:x="1.162cm" svg:y="0.628cm" presentation:class="title" presentation:user-transformed="true">
          <draw:text-box>
            <text:p><text:span text:style-name="T14">Example Box Order: betavis_za_lake_box.json</text:span></text:p>
          </draw:text-box>
        </draw:frame>
        <draw:frame draw:style-name="gr31" draw:text-style-name="P3" draw:layer="layout" svg:width="20.32cm" svg:height="1.678cm" svg:x="3.84cm" svg:y="2.929cm">
          <draw:text-box>
            <text:p text:style-name="P2"><text:span text:style-name="T3">lake_temp_work/lake_temperature_mapper/mapping_orders/betavis_za_lake_box.json</text:span></text:p>
          </draw:text-box>
        </draw:frame>
        <draw:frame draw:style-name="gr32" draw:text-style-name="P4" draw:layer="layout" svg:width="17.78cm" svg:height="3.552cm" svg:x="5.11cm" svg:y="6.099cm">
          <draw:text-box>
            <text:p><text:span text:style-name="T3">{</text:span></text:p>
            <text:p><text:span text:style-name="T3"><text:s text:c="2"/>"ranges": {</text:span></text:p>
            <text:p><text:span text:style-name="T3"><text:s text:c="4"/>"betavis": ["r(0)", "r(1)", 5],</text:span></text:p>
            <text:p><text:span text:style-name="T3"><text:s text:c="4"/>"za_lake": ["r(0)", "r(1)", 5]</text:span></text:p>
            <text:p><text:span text:style-name="T3"><text:s text:c="2"/>}</text:span></text:p>
            <text:p><text:span text:style-name="T3">}</text:span></text:p>
          </draw:text-box>
        </draw:frame>
        <draw:frame draw:style-name="gr33" draw:text-style-name="P3" draw:layer="layout" svg:width="20.32cm" svg:height="1.309cm" svg:x="3.84cm" svg:y="11.449cm">
          <draw:text-box>
            <text:p text:style-name="P2"><text:span text:style-name="T16">Interpolates between each axis, treating each line as a nested for loop. Samples will form a multi-dimensional box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ings to ad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I User interface</text:p>
                <text:list>
                  <text:list-item>
                    <text:p>Possibly talk about whitelist</text:p>
                  </text:list-item>
                </text:list>
              </text:list-item>
              <text:list-item>
                <text:p>Index Sampler Plugin (and ACTS)</text:p>
              </text:list-item>
              <text:list-item>
                <text:p>Analysis Report Examples</text:p>
              </text:list-item>
              <text:list-item>
                <text:p>Transparent Layer Li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a2d43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family="'Source Code Pro Semibold'" style:font-pitch="fixed" fo:font-size="2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family="'Source Code Pro Semibold'" style:font-pitch="fixed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a2d43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6T13:49:46.266205514</meta:creation-date>
    <meta:generator>LibreOffice/25.8.1.1$Linux_X86_64 LibreOffice_project/580$Build-1</meta:generator>
    <dc:date>2025-09-16T01:11:49.233238585</dc:date>
    <meta:editing-duration>PT6H42M38S</meta:editing-duration>
    <meta:editing-cycles>24</meta:editing-cycles>
    <meta:document-statistic meta:object-count="157"/>
  </office:meta>
</office:document-meta>
</file>