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58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111111" draw:auto-grow-height="true" draw:auto-grow-width="false" fo:min-height="7.40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111111" draw:auto-grow-height="true" draw:auto-grow-width="false" fo:min-height="9.5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111111" draw:auto-grow-height="true" draw:auto-grow-width="false" fo:min-height="3.70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111111" draw:auto-grow-height="true" draw:auto-grow-width="false" fo:min-height="9.63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111111" draw:auto-grow-height="true" draw:auto-grow-width="false" fo:min-height="10.58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111111" draw:auto-grow-height="true" draw:auto-grow-width="false" fo:min-height="8.46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58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111111" draw:auto-grow-height="true" draw:auto-grow-width="false" fo:min-height="4.81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ource Code Pro" fo:font-size="12pt" style:font-size-asian="12pt" style:font-size-complex="12pt"/>
    </style:style>
    <style:style style:name="P4" style:family="paragraph">
      <loext:graphic-properties draw:fill="solid" draw:fill-color="#111111"/>
      <style:text-properties style:font-name="Source Code Pro" fo:font-size="12pt" style:font-size-asian="12pt" style:font-size-complex="1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star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style:text-underline-style="solid" style:text-underline-width="auto" style:text-underline-color="font-color" fo:background-color="transparent"/>
    </style:style>
    <style:style style:name="T2" style:family="text">
      <style:text-properties style:text-underline-style="none" fo:background-color="transparent"/>
    </style:style>
    <style:style style:name="T3" style:family="text">
      <style:text-properties style:font-name="Source Code Pro" fo:font-size="12pt" style:font-size-asian="12pt" style:font-size-complex="12pt"/>
    </style:style>
    <style:style style:name="T4" style:family="text">
      <style:text-properties fo:color="#ffff00" loext:opacity="100%" style:font-name="Source Code Pr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ffff" loext:opacity="100%" style:font-name="Source Code Pro" fo:font-size="12pt" style:font-size-asian="12pt" style:font-size-complex="12pt"/>
    </style:style>
    <style:style style:name="T6" style:family="text">
      <style:text-properties fo:color="#ffff00" loext:opacity="100%" style:font-name="Source Code Pro" fo:font-size="12pt" style:font-size-asian="12pt" style:font-size-complex="1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00ff" loext:opacity="100%" style:font-name="Source Code Pro" fo:font-size="12pt" style:font-size-asian="12pt" style:font-size-complex="12pt"/>
    </style:style>
    <style:style style:name="T9" style:family="text">
      <style:text-properties fo:color="#00ffff" loext:opacity="100%" style:font-name="Source Code Pro" fo:font-size="12pt" style:font-size-asian="12pt" style:font-size-complex="12pt"/>
    </style:style>
    <style:style style:name="T10" style:family="text">
      <style:text-properties fo:color="#5c5cff" loext:opacity="100%" style:font-name="Source Code Pro" fo:font-size="12pt" style:font-size-asian="12pt" style:font-size-complex="12pt"/>
    </style:style>
    <style:style style:name="T11" style:family="text">
      <style:text-properties fo:color="#ffffff" loext:opacity="100%" style:font-name="Source Code Pro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apping Lake Temperature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urpo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nd and identify patterns in how changing the constants of elmtest.exe, an environmental model, affects its outpu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elmtest.ex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rtran binary</text:p>
              </text:list-item>
              <text:list-item>
                <text:p>Compiled in a docker image from <text:span text:style-name="T1"><text:a xlink:href="https://github.com/daliwang/Docker4SPEL" xlink:type="simple">Docker4SPEL</text:a></text:span></text:p>
              </text:list-item>
              <text:list-item>
                <text:p><text:span text:style-name="T2">Environmental mode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lmtest.exe interfa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puts: lakeparams.txt</text:p>
              </text:list-item>
              <text:list-item>
                <text:p>Outputs: cpu_LakeTemperatureTest.tx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akeparams.txt</text:p>
          </draw:text-box>
        </draw:frame>
        <draw:frame draw:style-name="gr2" draw:text-style-name="P3" draw:layer="layout" svg:width="17.78cm" svg:height="1.838cm" svg:x="5.11cm" svg:y="2.882cm">
          <draw:text-box>
            <text:p text:style-name="P2"><text:span text:style-name="T3">CONTAINER:/app/elmtest/lakeparams.txt</text:span></text:p>
          </draw:text-box>
        </draw:frame>
        <draw:frame draw:style-name="gr3" draw:text-style-name="P4" draw:layer="layout" svg:width="17.78cm" svg:height="7.657cm" svg:x="5.11cm" svg:y="4.047cm">
          <draw:text-box>
            <text:p><text:span text:style-name="T3">betavis</text:span></text:p>
            <text:p><text:span text:style-name="T3">1.0</text:span></text:p>
            <text:p><text:span text:style-name="T3">za_lake</text:span></text:p>
            <text:p><text:span text:style-name="T3">2.0</text:span></text:p>
            <text:p><text:span text:style-name="T3">n2min</text:span></text:p>
            <text:p><text:span text:style-name="T3">7.5e-05</text:span></text:p>
            <text:p><text:span text:style-name="T3">tdmax</text:span></text:p>
            <text:p><text:span text:style-name="T3">275.0</text:span></text:p>
            <text:p><text:span text:style-name="T3">pudz</text:span></text:p>
            <text:p><text:span text:style-name="T3">11.0</text:span></text:p>
            <text:p><text:span text:style-name="T3">mixfact</text:span></text:p>
            <text:p><text:span text:style-name="T3">0.5</text:span></text:p>
            <text:p><text:span text:style-name="T3">depthcrit</text:span></text:p>
            <text:p><text:span text:style-name="T3">25.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pu_LakeTemperatureTest.txt</text:p>
          </draw:text-box>
        </draw:frame>
        <draw:frame draw:style-name="gr2" draw:text-style-name="P3" draw:layer="layout" svg:width="20.32cm" svg:height="1.838cm" svg:x="3.84cm" svg:y="2.882cm">
          <draw:text-box>
            <text:p text:style-name="P2"><text:span text:style-name="T3">CONTAINER:/app/elmtest/cpu_LakeTemperatureTest.txt (Default Parameters)</text:span></text:p>
          </draw:text-box>
        </draw:frame>
        <draw:frame draw:style-name="gr4" draw:text-style-name="P4" draw:layer="layout" svg:width="22.86cm" svg:height="9.773cm" svg:x="2.57cm" svg:y="4.047cm">
          <draw:text-box>
            <text:p><text:span text:style-name="T3"><text:s/></text:span><text:span text:style-name="T3">col_ws%h2osno</text:span></text:p>
            <text:p><text:span text:style-name="T3"><text:s text:c="4"/></text:span><text:span text:style-name="T3">0.000000000000000 <text:s text:c="8"/>0.000000000000000 <text:s text:c="8"/>0.000000000000000 <text:s text:c="5"/></text:span></text:p>
            <text:p><text:span text:style-name="T3"><text:s text:c="4"/></text:span><text:span text:style-name="T3">0.000000000000000 <text:s text:c="8"/>0.000000000000000 <text:s text:c="8"/>0.000000000000000 <text:s text:c="5"/></text:span></text:p>
            <text:p><text:span text:style-name="T3"><text:s text:c="4"/></text:span><text:span text:style-name="T3">0.000000000000000 <text:s text:c="8"/>0.000000000000000 <text:s text:c="8"/>0.000000000000000 <text:s text:c="5"/></text:span></text:p>
            <text:p><text:span text:style-name="T3"><text:s text:c="4"/></text:span><text:span text:style-name="T3">0.000000000000000 <text:s text:c="8"/>0.000000000000000 <text:s text:c="8"/>0.000000000000000 <text:s text:c="5"/></text:span></text:p>
            <text:p><text:span text:style-name="T3"><text:s text:c="4"/></text:span><text:span text:style-name="T3">0.000000000000000 <text:s text:c="8"/>0.000000000000000 <text:s text:c="8"/>0.000000000000000 <text:s text:c="5"/></text:span></text:p>
            <text:p text:style-name="P6"><text:span text:style-name="T3"><text:s text:c="4"/></text:span><text:span text:style-name="T3">0.000000000000000 <text:s text:c="8"/>0.000000000000000 <text:s text:c="8"/>0.000000000000000 <text:s text:c="5"/></text:span></text:p>
            <text:p text:style-name="P7"><text:span text:style-name="T4">- - - … - - -</text:span></text:p>
            <text:p text:style-name="P8"><text:span text:style-name="T5"><text:s/></text:span><text:span text:style-name="T5">col_es%hc_soi</text:span></text:p>
            <text:p text:style-name="P8"><text:span text:style-name="T5"><text:s text:c="3"/></text:span><text:span text:style-name="T5">1.0000000000000000E+036 <text:s text:c="2"/>1.0000000000000000E+036 <text:s text:c="2"/>1.0000000000000000E+036 </text:span></text:p>
            <text:p text:style-name="P8"><text:span text:style-name="T5"><text:s text:c="3"/></text:span><text:span text:style-name="T5">1.0000000000000000E+036 <text:s text:c="2"/>1.0000000000000000E+036 <text:s text:c="2"/>1.0000000000000000E+036 </text:span></text:p>
            <text:p text:style-name="P8"><text:span text:style-name="T5"><text:s text:c="3"/></text:span><text:span text:style-name="T5">1.0000000000000000E+036 <text:s text:c="2"/>1.0000000000000000E+036 <text:s text:c="2"/>1.0000000000000000E+036 </text:span></text:p>
            <text:p text:style-name="P8"><text:span text:style-name="T5"><text:s text:c="3"/></text:span><text:span text:style-name="T5">1.0000000000000000E+036 <text:s text:c="2"/>1.0000000000000000E+036 <text:s text:c="2"/>1.0000000000000000E+036 </text:span></text:p>
            <text:p text:style-name="P8"><text:span text:style-name="T5"><text:s text:c="3"/></text:span><text:span text:style-name="T5">1.0000000000000000E+036 <text:s text:c="2"/>1.0000000000000000E+036 <text:s text:c="2"/>1.0000000000000000E+036 </text:span></text:p>
            <text:p text:style-name="P8"><text:span text:style-name="T5"><text:s text:c="3"/></text:span><text:span text:style-name="T5">1.0000000000000000E+036 <text:s text:c="3"/>15270.67984628235 <text:s text:c="7"/>1.0000000000000000E+036 </text:span></text:p>
            <text:p text:style-name="P7"><text:span text:style-name="T4">- - - … - - -</text:span></text:p>
            <text:p text:style-name="P8"><text:span text:style-name="T6"/></text:p>
            <text:p text:style-name="P8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pproa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rite change to lakeparams.txt</text:p>
              </text:list-item>
              <text:list-item>
                <text:p>Run elmtest.exe</text:p>
              </text:list-item>
              <text:list-item>
                <text:p>Compare cpu_LakeTemperatureTest.txt to cpu_LakeTemperatureRef.txt</text:p>
              </text:list-item>
              <text:list-item>
                <text:p>Repea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terface of mapping scri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rders</text:p>
                <text:list>
                  <text:list-item>
                    <text:p>Represent a linear sequence of values for specified parameters</text:p>
                  </text:list-item>
                </text:list>
              </text:list-item>
              <text:list-item>
                <text:p>Output</text:p>
                <text:list>
                  <text:list-item>
                    <text:p>Console output and/or csv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7">Example Order: betavis_min_to_max.json</text:span></text:p>
          </draw:text-box>
        </draw:frame>
        <draw:frame draw:style-name="gr2" draw:text-style-name="P3" draw:layer="layout" svg:width="20.32cm" svg:height="1.838cm" svg:x="3.84cm" svg:y="2.882cm">
          <draw:text-box>
            <text:p text:style-name="P2"><text:span text:style-name="T3">lake_temp_work/lake_temperature_mapper/mapping_orders/betavis_min_to_max.json</text:span></text:p>
          </draw:text-box>
        </draw:frame>
        <draw:frame draw:style-name="gr5" draw:text-style-name="P4" draw:layer="layout" svg:width="17.78cm" svg:height="5.541cm" svg:x="5.11cm" svg:y="5.898cm">
          <draw:text-box>
            <text:p><text:span text:style-name="T3">{</text:span></text:p>
            <text:p><text:span text:style-name="T3"><text:s text:c="2"/></text:span><text:span text:style-name="T3">"samples":11,</text:span></text:p>
            <text:p><text:span text:style-name="T3"><text:s text:c="2"/></text:span><text:span text:style-name="T3">"ranges":[</text:span></text:p>
            <text:p><text:span text:style-name="T3"><text:s text:c="4"/></text:span><text:span text:style-name="T3">{</text:span></text:p>
            <text:p><text:span text:style-name="T3"><text:s text:c="6"/></text:span><text:span text:style-name="T3">"param":"betavis",</text:span></text:p>
            <text:p><text:span text:style-name="T3"><text:s text:c="6"/></text:span><text:span text:style-name="T3">"start":"r(0)",</text:span></text:p>
            <text:p><text:span text:style-name="T3"><text:s text:c="6"/></text:span><text:span text:style-name="T3">"end":"r(1)"</text:span></text:p>
            <text:p><text:span text:style-name="T3"><text:s text:c="4"/></text:span><text:span text:style-name="T3">}</text:span></text:p>
            <text:p><text:span text:style-name="T3"><text:s text:c="2"/></text:span><text:span text:style-name="T3">]</text:span></text:p>
            <text:p><text:span text:style-name="T3">}</text:span></text:p>
          </draw:text-box>
        </draw:frame>
        <draw:frame draw:style-name="gr6" draw:text-style-name="P3" draw:layer="layout" svg:width="20.32cm" svg:height="0.906cm" svg:x="3.84cm" svg:y="11.969cm">
          <draw:text-box>
            <text:p text:style-name="P2"><text:span text:style-name="T3">Results in: [0.0, 0.1, 0.2, 0.3, 0.4, 0.5, 0.6, 0.7, 0.8, 0.9, 1.0]</text:span></text:p>
          </draw:text-box>
        </draw:frame>
        <draw:frame draw:style-name="gr2" draw:text-style-name="P3" draw:layer="layout" svg:width="20.32cm" svg:height="2.367cm" svg:x="3.84cm" svg:y="13.009cm">
          <draw:text-box>
            <text:p text:style-name="P2"><text:span text:style-name="T3">What does r(t) mean?</text:span></text:p>
            <text:p text:style-name="P2"><text:span text:style-name="T3">Represents a value returned from performing an unbounded linear interpolation</text:span></text:p>
            <text:p text:style-name="P2"><text:span text:style-name="T3">between the minimum and maximum size specified in FUT_lake_range.txt, with t</text:span></text:p>
            <text:p text:style-name="P2"><text:span text:style-name="T3">as the time valu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7">Example Console Output</text:span></text:p>
          </draw:text-box>
        </draw:frame>
        <draw:frame draw:style-name="gr2" draw:text-style-name="P3" draw:layer="layout" svg:width="20.32cm" svg:height="1.838cm" svg:x="3.84cm" svg:y="2.882cm">
          <draw:text-box>
            <text:p text:style-name="P2"><text:span text:style-name="T3">CONTAINER:/app/scripts/cli.py running betavis_min_to_max order.</text:span></text:p>
          </draw:text-box>
        </draw:frame>
        <draw:frame draw:style-name="gr7" draw:text-style-name="P4" draw:layer="layout" svg:width="25.4cm" svg:height="9.888cm" svg:x="1.3cm" svg:y="4.121cm">
          <draw:text-box>
            <text:p><text:span text:style-name="T8">Executing order: betavis_min_to_max</text:span></text:p>
            <text:p><text:span text:style-name="T8">11 samples using ranges:</text:span></text:p>
            <text:p><text:span text:style-name="T8">Betavis: 0.0 -&gt; 1.0</text:span></text:p>
            <text:p><text:span text:style-name="T3"/></text:p>
            <text:p><text:span text:style-name="T9">Set betavis to 0.0</text:span></text:p>
            <text:p><text:span text:style-name="T10">lakestate_vars%betaprime_col</text:span></text:p>
            <text:p><text:span text:style-name="T3">1.0 <text:s text:c="22"/>-&gt; 0.0 <text:s text:c="22"/>by -1.0 <text:s text:c="21"/>at 16</text:span></text:p>
            <text:p><text:span text:style-name="T3">1.0 <text:s text:c="22"/>-&gt; 0.0 <text:s text:c="22"/>by -1.0 <text:s text:c="21"/>at 33</text:span></text:p>
            <text:p><text:span text:style-name="T3">1.0 <text:s text:c="22"/>-&gt; 0.0 <text:s text:c="22"/>by -1.0 <text:s text:c="21"/>at 50</text:span></text:p>
            <text:p text:style-name="P2"><text:span text:style-name="T4">- - - … - - -</text:span></text:p>
            <text:p><text:span text:style-name="T9">Set betavis to 0.1</text:span></text:p>
            <text:p><text:span text:style-name="T10">lakestate_vars%betaprime_col</text:span></text:p>
            <text:p><text:span text:style-name="T3">1.0 <text:s text:c="22"/>-&gt; 0.1 <text:s text:c="22"/>by -0.9 <text:s text:c="21"/>at 16</text:span></text:p>
            <text:p><text:span text:style-name="T3">1.0 <text:s text:c="22"/>-&gt; 0.1 <text:s text:c="22"/>by -0.9 <text:s text:c="21"/>at 33</text:span></text:p>
            <text:p><text:span text:style-name="T3">1.0 <text:s text:c="22"/>-&gt; 0.1 <text:s text:c="22"/>by -0.9 <text:s text:c="21"/>at 50</text:span></text:p>
            <text:p text:style-name="P7"><text:span text:style-name="T4">- - - … - - -</text:span></text:p>
            <text:p><text:span text:style-name="T9">Set betavis to 1.0</text:span></text:p>
            <text:p><text:span text:style-name="T6">No differen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7">Example CSV Output</text:span></text:p>
          </draw:text-box>
        </draw:frame>
        <draw:frame draw:style-name="gr2" draw:text-style-name="P3" draw:layer="layout" svg:width="20.32cm" svg:height="1.838cm" svg:x="3.84cm" svg:y="2.622cm">
          <draw:text-box>
            <text:p text:style-name="P2"><text:span text:style-name="T3">CONTAINER:/app/scripts/cli.py running betavis_min_to_max order with -s flag.</text:span></text:p>
            <text:p text:style-name="P2"><text:span text:style-name="T3">CONTAINER:/app/mapping_output/betavis_min_to_max.csv</text:span></text:p>
          </draw:text-box>
        </draw:frame>
        <draw:frame draw:style-name="gr8" draw:text-style-name="P4" draw:layer="layout" svg:width="25.4cm" svg:height="10.831cm" svg:x="1.3cm" svg:y="4.121cm">
          <draw:text-box>
            <text:p><text:span text:style-name="T5">betavis,0.0</text:span></text:p>
            <text:p><text:span text:style-name="T5">lakestate_vars%betaprime_col</text:span></text:p>
            <text:p><text:span text:style-name="T5">1.0,0.0,-1.0,16</text:span></text:p>
            <text:p><text:span text:style-name="T5">1.0,0.0,-1.0,33</text:span></text:p>
            <text:p><text:span text:style-name="T5">1.0,0.0,-1.0,50</text:span></text:p>
            <text:p text:style-name="P7"><text:span text:style-name="T4">- - - … - - -</text:span></text:p>
            <text:p><text:span text:style-name="T5">betavis,0.1</text:span></text:p>
            <text:p><text:span text:style-name="T5">lakestate_vars%betaprime_col</text:span></text:p>
            <text:p><text:span text:style-name="T5">1.0,0.1,-0.9,16</text:span></text:p>
            <text:p><text:span text:style-name="T5">1.0,0.1,-0.9,33</text:span></text:p>
            <text:p><text:span text:style-name="T5">1.0,0.1,-0.9,50</text:span></text:p>
            <text:p text:style-name="P7"><text:span text:style-name="T4">- - - … - - -</text:span></text:p>
            <text:p><text:span text:style-name="T5">betavis,1.0</text:span></text:p>
            <text:p><text:span text:style-name="T5"/></text:p>
            <text:p><text:span text:style-name="T5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velopment using fake_binary.ex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Docker container is stateless</text:p>
              </text:list-item>
              <text:list-item>
                <text:p>elmtest.exe depends on the environment inside the docker image</text:p>
              </text:list-item>
              <text:list-item>
                <text:p>fake_binary.exe was developed to imitate elmtest.exe but without depending on the docker image</text:p>
                <text:list>
                  <text:list-item>
                    <text:p>Uses known functions to compute output, making testing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ake_LakeTemperatureTest.txt</text:p>
          </draw:text-box>
        </draw:frame>
        <draw:frame draw:style-name="gr2" draw:text-style-name="P3" draw:layer="layout" svg:width="22.86cm" svg:height="1.838cm" svg:x="2.57cm" svg:y="2.575cm">
          <draw:text-box>
            <text:p text:style-name="P2"><text:span text:style-name="T3">lake_temp_work/lake_temperature_mapper/fake_binary/fake_LakeTemperatureTest.txt</text:span></text:p>
            <text:p text:style-name="P2"><text:span text:style-name="T3">(Default Parameters)</text:span></text:p>
          </draw:text-box>
        </draw:frame>
        <draw:frame draw:style-name="gr9" draw:text-style-name="P4" draw:layer="layout" svg:width="22.86cm" svg:height="8.715cm" svg:x="2.57cm" svg:y="4.047cm">
          <draw:text-box>
            <text:p><text:span text:style-name="T11">fakevar%sum</text:span></text:p>
            <text:p><text:span text:style-name="T11"><text:s text:c="2"/></text:span><text:span text:style-name="T11">314.500075 629.000150</text:span></text:p>
            <text:p><text:span text:style-name="T11"><text:s text:c="2"/></text:span><text:span text:style-name="T11">31.450007 157.250037</text:span></text:p>
            <text:p><text:span text:style-name="T11">fakevar%product</text:span></text:p>
            <text:p><text:span text:style-name="T11"><text:s text:c="2"/></text:span><text:span text:style-name="T11">31.450007 157.250037</text:span></text:p>
            <text:p><text:span text:style-name="T11"><text:s text:c="2"/></text:span><text:span text:style-name="T11">5.671875 32.170166</text:span></text:p>
            <text:p><text:span text:style-name="T4"/></text:p>
            <text:p text:style-name="P8"><text:span text:style-name="T6"/></text:p>
            <text:p text:style-name="P8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7">Example Console Output with fake_binary</text:span></text:p>
          </draw:text-box>
        </draw:frame>
        <draw:frame draw:style-name="gr2" draw:text-style-name="P3" draw:layer="layout" svg:width="20.32cm" svg:height="1.838cm" svg:x="3.84cm" svg:y="2.693cm">
          <draw:text-box>
            <text:p text:style-name="P2"><text:span text:style-name="T3">lake_temp_work/lake_temperature_mapper/scripts/cli.py running betavis_min_to_max order.</text:span></text:p>
          </draw:text-box>
        </draw:frame>
        <draw:frame draw:style-name="gr8" draw:text-style-name="P4" draw:layer="layout" svg:width="25.4cm" svg:height="10.831cm" svg:x="1.3cm" svg:y="4.121cm">
          <draw:text-box>
            <text:p><text:span text:style-name="T8">Executing order: betavis_min_to_max</text:span></text:p>
            <text:p><text:span text:style-name="T8">betavis: 0.0 -&gt; 1.0, 11 samples</text:span></text:p>
            <text:p><text:span text:style-name="T3"/></text:p>
            <text:p><text:span text:style-name="T9">Set betavis to 0.0</text:span></text:p>
            <text:p><text:span text:style-name="T10">fakevar%sum</text:span></text:p>
            <text:p><text:span text:style-name="T5">314.500075 <text:s text:c="15"/>-&gt; 313.500075 <text:s text:c="15"/>by -1.0 <text:s text:c="21"/>at 0</text:span></text:p>
            <text:p><text:span text:style-name="T5">629.00015 <text:s text:c="16"/>-&gt; 627.00015 <text:s text:c="16"/>by -2.0 <text:s text:c="21"/>at 1</text:span></text:p>
            <text:p><text:span text:style-name="T5">31.450007 <text:s text:c="16"/>-&gt; 31.350008 <text:s text:c="16"/>by -0.0999990000000004 <text:s text:c="6"/>at 2</text:span></text:p>
            <text:p text:style-name="P2"><text:span text:style-name="T4">- - - … - - -</text:span></text:p>
            <text:p><text:span text:style-name="T9">Set betavis to 0.1</text:span></text:p>
            <text:p><text:span text:style-name="T10">fakevar%sum</text:span></text:p>
            <text:p><text:span text:style-name="T5">314.500075 <text:s text:c="15"/>-&gt; 313.600075 <text:s text:c="15"/>by -0.8999999999999773 <text:s text:c="6"/>at 0</text:span></text:p>
            <text:p><text:span text:style-name="T5">629.00015 <text:s text:c="16"/>-&gt; 627.20015 <text:s text:c="16"/>by -1.7999999999999545 <text:s text:c="6"/>at 1</text:span></text:p>
            <text:p><text:span text:style-name="T5">31.450007 <text:s text:c="16"/>-&gt; 31.360008 <text:s text:c="16"/>by -0.08999899999999883 <text:s text:c="5"/>at 2</text:span></text:p>
            <text:p text:style-name="P7"><text:span text:style-name="T4">- - - … - - -</text:span></text:p>
            <text:p><text:span text:style-name="T9">Set betavis to 1.0</text:span></text:p>
            <text:p><text:span text:style-name="T6">No differences</text:span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nfiguration of cli.p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figuration files necessary to account for differences between naming of elmtest.exe and fake_binary.exe files.</text:p>
              </text:list-item>
              <text:list-item>
                <text:p>Can generate a configuration file using configure_mapper.p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7">Configuration files</text:span></text:p>
          </draw:text-box>
        </draw:frame>
        <draw:frame draw:style-name="gr10" draw:text-style-name="P3" draw:layer="layout" svg:width="20.32cm" svg:height="0.838cm" svg:x="3.84cm" svg:y="2.693cm">
          <draw:text-box>
            <text:p text:style-name="P2"><text:span text:style-name="T3">lake_temp_work/lake_temperature_mapper/config/mapper.conf</text:span></text:p>
          </draw:text-box>
        </draw:frame>
        <draw:frame draw:style-name="gr11" draw:text-style-name="P4" draw:layer="layout" svg:width="25.4cm" svg:height="5.069cm" svg:x="1.3cm" svg:y="3.531cm">
          <draw:text-box>
            <text:p><text:span text:style-name="T5">binary_path: fake_binary/fake_binary.exe</text:span></text:p>
            <text:p><text:span text:style-name="T5">range_path: fake_binary/FUT_lake_range.txt</text:span></text:p>
            <text:p><text:span text:style-name="T5">params_path: fake_binary/lakeparams.txt</text:span></text:p>
            <text:p><text:span text:style-name="T5">defaults_path: fake_binary/lakeparams_defaults.txt</text:span></text:p>
            <text:p><text:span text:style-name="T5">ref_output: fake_binary/fake_LakeTemperatureRef.txt</text:span></text:p>
            <text:p><text:span text:style-name="T5">test_output: fake_binary/fake_LakeTemperatureTest.txt</text:span></text:p>
            <text:p><text:span text:style-name="T5">order_directory: mapping_orders</text:span></text:p>
            <text:p><text:span text:style-name="T5">output_directory: mapping_output</text:span></text:p>
            <text:p><text:span text:style-name="T5">binary_args: </text:span></text:p>
          </draw:text-box>
        </draw:frame>
        <draw:frame draw:style-name="gr10" draw:text-style-name="P3" draw:layer="layout" svg:width="20.32cm" svg:height="0.838cm" svg:x="3.817cm" svg:y="8.719cm">
          <draw:text-box>
            <text:p text:style-name="P2"><text:span text:style-name="T3">CONTAINER:/app/config/mapper.conf</text:span></text:p>
          </draw:text-box>
        </draw:frame>
        <draw:frame draw:style-name="gr11" draw:text-style-name="P4" draw:layer="layout" svg:width="25.4cm" svg:height="5.069cm" svg:x="1.277cm" svg:y="9.557cm">
          <draw:text-box>
            <text:p><text:span text:style-name="T5">binary_path: elmtest/elmtest.exe</text:span></text:p>
            <text:p><text:span text:style-name="T5">range_path: elmtest/FUT_lake_range.txt</text:span></text:p>
            <text:p><text:span text:style-name="T5">params_path: elmtest/lakeparams.txt</text:span></text:p>
            <text:p><text:span text:style-name="T5">defaults_path: elmtest/lakeparams_defaults.txt</text:span></text:p>
            <text:p><text:span text:style-name="T5">ref_output: elmtest/cpu_LakeTemperatureRef.txt</text:span></text:p>
            <text:p><text:span text:style-name="T5">test_output: elmtest/cpu_LakeTemperatureTest.txt</text:span></text:p>
            <text:p><text:span text:style-name="T5">order_directory: mapping_orders</text:span></text:p>
            <text:p><text:span text:style-name="T5">output_directory: mapping_output</text:span></text:p>
            <text:p><text:span text:style-name="T5">binary_args: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210241" draw:end-color="#451203" draw:start-intensity="100%" draw:end-intensity="100%" draw:angle="30deg" draw:border="0%">
      <loext:gradient-stop svg:offset="0" loext:color-type="rgb" loext:color-value="#210241"/>
      <loext:gradient-stop svg:offset="1" loext:color-type="rgb" loext:color-value="#451203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Code Pro Semibold" fo:font-family="'Source Code Pro Semibold'" style:font-pitch="fixed" fo:font-size="2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4pt" style:font-size-asian="24pt" style:font-size-complex="24pt"/>
    </style:style>
    <style:style style:name="Default-outline5" style:family="presentation" style:parent-style-name="Default-outline4">
      <style:paragraph-properties fo:margin-top="0.1cm" fo:margin-bottom="0cm"/>
      <style:text-properties fo:font-size="24pt" style:font-size-asian="24pt" style:font-size-complex="24pt"/>
    </style:style>
    <style:style style:name="Default-outline6" style:family="presentation" style:parent-style-name="Default-outline5">
      <style:paragraph-properties fo:margin-top="0.1cm" fo:margin-bottom="0cm"/>
      <style:text-properties fo:font-size="24pt" style:font-size-asian="24pt" style:font-size-complex="24pt"/>
    </style:style>
    <style:style style:name="Default-outline7" style:family="presentation" style:parent-style-name="Default-outline6">
      <style:paragraph-properties fo:margin-top="0.1cm" fo:margin-bottom="0cm"/>
      <style:text-properties fo:font-size="24pt" style:font-size-asian="24pt" style:font-size-complex="24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Code Pro Semibold" fo:font-family="'Source Code Pro Semibold'" style:font-pitch="fixed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3:49:46.266205514</meta:creation-date>
    <meta:generator>LibreOffice/24.2.3.2$Linux_X86_64 LibreOffice_project/420$Build-2</meta:generator>
    <dc:date>2024-05-24T12:10:50.589493127</dc:date>
    <meta:editing-duration>PT20M5S</meta:editing-duration>
    <meta:editing-cycles>7</meta:editing-cycles>
    <meta:document-statistic meta:object-count="96"/>
  </office:meta>
</office:document-meta>
</file>